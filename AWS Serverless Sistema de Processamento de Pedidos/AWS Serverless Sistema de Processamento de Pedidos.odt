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2" manifest:media-type="application/x-openoffice-wmf;windows_formatname=&quot;Image WMF&quot;"/>
  <manifest:file-entry manifest:full-path="content.xml" manifest:media-type="text/xml"/>
  <manifest:file-entry manifest:full-path="Object 2" manifest:media-type="application/vnd.sun.star.oleobject"/>
  <manifest:file-entry manifest:full-path="styles.xml" manifest:media-type="text/xml"/>
  <manifest:file-entry manifest:full-path="settings.xml" manifest:media-type="text/xml"/>
  <manifest:file-entry manifest:full-path="meta.xml" manifest:media-type="text/xml"/>
  <manifest:file-entry manifest:full-path="Pictures/1000000100000304000001E23B5F5543.png" manifest:media-type="image/png"/>
  <manifest:file-entry manifest:full-path="Pictures/100000010000029C000001E077A0522F.png" manifest:media-type="image/png"/>
  <manifest:file-entry manifest:full-path="Pictures/10000001000002C7000001C8705BEBD8.png" manifest:media-type="image/png"/>
  <manifest:file-entry manifest:full-path="Pictures/100000010000027600000182EB3B4202.png" manifest:media-type="image/png"/>
  <manifest:file-entry manifest:full-path="Pictures/10000001000001BB000001DD51E5A4E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charset="x-symbol"/>
    <style:font-face style:name="Arial" svg:font-family="Arial" style:font-family-generic="swiss" style:font-pitch="variable"/>
    <style:font-face style:name="Arial1" svg:font-family="Arial" style:font-family-generic="system" style:font-pitch="variable"/>
    <style:font-face style:name="Lato 2" svg:font-family="'Lato 2'"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aec9"/>
    </style:style>
    <style:style style:name="P2" style:family="paragraph" style:parent-style-name="Standard">
      <style:text-properties officeooo:paragraph-rsid="0011aec9"/>
    </style:style>
    <style:style style:name="P3" style:family="paragraph" style:parent-style-name="Standard" style:list-style-name="WWNum1">
      <style:text-properties officeooo:paragraph-rsid="0011aec9"/>
    </style:style>
    <style:style style:name="P4" style:family="paragraph" style:parent-style-name="Standard" style:list-style-name="WWNum2">
      <style:text-properties officeooo:paragraph-rsid="0011aec9"/>
    </style:style>
    <style:style style:name="P5" style:family="paragraph" style:parent-style-name="Standard" style:list-style-name="">
      <loext:graphic-properties draw:fill="solid" draw:fill-color="#ffffff"/>
      <style:paragraph-properties fo:line-height="100%" fo:background-color="#ffffff"/>
      <style:text-properties officeooo:paragraph-rsid="0011aec9"/>
    </style:style>
    <style:style style:name="P6" style:family="paragraph" style:parent-style-name="Standard" style:list-style-name="WWNum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7" style:family="paragraph" style:parent-style-name="Standard" style:list-style-name="WWNum3">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9" style:family="paragraph" style:parent-style-name="Standard" style:list-style-name="">
      <loext:graphic-properties draw:fill="solid" draw:fill-color="#ffffff"/>
      <style:paragraph-properties fo:margin-top="0cm" fo:margin-bottom="0cm" style:contextual-spacing="false" fo:line-height="100%" fo:background-color="#ffffff"/>
      <style:text-properties officeooo:paragraph-rsid="0011aec9"/>
    </style:style>
    <style:style style:name="P10"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loext:word-spacing-minimum="75%" loext:word-spacing-maximum="133%"/>
      <style:text-properties officeooo:paragraph-rsid="0011aec9"/>
    </style:style>
    <style:style style:name="P11" style:family="paragraph" style:parent-style-name="Standard" style:list-style-name="">
      <loext:graphic-properties draw:fill="solid" draw:fill-color="#ffffff"/>
      <style:paragraph-properties fo:margin-top="0cm" fo:margin-bottom="0cm" style:contextual-spacing="false" fo:line-height="100%" fo:background-color="#ffffff"/>
      <style:text-properties fo:color="#242a42" loext:opacity="100%" style:font-name="Arial" fo:font-size="13.5pt" fo:font-weight="bold" officeooo:paragraph-rsid="0011aec9" style:letter-kerning="false" style:font-name-asian="Times New Roman" style:font-size-asian="13.5pt" style:language-asian="pt" style:country-asian="BR" style:font-weight-asian="bold" style:font-name-complex="Arial1" style:font-size-complex="13.5pt" style:font-weight-complex="bold"/>
    </style:style>
    <style:style style:name="P12" style:family="paragraph" style:parent-style-name="Standard">
      <loext:graphic-properties draw:fill="solid" draw:fill-color="#ffffff"/>
      <style:paragraph-properties fo:margin-top="0cm" fo:margin-bottom="0.318cm" style:contextual-spacing="false" fo:line-height="100%" fo:text-align="justify" style:justify-single-word="false" fo:background-color="#ffffff" loext:word-spacing-minimum="75%" loext:word-spacing-maximum="133%"/>
      <style:text-properties officeooo:paragraph-rsid="0011aec9"/>
    </style:style>
    <style:style style:name="P13" style:family="paragraph" style:parent-style-name="Standard" style:list-style-name="WWNum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4" style:family="paragraph" style:parent-style-name="Standard" style:list-style-name="WWNum4">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5" style:family="paragraph" style:parent-style-name="Standard" style:list-style-name="WWNum5">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6" style:family="paragraph" style:parent-style-name="Standard" style:list-style-name="WWNum5">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7" style:family="paragraph" style:parent-style-name="Standard" style:list-style-name="WWNum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8" style:family="paragraph" style:parent-style-name="Standard" style:list-style-name="WWNum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 style:family="paragraph" style:parent-style-name="Standard" style:list-style-name="WWNum7">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 style:family="paragraph" style:parent-style-name="Standard" style:list-style-name="WWNum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 style:family="paragraph" style:parent-style-name="Standard" style:list-style-name="WWNum9">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23" style:family="paragraph" style:parent-style-name="Standard" style:list-style-name="">
      <loext:graphic-properties draw:fill="solid" draw:fill-color="#ffffff"/>
      <style:paragraph-properties fo:margin-top="0cm" fo:margin-bottom="0cm" style:contextual-spacing="false" fo:line-height="100%" fo:text-align="justify" style:justify-single-word="false" fo:background-color="#ffffff" loext:word-spacing-minimum="75%" loext:word-spacing-maximum="133%"/>
      <style:text-properties officeooo:paragraph-rsid="0011aec9"/>
    </style:style>
    <style:style style:name="P24" style:family="paragraph" style:parent-style-name="Standard" style:list-style-name="WWNum1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 style:family="paragraph" style:parent-style-name="Standard" style:list-style-name="WWNum10">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 style:family="paragraph" style:parent-style-name="Standard" style:list-style-name="WWNum11">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 style:family="paragraph" style:parent-style-name="Standard" style:list-style-name="WWNum11">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 style:family="paragraph" style:parent-style-name="Standard" style:list-style-name="WWNum1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 style:family="paragraph" style:parent-style-name="Standard" style:list-style-name="WWNum12">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 style:family="paragraph" style:parent-style-name="Standard" style:list-style-name="WWNum13">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 style:family="paragraph">
      <loext:graphic-properties draw:fill="none"/>
      <style:paragraph-properties fo:text-align="left"/>
      <style:text-properties fo:font-size="18pt"/>
    </style:style>
    <style:style style:name="P32" style:family="paragraph" style:parent-style-name="Standard" style:list-style-name="WWNum1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 style:family="paragraph" style:parent-style-name="Standard" style:list-style-name="WWNum14">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 style:family="paragraph" style:parent-style-name="Standard" style:list-style-name="">
      <loext:graphic-properties draw:fill="solid" draw:fill-color="#ffffff"/>
      <style:paragraph-properties fo:margin-top="0cm" fo:margin-bottom="0.318cm" style:contextual-spacing="false" fo:line-height="100%" fo:background-color="#ffffff"/>
      <style:text-properties officeooo:paragraph-rsid="0011aec9"/>
    </style:style>
    <style:style style:name="P35" style:family="paragraph" style:parent-style-name="Standard" style:list-style-name="WWNum1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 style:family="paragraph" style:parent-style-name="Standard" style:list-style-name="WWNum15">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 style:family="paragraph" style:parent-style-name="Standard" style:list-style-name="WWNum16">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 style:family="paragraph" style:parent-style-name="Standard" style:list-style-name="WWNum16">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 style:family="paragraph" style:parent-style-name="Standard" style:list-style-name="WWNum16">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 style:family="paragraph" style:parent-style-name="Standard" style:list-style-name="WWNum1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 style:family="paragraph" style:parent-style-name="Standard" style:list-style-name="WWNum17">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 style:family="paragraph" style:parent-style-name="Standard" style:list-style-name="WWNum1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 style:family="paragraph" style:parent-style-name="Standard" style:list-style-name="WWNum18">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45" style:family="paragraph" style:parent-style-name="Standard">
      <loext:graphic-properties draw:fill="solid" draw:fill-color="#ffffff"/>
      <style:paragraph-properties fo:margin-top="0cm" fo:margin-bottom="0cm" style:contextual-spacing="false" fo:line-height="100%" fo:background-color="#ffffff"/>
      <style:text-properties officeooo:paragraph-rsid="0011aec9"/>
    </style:style>
    <style:style style:name="P46" style:family="paragraph" style:parent-style-name="Standard">
      <loext:graphic-properties draw:fill="solid" draw:fill-color="#1d1f21"/>
      <style:paragraph-properties fo:margin-left="0.63cm" fo:margin-top="0cm" fo:margin-bottom="0cm" style:contextual-spacing="false" fo:line-height="100%" fo:background-color="#1d1f21" fo:padding-left="0.494cm" fo:padding-right="0.247cm" fo:padding-top="0.247cm" fo:padding-bottom="0cm" fo:border-left="4.51pt solid #b3c746" fo:border-right="0.26pt solid #b3c746" fo:border-top="0.26pt solid #b3c746" fo:border-bottom="none" style:shadow="none"/>
      <style:text-properties officeooo:paragraph-rsid="0011aec9"/>
    </style:style>
    <style:style style:name="P47" style:family="paragraph" style:parent-style-name="Standard">
      <loext:graphic-properties draw:fill="solid" draw:fill-color="#1d1f21"/>
      <style:paragraph-properties fo:margin-left="0.63cm" fo:margin-top="0cm" fo:margin-bottom="0cm" style:contextual-spacing="false" fo:line-height="100%" fo:background-color="#1d1f21" fo:padding-left="0.494cm" fo:padding-right="0.247cm" fo:padding-top="0cm" fo:padding-bottom="0cm" fo:border-left="4.51pt solid #b3c746" fo:border-right="0.26pt solid #b3c746" fo:border-top="none" fo:border-bottom="none" style:shadow="none"/>
      <style:text-properties officeooo:paragraph-rsid="0011aec9"/>
    </style:style>
    <style:style style:name="P48" style:family="paragraph" style:parent-style-name="Standard">
      <loext:graphic-properties draw:fill="solid" draw:fill-color="#1d1f21"/>
      <style:paragraph-properties fo:margin-left="0.63cm" fo:margin-top="0cm" fo:margin-bottom="0cm" style:contextual-spacing="false" fo:line-height="100%" fo:background-color="#1d1f21" fo:padding-left="0.494cm" fo:padding-right="0.247cm" fo:padding-top="0cm" fo:padding-bottom="0.247cm" fo:border-left="4.51pt solid #b3c746" fo:border-right="0.26pt solid #b3c746" fo:border-top="none" fo:border-bottom="0.26pt solid #b3c746" style:shadow="none"/>
      <style:text-properties officeooo:paragraph-rsid="0011aec9"/>
    </style:style>
    <style:style style:name="P49" style:family="paragraph" style:parent-style-name="Standard" style:list-style-name="WWNum19">
      <style:paragraph-properties fo:margin-left="2.33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50" style:family="paragraph" style:parent-style-name="Standard" style:list-style-name="WWNum19">
      <style:paragraph-properties fo:margin-left="2.337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51" style:family="paragraph" style:parent-style-name="Standard">
      <style:paragraph-properties fo:margin-top="0cm" fo:margin-bottom="0cm" style:contextual-spacing="false" fo:line-height="100%" fo:text-align="justify" style:justify-single-word="false" loext:word-spacing-minimum="75%" loext:word-spacing-maximum="133%"/>
      <style:text-properties officeooo:paragraph-rsid="0011aec9"/>
    </style:style>
    <style:style style:name="P52" style:family="paragraph" style:parent-style-name="Standard" style:list-style-name="">
      <style:paragraph-properties fo:margin-top="0cm" fo:margin-bottom="0cm" style:contextual-spacing="false" fo:line-height="100%"/>
      <style:text-properties officeooo:paragraph-rsid="0011aec9"/>
    </style:style>
    <style:style style:name="P53"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Arial" fo:font-size="12pt" officeooo:paragraph-rsid="0011aec9" style:letter-kerning="false" style:font-name-asian="Times New Roman" style:font-size-asian="12pt" style:language-asian="pt" style:country-asian="BR" style:font-name-complex="Arial1" style:font-size-complex="12pt"/>
    </style:style>
    <style:style style:name="P54" style:family="paragraph" style:parent-style-name="Standard" style:list-style-name="">
      <style:paragraph-properties fo:margin-top="0cm" fo:margin-bottom="0.318cm" style:contextual-spacing="false" fo:line-height="100%"/>
      <style:text-properties officeooo:paragraph-rsid="0011aec9"/>
    </style:style>
    <style:style style:name="P55" style:family="paragraph" style:parent-style-name="Standard" style:list-style-name="WWNum20">
      <style:paragraph-properties fo:margin-left="2.33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56" style:family="paragraph" style:parent-style-name="Standard" style:list-style-name="WWNum20">
      <style:paragraph-properties fo:margin-left="2.337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57" style:family="paragraph" style:parent-style-name="Standard">
      <style:paragraph-properties fo:margin-top="0cm" fo:margin-bottom="0.423cm" style:contextual-spacing="false" fo:line-height="100%" fo:text-align="justify" style:justify-single-word="false" loext:word-spacing-minimum="75%" loext:word-spacing-maximum="133%"/>
      <style:text-properties style:font-name="Arial" fo:font-size="12pt" officeooo:paragraph-rsid="0011aec9" style:letter-kerning="false" style:font-name-asian="Times New Roman" style:font-size-asian="12pt" style:language-asian="pt" style:country-asian="BR" style:font-name-complex="Arial1" style:font-size-complex="12pt"/>
    </style:style>
    <style:style style:name="P58" style:family="paragraph" style:parent-style-name="Standard">
      <loext:graphic-properties draw:fill="solid" draw:fill-color="#1d1f21"/>
      <style:paragraph-properties fo:margin-left="0.63cm" fo:margin-right="0.318cm" fo:margin-top="0cm" fo:margin-bottom="0cm" style:contextual-spacing="false" fo:line-height="100%" fo:background-color="#1d1f21" fo:padding-left="0.494cm" fo:padding-right="0.247cm" fo:padding-top="0.247cm" fo:padding-bottom="0cm" fo:border-left="4.51pt solid #b3c746" fo:border-right="0.26pt solid #b3c746" fo:border-top="0.26pt solid #b3c746" fo:border-bottom="none" style:shadow="none"/>
      <style:text-properties officeooo:paragraph-rsid="0011aec9"/>
    </style:style>
    <style:style style:name="P59" style:family="paragraph" style:parent-style-name="Standard">
      <loext:graphic-properties draw:fill="solid" draw:fill-color="#1d1f21"/>
      <style:paragraph-properties fo:margin-left="0.63cm" fo:margin-right="0.318cm" fo:margin-top="0cm" fo:margin-bottom="0cm" style:contextual-spacing="false" fo:line-height="100%" fo:background-color="#1d1f21" fo:padding-left="0.494cm" fo:padding-right="1.094cm" fo:padding-top="0cm" fo:padding-bottom="0cm" fo:border-left="4.51pt solid #b3c746" fo:border-right="0.26pt solid #b3c746" fo:border-top="none" fo:border-bottom="none" style:shadow="none"/>
      <style:text-properties officeooo:paragraph-rsid="0011aec9"/>
    </style:style>
    <style:style style:name="P60" style:family="paragraph" style:parent-style-name="Standard">
      <loext:graphic-properties draw:fill="solid" draw:fill-color="#1d1f21"/>
      <style:paragraph-properties fo:margin-left="0.63cm" fo:margin-right="0.318cm" fo:margin-top="0cm" fo:margin-bottom="0cm" style:contextual-spacing="false" fo:line-height="100%" fo:background-color="#1d1f21" fo:padding-left="0.494cm" fo:padding-right="1.094cm" fo:padding-top="0cm" fo:padding-bottom="0cm" fo:border-left="4.51pt solid #b3c746" fo:border-right="0.26pt solid #b3c746" fo:border-top="none" fo:border-bottom="none" style:shadow="none"/>
      <style:text-properties style:font-name="Arial" fo:font-size="12pt" officeooo:paragraph-rsid="0011aec9" style:letter-kerning="false" style:font-name-asian="Times New Roman" style:font-size-asian="12pt" style:language-asian="pt" style:country-asian="BR" style:font-name-complex="Arial1" style:font-size-complex="12pt"/>
    </style:style>
    <style:style style:name="P61" style:family="paragraph" style:parent-style-name="Standard">
      <loext:graphic-properties draw:fill="solid" draw:fill-color="#1d1f21"/>
      <style:paragraph-properties fo:margin-left="0.63cm" fo:margin-right="0.318cm" fo:margin-top="0cm" fo:margin-bottom="0.212cm" style:contextual-spacing="false" fo:line-height="100%" fo:background-color="#1d1f21" fo:padding-left="0.494cm" fo:padding-right="0.247cm" fo:padding-top="0cm" fo:padding-bottom="0.247cm" fo:border-left="4.51pt solid #b3c746" fo:border-right="0.26pt solid #b3c746" fo:border-top="none" fo:border-bottom="0.26pt solid #b3c746" style:shadow="none"/>
      <style:text-properties officeooo:paragraph-rsid="0011aec9"/>
    </style:style>
    <style:style style:name="P62" style:family="paragraph" style:parent-style-name="Standard" style:list-style-name="WWNum21">
      <style:paragraph-properties fo:margin-left="2.644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63" style:family="paragraph" style:parent-style-name="Standard" style:list-style-name="WWNum21">
      <style:paragraph-properties fo:margin-left="2.644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64" style:family="paragraph" style:parent-style-name="Standard" style:list-style-name="WWNum22">
      <style:paragraph-properties fo:margin-left="3.563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65" style:family="paragraph" style:parent-style-name="Standard" style:list-style-name="WWNum22">
      <style:paragraph-properties fo:margin-left="3.597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66" style:family="paragraph" style:parent-style-name="Standard" style:list-style-name="WWNum23">
      <style:paragraph-properties fo:margin-left="2.644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67" style:family="paragraph" style:parent-style-name="Standard" style:list-style-name="WWNum24">
      <style:paragraph-properties fo:margin-left="2.33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68" style:family="paragraph" style:parent-style-name="Standard" style:list-style-name="WWNum24">
      <style:paragraph-properties fo:margin-left="2.337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69" style:family="paragraph" style:parent-style-name="Standard" style:list-style-name="WWNum25">
      <style:paragraph-properties fo:margin-left="3.563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0" style:family="paragraph" style:parent-style-name="Standard" style:list-style-name="WWNum25">
      <style:paragraph-properties fo:margin-left="3.59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1" style:family="paragraph" style:parent-style-name="Standard" style:list-style-name="WWNum25">
      <style:paragraph-properties fo:margin-left="3.552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2" style:family="paragraph" style:parent-style-name="Standard" style:list-style-name="WWNum25">
      <style:paragraph-properties fo:margin-left="3.597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73" style:family="paragraph" style:parent-style-name="Standard" style:list-style-name="WWNum26">
      <style:paragraph-properties fo:margin-left="2.33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4" style:family="paragraph" style:parent-style-name="Standard" style:list-style-name="WWNum27">
      <style:paragraph-properties fo:margin-left="2.33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5" style:family="paragraph" style:parent-style-name="Standard" style:list-style-name="WWNum27">
      <style:paragraph-properties fo:margin-left="2.337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76" style:family="paragraph" style:parent-style-name="Standard" style:list-style-name="WWNum28">
      <style:paragraph-properties fo:margin-left="3.563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7" style:family="paragraph" style:parent-style-name="Standard" style:list-style-name="WWNum28">
      <style:paragraph-properties fo:margin-left="3.59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78" style:family="paragraph" style:parent-style-name="Standard" style:list-style-name="WWNum28">
      <style:paragraph-properties fo:margin-left="3.552cm" fo:margin-top="0cm" fo:margin-bottom="0.318cm" style:contextual-spacing="false" fo:line-height="100%" fo:text-align="justify" style:justify-single-word="false" fo:text-indent="-0.635cm" style:auto-text-indent="false" loext:word-spacing-minimum="75%" loext:word-spacing-maximum="133%"/>
      <style:text-properties officeooo:paragraph-rsid="0011aec9"/>
    </style:style>
    <style:style style:name="P79" style:family="paragraph" style:parent-style-name="Standard" style:list-style-name="WWNum29">
      <style:paragraph-properties fo:margin-left="2.337cm" fo:margin-top="0cm" fo:margin-bottom="0cm" style:contextual-spacing="false" fo:line-height="100%" fo:text-align="justify" style:justify-single-word="false" fo:text-indent="-0.635cm" style:auto-text-indent="false" loext:word-spacing-minimum="75%" loext:word-spacing-maximum="133%"/>
      <style:text-properties officeooo:paragraph-rsid="0011aec9"/>
    </style:style>
    <style:style style:name="P80" style:family="paragraph" style:parent-style-name="Standard" style:list-style-name="WWNum3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1" style:family="paragraph" style:parent-style-name="Standard" style:list-style-name="WWNum31">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2" style:family="paragraph" style:parent-style-name="Standard" style:list-style-name="WWNum31">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3" style:family="paragraph" style:parent-style-name="Standard" style:list-style-name="WWNum31">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4" style:family="paragraph" style:parent-style-name="Standard" style:list-style-name="WWNum32">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5" style:family="paragraph" style:parent-style-name="Standard" style:list-style-name="WWNum32">
      <loext:graphic-properties draw:fill="solid" draw:fill-color="#ffffff"/>
      <style:paragraph-properties fo:margin-left="3.579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6" style:family="paragraph" style:parent-style-name="Standard" style:list-style-name="WWNum32">
      <loext:graphic-properties draw:fill="solid" draw:fill-color="#ffffff"/>
      <style:paragraph-properties fo:margin-left="3.473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7" style:family="paragraph" style:parent-style-name="Standard" style:list-style-name="WWNum3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8" style:family="paragraph" style:parent-style-name="Standard" style:list-style-name="WWNum3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89" style:family="paragraph" style:parent-style-name="Standard" style:list-style-name="WWNum35">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0" style:family="paragraph" style:parent-style-name="Standard" style:list-style-name="WWNum35">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1" style:family="paragraph" style:parent-style-name="Standard" style:list-style-name="WWNum35">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2" style:family="paragraph" style:parent-style-name="Standard" style:list-style-name="WWNum35">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3" style:family="paragraph" style:parent-style-name="Standard" style:list-style-name="WWNum3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4" style:family="paragraph" style:parent-style-name="Standard" style:list-style-name="WWNum3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5" style:family="paragraph" style:parent-style-name="Standard" style:list-style-name="WWNum3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96" style:family="paragraph" style:parent-style-name="Standard">
      <loext:graphic-properties draw:fill="solid" draw:fill-color="#1d1f21"/>
      <style:paragraph-properties fo:margin-left="0.63cm" fo:margin-top="0cm" fo:margin-bottom="0cm" style:contextual-spacing="false" fo:line-height="100%" fo:text-align="justify" style:justify-single-word="false" fo:background-color="#1d1f21" fo:padding-left="0.494cm" fo:padding-right="0.247cm" fo:padding-top="0.247cm" fo:padding-bottom="0cm" fo:border-left="4.51pt solid #b3c746" fo:border-right="0.26pt solid #b3c746" fo:border-top="0.26pt solid #b3c746" fo:border-bottom="none" style:shadow="none" loext:word-spacing-minimum="75%" loext:word-spacing-maximum="133%"/>
      <style:text-properties officeooo:paragraph-rsid="0011aec9"/>
    </style:style>
    <style:style style:name="P97" style:family="paragraph" style:parent-style-name="Standard">
      <loext:graphic-properties draw:fill="solid" draw:fill-color="#1d1f21"/>
      <style:paragraph-properties fo:margin-left="0.63cm" fo:margin-top="0cm" fo:margin-bottom="0cm" style:contextual-spacing="false" fo:line-height="100%" fo:text-align="justify" style:justify-single-word="false" fo:background-color="#1d1f21" fo:padding-left="0.494cm" fo:padding-right="0.247cm" fo:padding-top="0cm" fo:padding-bottom="0cm" fo:border-left="4.51pt solid #b3c746" fo:border-right="0.26pt solid #b3c746" fo:border-top="none" fo:border-bottom="none" style:shadow="none" loext:word-spacing-minimum="75%" loext:word-spacing-maximum="133%"/>
      <style:text-properties officeooo:paragraph-rsid="0011aec9"/>
    </style:style>
    <style:style style:name="P98" style:family="paragraph" style:parent-style-name="Standard">
      <loext:graphic-properties draw:fill="solid" draw:fill-color="#1d1f21"/>
      <style:paragraph-properties fo:margin-left="0.63cm" fo:margin-top="0cm" fo:margin-bottom="0cm" style:contextual-spacing="false" fo:line-height="100%" fo:text-align="justify" style:justify-single-word="false" fo:background-color="#1d1f21" fo:padding-left="0.494cm" fo:padding-right="0.247cm" fo:padding-top="0cm" fo:padding-bottom="0.247cm" fo:border-left="4.51pt solid #b3c746" fo:border-right="0.26pt solid #b3c746" fo:border-top="none" fo:border-bottom="0.26pt solid #b3c746" style:shadow="none" loext:word-spacing-minimum="75%" loext:word-spacing-maximum="133%"/>
      <style:text-properties officeooo:paragraph-rsid="0011aec9"/>
    </style:style>
    <style:style style:name="P99" style:family="paragraph" style:parent-style-name="Standard" style:list-style-name="WWNum39">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00" style:family="paragraph" style:parent-style-name="Standard" style:list-style-name="WWNum39">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01" style:family="paragraph" style:parent-style-name="Standard" style:list-style-name="WWNum4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02" style:family="paragraph" style:parent-style-name="Standard">
      <loext:graphic-properties draw:fill="solid" draw:fill-color="#1d1f21"/>
      <style:paragraph-properties fo:margin-left="0.63cm" fo:margin-right="0.318cm" fo:margin-top="0cm" fo:margin-bottom="0cm" style:contextual-spacing="false" fo:line-height="100%" fo:text-align="justify" style:justify-single-word="false" fo:background-color="#1d1f21" fo:padding-left="0.494cm" fo:padding-right="0.247cm" fo:padding-top="0.247cm" fo:padding-bottom="0cm" fo:border-left="4.51pt solid #b3c746" fo:border-right="0.26pt solid #b3c746" fo:border-top="0.26pt solid #b3c746" fo:border-bottom="none" style:shadow="none" loext:word-spacing-minimum="75%" loext:word-spacing-maximum="133%"/>
      <style:text-properties officeooo:paragraph-rsid="0011aec9"/>
    </style:style>
    <style:style style:name="P103" style:family="paragraph" style:parent-style-name="Standard">
      <loext:graphic-properties draw:fill="solid" draw:fill-color="#1d1f21"/>
      <style:paragraph-properties fo:margin-left="0.63cm" fo:margin-right="0.318cm" fo:margin-top="0cm" fo:margin-bottom="0cm" style:contextual-spacing="false" fo:line-height="100%" fo:text-align="justify" style:justify-single-word="false" fo:background-color="#1d1f21" fo:padding-left="0.494cm" fo:padding-right="0.247cm" fo:padding-top="0cm" fo:padding-bottom="0cm" fo:border-left="4.51pt solid #b3c746" fo:border-right="0.26pt solid #b3c746" fo:border-top="none" fo:border-bottom="none" style:shadow="none" loext:word-spacing-minimum="75%" loext:word-spacing-maximum="133%"/>
      <style:text-properties officeooo:paragraph-rsid="0011aec9"/>
    </style:style>
    <style:style style:name="P104" style:family="paragraph" style:parent-style-name="Standard">
      <loext:graphic-properties draw:fill="solid" draw:fill-color="#1d1f21"/>
      <style:paragraph-properties fo:margin-left="0.63cm" fo:margin-right="0.318cm" fo:margin-top="0cm" fo:margin-bottom="0cm" style:contextual-spacing="false" fo:line-height="100%" fo:text-align="justify" style:justify-single-word="false" fo:background-color="#1d1f21" fo:padding-left="0.494cm" fo:padding-right="0.247cm" fo:padding-top="0cm" fo:padding-bottom="0.247cm" fo:border-left="4.51pt solid #b3c746" fo:border-right="0.26pt solid #b3c746" fo:border-top="none" fo:border-bottom="0.26pt solid #b3c746" style:shadow="none" loext:word-spacing-minimum="75%" loext:word-spacing-maximum="133%"/>
      <style:text-properties officeooo:paragraph-rsid="0011aec9"/>
    </style:style>
    <style:style style:name="P105" style:family="paragraph" style:parent-style-name="Standard">
      <loext:graphic-properties draw:fill="solid" draw:fill-color="#ffffff"/>
      <style:paragraph-properties fo:margin-top="0cm" fo:margin-bottom="0cm" style:contextual-spacing="false"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06" style:family="paragraph" style:parent-style-name="Standard">
      <loext:graphic-properties draw:fill="solid" draw:fill-color="#ffffff"/>
      <style:paragraph-properties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07" style:family="paragraph" style:parent-style-name="Standard" style:list-style-name="WWNum4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08" style:family="paragraph" style:parent-style-name="Standard" style:list-style-name="WWNum42">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09" style:family="paragraph" style:parent-style-name="Standard" style:list-style-name="WWNum43">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0" style:family="paragraph" style:parent-style-name="Standard" style:list-style-name="WWNum44">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1" style:family="paragraph" style:parent-style-name="Standard" style:list-style-name="WWNum4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2" style:family="paragraph" style:parent-style-name="Standard" style:list-style-name="WWNum4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3" style:family="paragraph" style:parent-style-name="Standard" style:list-style-name="WWNum4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4" style:family="paragraph" style:parent-style-name="Standard" style:list-style-name="WWNum48">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5" style:family="paragraph" style:parent-style-name="Standard" style:list-style-name="WWNum48">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6" style:family="paragraph" style:parent-style-name="Standard" style:list-style-name="WWNum48">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7" style:family="paragraph" style:parent-style-name="Standard" style:list-style-name="WWNum48">
      <loext:graphic-properties draw:fill="solid" draw:fill-color="#ffffff"/>
      <style:paragraph-properties fo:margin-left="3.579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18" style:family="paragraph" style:parent-style-name="Standard">
      <loext:graphic-properties draw:fill="solid" draw:fill-color="#ffffff"/>
      <style:paragraph-properties fo:margin-top="0cm" fo:margin-bottom="0.318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19" style:family="paragraph" style:parent-style-name="Standard" style:list-style-name="WWNum4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20" style:family="paragraph" style:parent-style-name="Standard" style:list-style-name="WWNum50">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21" style:family="paragraph" style:parent-style-name="Standard" style:list-style-name="WWNum50">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22" style:family="paragraph" style:parent-style-name="Standard" style:list-style-name="WWNum50">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23" style:family="paragraph" style:parent-style-name="Standard" style:list-style-name="WWNum50">
      <loext:graphic-properties draw:fill="solid" draw:fill-color="#ffffff"/>
      <style:paragraph-properties fo:margin-left="3.579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24" style:family="paragraph" style:parent-style-name="Standard" style:list-style-name="WWNum50">
      <loext:graphic-properties draw:fill="solid" draw:fill-color="#ffffff"/>
      <style:paragraph-properties fo:margin-left="3.473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25" style:family="paragraph" style:parent-style-name="Standard" style:list-style-name="WWNum51">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26" style:family="paragraph" style:parent-style-name="Standard" style:list-style-name="WWNum52">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27" style:family="paragraph" style:parent-style-name="Standard" style:list-style-name="WWNum53">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28" style:family="paragraph" style:parent-style-name="Standard" style:list-style-name="WWNum54">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29" style:family="paragraph" style:parent-style-name="Standard" style:list-style-name="WWNum55">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0" style:family="paragraph" style:parent-style-name="Standard" style:list-style-name="WWNum56">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1" style:family="paragraph" style:parent-style-name="Standard" style:list-style-name="WWNum57">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2" style:family="paragraph" style:parent-style-name="Standard">
      <loext:graphic-properties draw:fill="solid" draw:fill-color="#ffffff"/>
      <style:paragraph-properties fo:margin-top="0cm" fo:margin-bottom="0.318cm" style:contextual-spacing="false" fo:line-height="100%" fo:background-color="#ffffff"/>
      <style:text-properties officeooo:paragraph-rsid="0011aec9"/>
    </style:style>
    <style:style style:name="P133" style:family="paragraph" style:parent-style-name="Standard" style:list-style-name="WWNum58">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4" style:family="paragraph" style:parent-style-name="Standard" style:list-style-name="WWNum59">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5" style:family="paragraph" style:parent-style-name="Standard" style:list-style-name="WWNum60">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6" style:family="paragraph" style:parent-style-name="Standard" style:list-style-name="WWNum61">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7" style:family="paragraph" style:parent-style-name="Standard" style:list-style-name="WWNum62">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8" style:family="paragraph" style:parent-style-name="Standard" style:list-style-name="WWNum63">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39" style:family="paragraph" style:parent-style-name="Standard" style:list-style-name="WWNum64">
      <loext:graphic-properties draw:fill="solid" draw:fill-color="#ffffff"/>
      <style:paragraph-properties fo:margin-left="3.563cm" fo:margin-top="0cm" fo:margin-bottom="0cm" style:contextual-spacing="false" fo:line-height="100%" fo:text-indent="-0.635cm" style:auto-text-indent="false" fo:background-color="#ffffff"/>
      <style:text-properties officeooo:paragraph-rsid="0011aec9"/>
    </style:style>
    <style:style style:name="P140" style:family="paragraph" style:parent-style-name="Standard" style:list-style-name="WWNum64">
      <loext:graphic-properties draw:fill="solid" draw:fill-color="#ffffff"/>
      <style:paragraph-properties fo:margin-left="3.597cm" fo:margin-top="0cm" fo:margin-bottom="0cm" style:contextual-spacing="false" fo:line-height="100%" fo:text-indent="-0.635cm" style:auto-text-indent="false" fo:background-color="#ffffff"/>
      <style:text-properties officeooo:paragraph-rsid="0011aec9"/>
    </style:style>
    <style:style style:name="P141" style:family="paragraph" style:parent-style-name="Standard" style:list-style-name="WWNum64">
      <loext:graphic-properties draw:fill="solid" draw:fill-color="#ffffff"/>
      <style:paragraph-properties fo:margin-left="3.552cm" fo:margin-top="0cm" fo:margin-bottom="0.318cm" style:contextual-spacing="false" fo:line-height="100%" fo:text-indent="-0.635cm" style:auto-text-indent="false" fo:background-color="#ffffff"/>
      <style:text-properties officeooo:paragraph-rsid="0011aec9"/>
    </style:style>
    <style:style style:name="P142" style:family="paragraph" style:parent-style-name="Standard">
      <loext:graphic-properties draw:fill="solid" draw:fill-color="#ffffff"/>
      <style:paragraph-properties fo:margin-top="0.423cm" fo:margin-bottom="0.318cm" style:contextual-spacing="false"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43" style:family="paragraph" style:parent-style-name="Standard">
      <loext:graphic-properties draw:fill="solid" draw:fill-color="#ffffff"/>
      <style:paragraph-properties fo:margin-top="0cm" fo:margin-bottom="0.318cm" style:contextual-spacing="false"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44" style:family="paragraph" style:parent-style-name="Standard" style:list-style-name="WWNum65">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45" style:family="paragraph" style:parent-style-name="Standard" style:list-style-name="WWNum66">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46" style:family="paragraph" style:parent-style-name="Standard" style:list-style-name="WWNum67">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47" style:family="paragraph" style:parent-style-name="Standard" style:list-style-name="WWNum68">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48" style:family="paragraph" style:parent-style-name="Standard" style:list-style-name="WWNum69">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49" style:family="paragraph" style:parent-style-name="Standard" style:list-style-name="WWNum70">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50" style:family="paragraph" style:parent-style-name="Standard" style:list-style-name="WWNum71">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51" style:family="paragraph" style:parent-style-name="Standard" style:list-style-name="WWNum72">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52" style:family="paragraph" style:parent-style-name="Standard" style:list-style-name="WWNum73">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53" style:family="paragraph" style:parent-style-name="Standard" style:list-style-name="WWNum74">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54" style:family="paragraph" style:parent-style-name="Standard" style:list-style-name="WWNum74">
      <loext:graphic-properties draw:fill="solid" draw:fill-color="#ffffff"/>
      <style:paragraph-properties fo:margin-left="2.337cm" fo:margin-top="0cm" fo:margin-bottom="0.318cm" style:contextual-spacing="false" fo:line-height="100%" fo:text-indent="-0.635cm" style:auto-text-indent="false" fo:background-color="#ffffff"/>
      <style:text-properties officeooo:paragraph-rsid="0011aec9"/>
    </style:style>
    <style:style style:name="P155" style:family="paragraph" style:parent-style-name="Standard">
      <loext:graphic-properties draw:fill="solid" draw:fill-color="#ffffff"/>
      <style:paragraph-properties fo:margin-top="0cm" fo:margin-bottom="0.423cm" style:contextual-spacing="false"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56" style:family="paragraph" style:parent-style-name="Standard">
      <loext:graphic-properties draw:fill="solid" draw:fill-color="#1d1f21"/>
      <style:paragraph-properties fo:margin-left="0.63cm" fo:margin-top="0cm" fo:margin-bottom="0cm" style:contextual-spacing="false" fo:line-height="100%" fo:background-color="#1d1f21" fo:padding-left="0.494cm" fo:padding-right="0.247cm" fo:padding-top="0cm" fo:padding-bottom="0cm" fo:border-left="4.51pt solid #b3c746" fo:border-right="0.26pt solid #b3c746" fo:border-top="none" fo:border-bottom="none" style:shadow="none"/>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57" style:family="paragraph" style:parent-style-name="Standard" style:list-style-name="WWNum75">
      <loext:graphic-properties draw:fill="solid" draw:fill-color="#ffffff"/>
      <style:paragraph-properties fo:margin-left="2.644cm" fo:margin-top="0cm" fo:margin-bottom="0cm" style:contextual-spacing="false" fo:line-height="100%" fo:text-indent="-0.635cm" style:auto-text-indent="false" fo:background-color="#ffffff"/>
      <style:text-properties officeooo:paragraph-rsid="0011aec9"/>
    </style:style>
    <style:style style:name="P158" style:family="paragraph" style:parent-style-name="Standard" style:list-style-name="WWNum75">
      <loext:graphic-properties draw:fill="solid" draw:fill-color="#ffffff"/>
      <style:paragraph-properties fo:margin-left="2.644cm" fo:margin-top="0cm" fo:margin-bottom="0.318cm" style:contextual-spacing="false" fo:line-height="100%" fo:text-indent="-0.635cm" style:auto-text-indent="false" fo:background-color="#ffffff"/>
      <style:text-properties officeooo:paragraph-rsid="0011aec9"/>
    </style:style>
    <style:style style:name="P159" style:family="paragraph" style:parent-style-name="Standard" style:list-style-name="WWNum76">
      <loext:graphic-properties draw:fill="solid" draw:fill-color="#ffffff"/>
      <style:paragraph-properties fo:margin-left="3.563cm" fo:margin-top="0cm" fo:margin-bottom="0cm" style:contextual-spacing="false" fo:line-height="100%" fo:text-indent="-0.635cm" style:auto-text-indent="false" fo:background-color="#ffffff"/>
      <style:text-properties officeooo:paragraph-rsid="0011aec9"/>
    </style:style>
    <style:style style:name="P160" style:family="paragraph" style:parent-style-name="Standard" style:list-style-name="WWNum76">
      <loext:graphic-properties draw:fill="solid" draw:fill-color="#ffffff"/>
      <style:paragraph-properties fo:margin-left="3.597cm" fo:margin-top="0cm" fo:margin-bottom="0.318cm" style:contextual-spacing="false" fo:line-height="100%" fo:text-indent="-0.635cm" style:auto-text-indent="false" fo:background-color="#ffffff"/>
      <style:text-properties officeooo:paragraph-rsid="0011aec9"/>
    </style:style>
    <style:style style:name="P161" style:family="paragraph" style:parent-style-name="Standard" style:list-style-name="WWNum77">
      <loext:graphic-properties draw:fill="solid" draw:fill-color="#ffffff"/>
      <style:paragraph-properties fo:margin-left="2.644cm" fo:margin-top="0cm" fo:margin-bottom="0cm" style:contextual-spacing="false" fo:line-height="100%" fo:text-indent="-0.635cm" style:auto-text-indent="false" fo:background-color="#ffffff"/>
      <style:text-properties officeooo:paragraph-rsid="0011aec9"/>
    </style:style>
    <style:style style:name="P162" style:family="paragraph" style:parent-style-name="Standard" style:list-style-name="WWNum77">
      <loext:graphic-properties draw:fill="solid" draw:fill-color="#ffffff"/>
      <style:paragraph-properties fo:margin-left="2.644cm" fo:margin-top="0cm" fo:margin-bottom="0.318cm" style:contextual-spacing="false" fo:line-height="100%" fo:text-indent="-0.635cm" style:auto-text-indent="false" fo:background-color="#ffffff"/>
      <style:text-properties officeooo:paragraph-rsid="0011aec9"/>
    </style:style>
    <style:style style:name="P163" style:family="paragraph" style:parent-style-name="Standard" style:list-style-name="WWNum78">
      <loext:graphic-properties draw:fill="solid" draw:fill-color="#ffffff"/>
      <style:paragraph-properties fo:margin-left="3.563cm" fo:margin-top="0cm" fo:margin-bottom="0cm" style:contextual-spacing="false" fo:line-height="100%" fo:text-indent="-0.635cm" style:auto-text-indent="false" fo:background-color="#ffffff"/>
      <style:text-properties officeooo:paragraph-rsid="0011aec9"/>
    </style:style>
    <style:style style:name="P164" style:family="paragraph" style:parent-style-name="Standard" style:list-style-name="WWNum78">
      <loext:graphic-properties draw:fill="solid" draw:fill-color="#ffffff"/>
      <style:paragraph-properties fo:margin-left="3.597cm" fo:margin-top="0cm" fo:margin-bottom="0cm" style:contextual-spacing="false" fo:line-height="100%" fo:text-indent="-0.635cm" style:auto-text-indent="false" fo:background-color="#ffffff"/>
      <style:text-properties officeooo:paragraph-rsid="0011aec9"/>
    </style:style>
    <style:style style:name="P165" style:family="paragraph" style:parent-style-name="Standard" style:list-style-name="WWNum78">
      <loext:graphic-properties draw:fill="solid" draw:fill-color="#ffffff"/>
      <style:paragraph-properties fo:margin-left="3.552cm" fo:margin-top="0cm" fo:margin-bottom="0cm" style:contextual-spacing="false" fo:line-height="100%" fo:text-indent="-0.635cm" style:auto-text-indent="false" fo:background-color="#ffffff"/>
      <style:text-properties officeooo:paragraph-rsid="0011aec9"/>
    </style:style>
    <style:style style:name="P166" style:family="paragraph" style:parent-style-name="Standard" style:list-style-name="WWNum78">
      <loext:graphic-properties draw:fill="solid" draw:fill-color="#ffffff"/>
      <style:paragraph-properties fo:margin-left="3.597cm" fo:margin-top="0cm" fo:margin-bottom="0.318cm" style:contextual-spacing="false" fo:line-height="100%" fo:text-indent="-0.635cm" style:auto-text-indent="false" fo:background-color="#ffffff"/>
      <style:text-properties officeooo:paragraph-rsid="0011aec9"/>
    </style:style>
    <style:style style:name="P167" style:family="paragraph" style:parent-style-name="Standard" style:list-style-name="WWNum79">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68" style:family="paragraph" style:parent-style-name="Standard">
      <loext:graphic-properties draw:fill="solid" draw:fill-color="#ffffff"/>
      <style:paragraph-properties fo:margin-left="1.27cm" fo:margin-top="0cm" fo:margin-bottom="0.318cm" style:contextual-spacing="false"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69" style:family="paragraph" style:parent-style-name="Standard" style:list-style-name="WWNum80">
      <loext:graphic-properties draw:fill="solid" draw:fill-color="#ffffff"/>
      <style:paragraph-properties fo:margin-left="3.563cm" fo:margin-top="0cm" fo:margin-bottom="0cm" style:contextual-spacing="false" fo:line-height="100%" fo:text-indent="-0.635cm" style:auto-text-indent="false" fo:background-color="#ffffff"/>
      <style:text-properties officeooo:paragraph-rsid="0011aec9"/>
    </style:style>
    <style:style style:name="P170" style:family="paragraph" style:parent-style-name="Standard" style:list-style-name="WWNum80">
      <loext:graphic-properties draw:fill="solid" draw:fill-color="#ffffff"/>
      <style:paragraph-properties fo:margin-left="3.597cm" fo:margin-top="0cm" fo:margin-bottom="0.318cm" style:contextual-spacing="false" fo:line-height="100%" fo:text-indent="-0.635cm" style:auto-text-indent="false" fo:background-color="#ffffff"/>
      <style:text-properties officeooo:paragraph-rsid="0011aec9"/>
    </style:style>
    <style:style style:name="P171" style:family="paragraph" style:parent-style-name="Standard" style:list-style-name="WWNum81">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72" style:family="paragraph" style:parent-style-name="Standard" style:list-style-name="WWNum82">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73" style:family="paragraph" style:parent-style-name="Standard" style:list-style-name="WWNum83">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74" style:family="paragraph" style:parent-style-name="Standard" style:list-style-name="WWNum84">
      <loext:graphic-properties draw:fill="solid" draw:fill-color="#ffffff"/>
      <style:paragraph-properties fo:margin-left="3.563cm" fo:margin-top="0cm" fo:margin-bottom="0cm" style:contextual-spacing="false" fo:line-height="100%" fo:text-indent="-0.635cm" style:auto-text-indent="false" fo:background-color="#ffffff"/>
      <style:text-properties officeooo:paragraph-rsid="0011aec9"/>
    </style:style>
    <style:style style:name="P175" style:family="paragraph" style:parent-style-name="Standard" style:list-style-name="WWNum84">
      <loext:graphic-properties draw:fill="solid" draw:fill-color="#ffffff"/>
      <style:paragraph-properties fo:margin-left="3.597cm" fo:margin-top="0cm" fo:margin-bottom="0cm" style:contextual-spacing="false" fo:line-height="100%" fo:text-indent="-0.635cm" style:auto-text-indent="false" fo:background-color="#ffffff"/>
      <style:text-properties officeooo:paragraph-rsid="0011aec9"/>
    </style:style>
    <style:style style:name="P176" style:family="paragraph" style:parent-style-name="Standard" style:list-style-name="WWNum84">
      <loext:graphic-properties draw:fill="solid" draw:fill-color="#ffffff"/>
      <style:paragraph-properties fo:margin-left="3.552cm" fo:margin-top="0cm" fo:margin-bottom="0cm" style:contextual-spacing="false" fo:line-height="100%" fo:text-indent="-0.635cm" style:auto-text-indent="false" fo:background-color="#ffffff"/>
      <style:text-properties officeooo:paragraph-rsid="0011aec9"/>
    </style:style>
    <style:style style:name="P177" style:family="paragraph" style:parent-style-name="Standard" style:list-style-name="WWNum84">
      <loext:graphic-properties draw:fill="solid" draw:fill-color="#ffffff"/>
      <style:paragraph-properties fo:margin-left="3.597cm" fo:margin-top="0cm" fo:margin-bottom="0.318cm" style:contextual-spacing="false" fo:line-height="100%" fo:text-indent="-0.635cm" style:auto-text-indent="false" fo:background-color="#ffffff"/>
      <style:text-properties officeooo:paragraph-rsid="0011aec9"/>
    </style:style>
    <style:style style:name="P178" style:family="paragraph" style:parent-style-name="Standard">
      <loext:graphic-properties draw:fill="solid" draw:fill-color="#ffffff"/>
      <style:paragraph-properties fo:margin-left="1.27cm" fo:margin-top="0cm" fo:margin-bottom="0cm" style:contextual-spacing="false" fo:line-height="100%"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179" style:family="paragraph" style:parent-style-name="Standard" style:list-style-name="WWNum85">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180" style:family="paragraph" style:parent-style-name="Standard" style:list-style-name="WWNum86">
      <loext:graphic-properties draw:fill="solid" draw:fill-color="#ffffff"/>
      <style:paragraph-properties fo:margin-left="3.563cm" fo:margin-top="0cm" fo:margin-bottom="0cm" style:contextual-spacing="false" fo:line-height="100%" fo:text-indent="-0.635cm" style:auto-text-indent="false" fo:background-color="#ffffff"/>
      <style:text-properties officeooo:paragraph-rsid="0011aec9"/>
    </style:style>
    <style:style style:name="P181" style:family="paragraph" style:parent-style-name="Standard" style:list-style-name="WWNum86">
      <loext:graphic-properties draw:fill="solid" draw:fill-color="#ffffff"/>
      <style:paragraph-properties fo:margin-left="3.597cm" fo:margin-top="0cm" fo:margin-bottom="0cm" style:contextual-spacing="false" fo:line-height="100%" fo:text-indent="-0.635cm" style:auto-text-indent="false" fo:background-color="#ffffff"/>
      <style:text-properties officeooo:paragraph-rsid="0011aec9"/>
    </style:style>
    <style:style style:name="P182" style:family="paragraph" style:parent-style-name="Standard" style:list-style-name="WWNum86">
      <loext:graphic-properties draw:fill="solid" draw:fill-color="#ffffff"/>
      <style:paragraph-properties fo:margin-left="3.552cm" fo:margin-top="0cm" fo:margin-bottom="0cm" style:contextual-spacing="false" fo:line-height="100%" fo:text-indent="-0.635cm" style:auto-text-indent="false" fo:background-color="#ffffff"/>
      <style:text-properties officeooo:paragraph-rsid="0011aec9"/>
    </style:style>
    <style:style style:name="P183" style:family="paragraph" style:parent-style-name="Standard" style:list-style-name="WWNum86">
      <loext:graphic-properties draw:fill="solid" draw:fill-color="#ffffff"/>
      <style:paragraph-properties fo:margin-left="3.597cm" fo:margin-top="0cm" fo:margin-bottom="0.318cm" style:contextual-spacing="false" fo:line-height="100%" fo:text-indent="-0.635cm" style:auto-text-indent="false" fo:background-color="#ffffff"/>
      <style:text-properties officeooo:paragraph-rsid="0011aec9"/>
    </style:style>
    <style:style style:name="P184" style:family="paragraph" style:parent-style-name="Standard" style:list-style-name="WWNum87">
      <loext:graphic-properties draw:fill="solid" draw:fill-color="#ffffff"/>
      <style:paragraph-properties fo:margin-left="2.223cm" fo:margin-top="0cm" fo:margin-bottom="0cm" style:contextual-spacing="false" fo:line-height="100%" fo:text-indent="-0.635cm" style:auto-text-indent="false" fo:background-color="#ffffff"/>
      <style:text-properties officeooo:paragraph-rsid="0011aec9"/>
    </style:style>
    <style:style style:name="P185" style:family="paragraph" style:parent-style-name="Standard" style:list-style-name="WWNum88">
      <loext:graphic-properties draw:fill="solid" draw:fill-color="#ffffff"/>
      <style:paragraph-properties fo:margin-left="2.223cm" fo:margin-top="0cm" fo:margin-bottom="0cm" style:contextual-spacing="false" fo:line-height="100%" fo:text-indent="-0.635cm" style:auto-text-indent="false" fo:background-color="#ffffff"/>
      <style:text-properties officeooo:paragraph-rsid="0011aec9"/>
    </style:style>
    <style:style style:name="P186" style:family="paragraph" style:parent-style-name="Standard" style:list-style-name="WWNum89">
      <loext:graphic-properties draw:fill="solid" draw:fill-color="#ffffff"/>
      <style:paragraph-properties fo:margin-left="2.223cm" fo:margin-top="0cm" fo:margin-bottom="0cm" style:contextual-spacing="false" fo:line-height="100%" fo:text-indent="-0.635cm" style:auto-text-indent="false" fo:background-color="#ffffff"/>
      <style:text-properties officeooo:paragraph-rsid="0011aec9"/>
    </style:style>
    <style:style style:name="P187" style:family="paragraph" style:parent-style-name="Standard" style:list-style-name="WWNum90">
      <loext:graphic-properties draw:fill="solid" draw:fill-color="#ffffff"/>
      <style:paragraph-properties fo:margin-left="2.223cm" fo:margin-top="0cm" fo:margin-bottom="0cm" style:contextual-spacing="false" fo:line-height="100%" fo:text-indent="-0.635cm" style:auto-text-indent="false" fo:background-color="#ffffff"/>
      <style:text-properties officeooo:paragraph-rsid="0011aec9"/>
    </style:style>
    <style:style style:name="P188" style:family="paragraph" style:parent-style-name="Standard" style:list-style-name="WWNum91">
      <loext:graphic-properties draw:fill="solid" draw:fill-color="#ffffff"/>
      <style:paragraph-properties fo:margin-left="2.223cm" fo:margin-top="0cm" fo:margin-bottom="0cm" style:contextual-spacing="false" fo:line-height="100%" fo:text-indent="-0.635cm" style:auto-text-indent="false" fo:background-color="#ffffff"/>
      <style:text-properties officeooo:paragraph-rsid="0011aec9"/>
    </style:style>
    <style:style style:name="P189" style:family="paragraph" style:parent-style-name="Standard" style:list-style-name="WWNum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0" style:family="paragraph" style:parent-style-name="Standard" style:list-style-name="WWNum1">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1" style:family="paragraph" style:parent-style-name="Standard" style:list-style-name="WWNum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2" style:family="paragraph" style:parent-style-name="Standard" style:list-style-name="WWNum2">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3" style:family="paragraph" style:parent-style-name="Standard">
      <style:paragraph-properties fo:margin-top="0cm" fo:margin-bottom="0cm" style:contextual-spacing="false" fo:line-height="100%"/>
      <style:text-properties officeooo:paragraph-rsid="0011aec9"/>
    </style:style>
    <style:style style:name="P194" style:family="paragraph" style:parent-style-name="Standard" style:list-style-name="">
      <loext:graphic-properties draw:fill="solid" draw:fill-color="#ffffff"/>
      <style:paragraph-properties fo:margin-top="0cm" fo:margin-bottom="0.318cm" style:contextual-spacing="false" fo:line-height="100%" fo:text-align="justify" style:justify-single-word="false" fo:background-color="#ffffff" loext:word-spacing-minimum="75%" loext:word-spacing-maximum="133%"/>
      <style:text-properties officeooo:paragraph-rsid="0011aec9"/>
    </style:style>
    <style:style style:name="P195" style:family="paragraph" style:parent-style-name="Standard" style:list-style-name="WWNum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6" style:family="paragraph" style:parent-style-name="Standard" style:list-style-name="WWNum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7" style:family="paragraph" style:parent-style-name="Standard" style:list-style-name="WWNum9">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8" style:family="paragraph" style:parent-style-name="Standard" style:list-style-name="WWNum1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199" style:family="paragraph" style:parent-style-name="Standard" style:list-style-name="WWNum1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0" style:family="paragraph" style:parent-style-name="Standard" style:list-style-name="WWNum2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1" style:family="paragraph" style:parent-style-name="Standard" style:list-style-name="WWNum2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2" style:family="paragraph" style:parent-style-name="Standard" style:list-style-name="WWNum2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3" style:family="paragraph" style:parent-style-name="Standard" style:list-style-name="WWNum2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4" style:family="paragraph" style:parent-style-name="Standard" style:list-style-name="WWNum2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5" style:family="paragraph" style:parent-style-name="Standard" style:list-style-name="WWNum25">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6" style:family="paragraph" style:parent-style-name="Standard" style:list-style-name="WWNum2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7" style:family="paragraph" style:parent-style-name="Standard" style:list-style-name="WWNum2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8" style:family="paragraph" style:parent-style-name="Standard" style:list-style-name="WWNum27">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09" style:family="paragraph" style:parent-style-name="Standard" style:list-style-name="WWNum27">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0" style:family="paragraph" style:parent-style-name="Standard" style:list-style-name="WWNum2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1" style:family="paragraph" style:parent-style-name="Standard" style:list-style-name="WWNum2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2" style:family="paragraph" style:parent-style-name="Standard" style:list-style-name="WWNum3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3" style:family="paragraph" style:parent-style-name="Standard" style:list-style-name="WWNum3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4" style:family="paragraph" style:parent-style-name="Standard" style:list-style-name="WWNum3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5" style:family="paragraph" style:parent-style-name="Standard" style:list-style-name="WWNum3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6" style:family="paragraph" style:parent-style-name="Standard" style:list-style-name="WWNum4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7" style:family="paragraph" style:parent-style-name="Standard" style:list-style-name="WWNum4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8" style:family="paragraph" style:parent-style-name="Standard" style:list-style-name="WWNum4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19" style:family="paragraph" style:parent-style-name="Standard" style:list-style-name="WWNum4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0" style:family="paragraph" style:parent-style-name="Standard" style:list-style-name="WWNum5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1" style:family="paragraph" style:parent-style-name="Standard" style:list-style-name="WWNum5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2" style:family="paragraph" style:parent-style-name="Standard" style:list-style-name="WWNum5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3" style:family="paragraph" style:parent-style-name="Standard" style:list-style-name="WWNum5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4" style:family="paragraph" style:parent-style-name="Standard" style:list-style-name="WWNum5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5" style:family="paragraph" style:parent-style-name="Standard" style:list-style-name="WWNum5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6" style:family="paragraph" style:parent-style-name="Standard" style:list-style-name="WWNum5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7" style:family="paragraph" style:parent-style-name="Standard" style:list-style-name="WWNum57">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28" style:family="paragraph" style:parent-style-name="Standard" style:list-style-name="">
      <loext:graphic-properties draw:fill="solid" draw:fill-color="#ffffff"/>
      <style:paragraph-properties fo:line-height="100%" fo:text-align="justify" style:justify-single-word="false" fo:background-color="#ffffff" loext:word-spacing-minimum="75%" loext:word-spacing-maximum="133%"/>
      <style:text-properties officeooo:paragraph-rsid="0011aec9"/>
    </style:style>
    <style:style style:name="P229" style:family="paragraph" style:parent-style-name="Standard" style:list-style-name="WWNum5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30" style:family="paragraph" style:parent-style-name="Standard">
      <loext:graphic-properties draw:fill="solid" draw:fill-color="#1d1f21"/>
      <style:paragraph-properties fo:margin-left="0.63cm" fo:margin-top="0cm" fo:margin-bottom="0cm" style:contextual-spacing="false" fo:line-height="100%" fo:background-color="#1d1f21" fo:padding-left="0.494cm" fo:padding-right="0.247cm" fo:padding-top="0cm" fo:padding-bottom="0.247cm" fo:border-left="4.51pt solid #b3c746" fo:border-right="0.26pt solid #b3c746" fo:border-top="none" fo:border-bottom="0.26pt solid #b3c746" style:shadow="none"/>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231" style:family="paragraph" style:parent-style-name="Standard">
      <loext:graphic-properties draw:fill="solid" draw:fill-color="#ffffff"/>
      <style:paragraph-properties fo:margin-top="0cm" fo:margin-bottom="0.423cm" style:contextual-spacing="false" fo:line-height="100%" fo:background-color="#ffffff"/>
      <style:text-properties officeooo:paragraph-rsid="0011aec9"/>
    </style:style>
    <style:style style:name="P232" style:family="paragraph" style:parent-style-name="Standard" style:list-style-name="WWNum5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33" style:family="paragraph" style:parent-style-name="Standard" style:list-style-name="WWNum6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34" style:family="paragraph" style:parent-style-name="Standard" style:list-style-name="WWNum6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35" style:family="paragraph" style:parent-style-name="Standard" style:list-style-name="WWNum62">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36" style:family="paragraph" style:parent-style-name="Standard" style:list-style-name="WWNum62">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37" style:family="paragraph" style:parent-style-name="Standard">
      <loext:graphic-properties draw:fill="solid" draw:fill-color="#ffffff"/>
      <style:paragraph-properties fo:margin-left="2.54cm" fo:margin-top="0cm" fo:margin-bottom="0.318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238" style:family="paragraph" style:parent-style-name="Standard">
      <loext:graphic-properties draw:fill="solid" draw:fill-color="#ffffff"/>
      <style:paragraph-properties fo:margin-left="1.27cm" fo:margin-top="0cm" fo:margin-bottom="0cm" style:contextual-spacing="false" fo:line-height="100%" fo:text-align="justify" style:justify-single-word="false" fo:background-color="#ffffff" loext:word-spacing-minimum="75%" loext:word-spacing-maximum="133%"/>
      <style:text-properties officeooo:paragraph-rsid="0011aec9"/>
    </style:style>
    <style:style style:name="P239" style:family="paragraph" style:parent-style-name="Standard">
      <loext:graphic-properties draw:fill="solid" draw:fill-color="#ffffff"/>
      <style:paragraph-properties fo:margin-left="1.27cm" fo:margin-top="0cm" fo:margin-bottom="0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240" style:family="paragraph" style:parent-style-name="Standard" style:list-style-name="WWNum6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1" style:family="paragraph" style:parent-style-name="Standard" style:list-style-name="WWNum6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2" style:family="paragraph" style:parent-style-name="Standard" style:list-style-name="WWNum64">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3" style:family="paragraph" style:parent-style-name="Standard" style:list-style-name="WWNum6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4" style:family="paragraph" style:parent-style-name="Standard" style:list-style-name="WWNum66">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5" style:family="paragraph" style:parent-style-name="Standard" style:list-style-name="WWNum66">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6" style:family="paragraph" style:parent-style-name="Standard" style:list-style-name="WWNum6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7" style:family="paragraph" style:parent-style-name="Standard" style:list-style-name="WWNum6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8" style:family="paragraph" style:parent-style-name="Standard" style:list-style-name="WWNum69">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49" style:family="paragraph" style:parent-style-name="Standard" style:list-style-name="WWNum70">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0" style:family="paragraph" style:parent-style-name="Standard" style:list-style-name="WWNum7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1" style:family="paragraph" style:parent-style-name="Standard" style:list-style-name="WWNum7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2" style:family="paragraph" style:parent-style-name="Standard" style:list-style-name="WWNum7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3" style:family="paragraph" style:parent-style-name="Standard" style:list-style-name="WWNum7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4" style:family="paragraph" style:parent-style-name="Standard" style:list-style-name="WWNum7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5" style:family="paragraph" style:parent-style-name="Standard" style:list-style-name="WWNum7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6" style:family="paragraph" style:parent-style-name="Standard" style:list-style-name="WWNum7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7" style:family="paragraph" style:parent-style-name="Standard" style:list-style-name="WWNum7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8" style:family="paragraph" style:parent-style-name="Standard" style:list-style-name="WWNum7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59" style:family="paragraph" style:parent-style-name="Standard" style:list-style-name="WWNum8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0" style:family="paragraph" style:parent-style-name="Standard">
      <loext:graphic-properties draw:fill="solid" draw:fill-color="#ffffff"/>
      <style:paragraph-properties fo:margin-left="0.635cm" fo:margin-top="0cm" fo:margin-bottom="0.318cm" style:contextual-spacing="false" fo:line-height="100%" fo:text-align="justify" style:justify-single-word="false" fo:background-color="#ffffff" loext:word-spacing-minimum="75%" loext:word-spacing-maximum="133%"/>
      <style:text-properties officeooo:paragraph-rsid="0011aec9"/>
    </style:style>
    <style:style style:name="P261" style:family="paragraph" style:parent-style-name="Standard" style:list-style-name="WWNum8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2" style:family="paragraph" style:parent-style-name="Standard" style:list-style-name="WWNum8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3" style:family="paragraph" style:parent-style-name="Standard" style:list-style-name="WWNum8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4" style:family="paragraph" style:parent-style-name="Standard" style:list-style-name="WWNum8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5" style:family="paragraph" style:parent-style-name="Standard" style:list-style-name="WWNum84">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6" style:family="paragraph" style:parent-style-name="Standard" style:list-style-name="WWNum85">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7" style:family="paragraph" style:parent-style-name="Standard" style:list-style-name="WWNum85">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8" style:family="paragraph" style:parent-style-name="Standard" style:list-style-name="WWNum85">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69" style:family="paragraph" style:parent-style-name="Standard" style:list-style-name="WWNum85">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0" style:family="paragraph" style:parent-style-name="Standard" style:list-style-name="WWNum8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1" style:family="paragraph" style:parent-style-name="Standard" style:list-style-name="WWNum8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2" style:family="paragraph" style:parent-style-name="Standard" style:list-style-name="WWNum87">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3" style:family="paragraph" style:parent-style-name="Standard" style:list-style-name="WWNum87">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4" style:family="paragraph" style:parent-style-name="Standard" style:list-style-name="WWNum87">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5" style:family="paragraph" style:parent-style-name="Standard" style:list-style-name="WWNum8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6" style:family="paragraph" style:parent-style-name="Standard" style:list-style-name="WWNum8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7" style:family="paragraph" style:parent-style-name="Standard" style:list-style-name="WWNum9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8" style:family="paragraph" style:parent-style-name="Standard" style:list-style-name="WWNum9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79" style:family="paragraph" style:parent-style-name="Standard" style:list-style-name="WWNum9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0" style:family="paragraph" style:parent-style-name="Standard" style:list-style-name="WWNum9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1" style:family="paragraph" style:parent-style-name="Standard" style:list-style-name="WWNum9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2" style:family="paragraph" style:parent-style-name="Standard" style:list-style-name="WWNum9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3" style:family="paragraph" style:parent-style-name="Standard" style:list-style-name="WWNum96">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4" style:family="paragraph" style:parent-style-name="Standard" style:list-style-name="WWNum96">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5" style:family="paragraph" style:parent-style-name="Standard" style:list-style-name="WWNum9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6" style:family="paragraph" style:parent-style-name="Standard" style:list-style-name="WWNum97">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87" style:family="paragraph" style:parent-style-name="Standard">
      <loext:graphic-properties draw:fill="solid" draw:fill-color="#1d1f21"/>
      <style:paragraph-properties fo:margin-left="0.63cm" fo:margin-right="0.318cm" fo:margin-top="0cm" fo:margin-bottom="0cm" style:contextual-spacing="false" fo:line-height="100%" fo:background-color="#1d1f21" fo:padding-left="0.494cm" fo:padding-right="0.247cm" fo:padding-top="0cm" fo:padding-bottom="0cm" fo:border-left="4.51pt solid #b3c746" fo:border-right="0.26pt solid #b3c746" fo:border-top="none" fo:border-bottom="none" style:shadow="none"/>
      <style:text-properties officeooo:paragraph-rsid="0011aec9"/>
    </style:style>
    <style:style style:name="P288" style:family="paragraph" style:parent-style-name="Standard">
      <loext:graphic-properties draw:fill="solid" draw:fill-color="#1d1f21"/>
      <style:paragraph-properties fo:margin-left="0.63cm" fo:margin-right="0.318cm" fo:margin-top="0cm" fo:margin-bottom="0cm" style:contextual-spacing="false" fo:line-height="100%" fo:background-color="#1d1f21" fo:padding-left="0.494cm" fo:padding-right="0.247cm" fo:padding-top="0cm" fo:padding-bottom="0.247cm" fo:border-left="4.51pt solid #b3c746" fo:border-right="0.26pt solid #b3c746" fo:border-top="none" fo:border-bottom="0.26pt solid #b3c746" style:shadow="none"/>
      <style:text-properties officeooo:paragraph-rsid="0011aec9"/>
    </style:style>
    <style:style style:name="P289" style:family="paragraph" style:parent-style-name="Standard" style:list-style-name="WWNum98">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29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loext:word-spacing-minimum="75%" loext:word-spacing-maximum="133%"/>
      <style:text-properties officeooo:paragraph-rsid="0011aec9"/>
    </style:style>
    <style:style style:name="P291" style:family="paragraph" style:parent-style-name="Standard" style:list-style-name="WWNum9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2" style:family="paragraph" style:parent-style-name="Standard" style:list-style-name="WWNum10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3" style:family="paragraph" style:parent-style-name="Standard" style:list-style-name="WWNum10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4" style:family="paragraph" style:parent-style-name="Standard" style:list-style-name="WWNum10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5" style:family="paragraph" style:parent-style-name="Standard" style:list-style-name="WWNum10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6" style:family="paragraph" style:parent-style-name="Standard" style:list-style-name="WWNum10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7" style:family="paragraph" style:parent-style-name="Standard" style:list-style-name="WWNum104">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8" style:family="paragraph" style:parent-style-name="Standard" style:list-style-name="WWNum10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299" style:family="paragraph" style:parent-style-name="Standard" style:list-style-name="WWNum106">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300" style:family="paragraph" style:parent-style-name="Standard" style:list-style-name="WWNum107">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301" style:family="paragraph" style:parent-style-name="Standard" style:list-style-name="WWNum108">
      <loext:graphic-properties draw:fill="solid" draw:fill-color="#ffffff"/>
      <style:paragraph-properties fo:margin-left="2.337cm" fo:margin-top="0cm" fo:margin-bottom="0cm" style:contextual-spacing="false" fo:line-height="100%" fo:text-indent="-0.635cm" style:auto-text-indent="false" fo:background-color="#ffffff"/>
      <style:text-properties officeooo:paragraph-rsid="0011aec9"/>
    </style:style>
    <style:style style:name="P302" style:family="paragraph" style:parent-style-name="Standard" style:list-style-name="WWNum10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3" style:family="paragraph" style:parent-style-name="Standard" style:list-style-name="WWNum11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4" style:family="paragraph" style:parent-style-name="Standard" style:list-style-name="WWNum11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5" style:family="paragraph" style:parent-style-name="Standard" style:list-style-name="WWNum11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6" style:family="paragraph" style:parent-style-name="Standard" style:list-style-name="WWNum11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7" style:family="paragraph" style:parent-style-name="Standard" style:list-style-name="WWNum11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8" style:family="paragraph" style:parent-style-name="Standard" style:list-style-name="WWNum115">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09" style:family="paragraph" style:parent-style-name="Standard" style:list-style-name="WWNum115">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0" style:family="paragraph" style:parent-style-name="Standard" style:list-style-name="WWNum11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1" style:family="paragraph" style:parent-style-name="Standard" style:list-style-name="WWNum11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2" style:family="paragraph" style:parent-style-name="Standard" style:list-style-name="WWNum11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3" style:family="paragraph" style:parent-style-name="Standard" style:list-style-name="WWNum119">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4" style:family="paragraph" style:parent-style-name="Standard" style:list-style-name="WWNum119">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5" style:family="paragraph" style:parent-style-name="Standard" style:list-style-name="WWNum119">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6" style:family="paragraph" style:parent-style-name="Standard" style:list-style-name="WWNum120">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7" style:family="paragraph" style:parent-style-name="Standard" style:list-style-name="WWNum120">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8" style:family="paragraph" style:parent-style-name="Standard" style:list-style-name="WWNum121">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19" style:family="paragraph" style:parent-style-name="Standard" style:list-style-name="WWNum121">
      <loext:graphic-properties draw:fill="solid" draw:fill-color="#ffffff"/>
      <style:paragraph-properties fo:margin-left="3.579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0" style:family="paragraph" style:parent-style-name="Standard" style:list-style-name="WWNum122">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1" style:family="paragraph" style:parent-style-name="Standard" style:list-style-name="WWNum122">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2" style:family="paragraph" style:parent-style-name="Standard" style:list-style-name="WWNum123">
      <loext:graphic-properties draw:fill="solid" draw:fill-color="#ffffff"/>
      <style:paragraph-properties fo:margin-left="6.14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3" style:family="paragraph" style:parent-style-name="Standard" style:list-style-name="WWNum123">
      <loext:graphic-properties draw:fill="solid" draw:fill-color="#ffffff"/>
      <style:paragraph-properties fo:margin-left="6.14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4" style:family="paragraph" style:parent-style-name="Standard" style:list-style-name="WWNum124">
      <loext:graphic-properties draw:fill="solid" draw:fill-color="#ffffff"/>
      <style:paragraph-properties fo:margin-left="3.47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5" style:family="paragraph" style:parent-style-name="Standard" style:list-style-name="WWNum12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6" style:family="paragraph" style:parent-style-name="Standard" style:list-style-name="WWNum12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7" style:family="paragraph" style:parent-style-name="Standard" style:list-style-name="WWNum12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8" style:family="paragraph" style:parent-style-name="Standard" style:list-style-name="WWNum128">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29" style:family="paragraph" style:parent-style-name="Standard" style:list-style-name="WWNum129">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0" style:family="paragraph" style:parent-style-name="Standard" style:list-style-name="WWNum130">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1" style:family="paragraph" style:parent-style-name="Standard" style:list-style-name="WWNum130">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2" style:family="paragraph" style:parent-style-name="Standard" style:list-style-name="WWNum13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3" style:family="paragraph" style:parent-style-name="Standard" style:list-style-name="WWNum131">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4" style:family="paragraph" style:parent-style-name="Standard" style:list-style-name="">
      <loext:graphic-properties draw:fill="solid" draw:fill-color="#ffffff"/>
      <style:paragraph-properties fo:margin-top="0cm" fo:margin-bottom="0cm" style:contextual-spacing="false" fo:line-height="100%" fo:text-align="center" style:justify-single-word="false" fo:background-color="#ffffff"/>
      <style:text-properties officeooo:paragraph-rsid="0011aec9"/>
    </style:style>
    <style:style style:name="P335" style:family="paragraph" style:parent-style-name="Standard" style:list-style-name="">
      <loext:graphic-properties draw:fill="solid" draw:fill-color="#ffffff"/>
      <style:paragraph-properties fo:margin-top="0cm" fo:margin-bottom="0cm" style:contextual-spacing="false" fo:line-height="100%" fo:text-align="center" style:justify-single-word="false" fo:background-color="#ffffff"/>
      <style:text-properties fo:color="#242a42" loext:opacity="100%" style:font-name="Arial" fo:font-size="16pt" fo:font-weight="bold" officeooo:paragraph-rsid="0011aec9" style:letter-kerning="true" style:font-name-asian="Times New Roman" style:font-size-asian="16pt" style:language-asian="pt" style:country-asian="BR" style:font-weight-asian="bold" style:font-name-complex="Arial1" style:font-size-complex="16pt" style:font-weight-complex="bold"/>
    </style:style>
    <style:style style:name="P336" style:family="paragraph" style:parent-style-name="Standard" style:list-style-name="WWNum2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7" style:family="paragraph" style:parent-style-name="Standard" style:list-style-name="WWNum26">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8" style:family="paragraph" style:parent-style-name="Standard" style:list-style-name="WWNum26">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39" style:family="paragraph" style:parent-style-name="Standard" style:list-style-name="WWNum26">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0" style:family="paragraph" style:parent-style-name="Standard" style:list-style-name="WWNum2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1" style:family="paragraph" style:parent-style-name="Standard" style:list-style-name="WWNum32">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2" style:family="paragraph" style:parent-style-name="Standard" style:list-style-name="WWNum32">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3" style:family="paragraph" style:parent-style-name="Standard">
      <loext:graphic-properties draw:fill="solid" draw:fill-color="#1d1f21"/>
      <style:paragraph-properties fo:margin-left="0.63cm" fo:margin-top="0cm" fo:margin-bottom="0cm" style:contextual-spacing="false" fo:line-height="100%" fo:background-color="#1d1f21" fo:padding-left="0cm" fo:padding-right="0.247cm" fo:padding-top="0.247cm" fo:padding-bottom="0cm" fo:border-left="4.51pt solid #b3c746" fo:border-right="0.26pt solid #b3c746" fo:border-top="0.26pt solid #b3c746" fo:border-bottom="none" style:shadow="none"/>
      <style:text-properties officeooo:paragraph-rsid="0011aec9"/>
    </style:style>
    <style:style style:name="P344" style:family="paragraph" style:parent-style-name="Standard">
      <loext:graphic-properties draw:fill="solid" draw:fill-color="#1d1f21"/>
      <style:paragraph-properties fo:margin-left="0.63cm" fo:margin-top="0cm" fo:margin-bottom="0cm" style:contextual-spacing="false" fo:line-height="100%" fo:background-color="#1d1f21" fo:padding-left="0cm" fo:padding-right="0.247cm" fo:padding-top="0cm" fo:padding-bottom="0cm" fo:border-left="4.51pt solid #b3c746" fo:border-right="0.26pt solid #b3c746" fo:border-top="none" fo:border-bottom="none" style:shadow="none"/>
      <style:text-properties officeooo:paragraph-rsid="0011aec9"/>
    </style:style>
    <style:style style:name="P345" style:family="paragraph" style:parent-style-name="Standard">
      <loext:graphic-properties draw:fill="solid" draw:fill-color="#1d1f21"/>
      <style:paragraph-properties fo:margin-left="0.63cm" fo:margin-top="0cm" fo:margin-bottom="0cm" style:contextual-spacing="false" fo:line-height="100%" fo:background-color="#1d1f21" fo:padding-left="0cm" fo:padding-right="0.247cm" fo:padding-top="0cm" fo:padding-bottom="0.247cm" fo:border-left="4.51pt solid #b3c746" fo:border-right="0.26pt solid #b3c746" fo:border-top="none" fo:border-bottom="0.26pt solid #b3c746" style:shadow="none"/>
      <style:text-properties officeooo:paragraph-rsid="0011aec9"/>
    </style:style>
    <style:style style:name="P346" style:family="paragraph" style:parent-style-name="Standard" style:list-style-name="WWNum43">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7" style:family="paragraph" style:parent-style-name="Standard" style:list-style-name="WWNum43">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8" style:family="paragraph" style:parent-style-name="Standard" style:list-style-name="WWNum5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49" style:family="paragraph" style:parent-style-name="Standard" style:list-style-name="WWNum54">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0" style:family="paragraph" style:parent-style-name="Standard" style:list-style-name="WWNum5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1" style:family="paragraph" style:parent-style-name="Standard" style:list-style-name="WWNum57">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2" style:family="paragraph" style:parent-style-name="Standard" style:list-style-name="WWNum59">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3" style:family="paragraph" style:parent-style-name="Standard" style:list-style-name="WWNum59">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4" style:family="paragraph" style:parent-style-name="Standard" style:list-style-name="WWNum59">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5" style:family="paragraph" style:parent-style-name="Standard" style:list-style-name="WWNum59">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6" style:family="paragraph" style:parent-style-name="Standard" style:list-style-name="WWNum6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7" style:family="paragraph" style:parent-style-name="Standard" style:list-style-name="WWNum6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8" style:family="paragraph" style:parent-style-name="Standard" style:list-style-name="WWNum65">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59" style:family="paragraph" style:parent-style-name="Standard" style:list-style-name="WWNum65">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0" style:family="paragraph" style:parent-style-name="Standard" style:list-style-name="WWNum65">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1" style:family="paragraph" style:parent-style-name="Standard" style:list-style-name="WWNum65">
      <loext:graphic-properties draw:fill="solid" draw:fill-color="#ffffff"/>
      <style:paragraph-properties fo:margin-left="3.579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2" style:family="paragraph" style:parent-style-name="Standard" style:list-style-name="WWNum6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3" style:family="paragraph" style:parent-style-name="Standard" style:list-style-name="WWNum67">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4" style:family="paragraph" style:parent-style-name="Standard" style:list-style-name="WWNum67">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5" style:family="paragraph" style:parent-style-name="Standard" style:list-style-name="WWNum67">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6" style:family="paragraph" style:parent-style-name="Standard" style:list-style-name="WWNum67">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67" style:family="paragraph" style:parent-style-name="Standard">
      <loext:graphic-properties draw:fill="solid" draw:fill-color="#1d1f21"/>
      <style:paragraph-properties fo:margin-left="0.63cm" fo:margin-right="0.318cm" fo:margin-top="0cm" fo:margin-bottom="0.423cm" style:contextual-spacing="false" fo:line-height="100%" fo:background-color="#1d1f21" fo:padding-left="0.494cm" fo:padding-right="0.247cm" fo:padding-top="0cm" fo:padding-bottom="0.247cm" fo:border-left="4.51pt solid #b3c746" fo:border-right="0.26pt solid #b3c746" fo:border-top="none" fo:border-bottom="0.26pt solid #b3c746" style:shadow="none"/>
      <style:text-properties officeooo:paragraph-rsid="0011aec9"/>
    </style:style>
    <style:style style:name="P368" style:family="paragraph" style:parent-style-name="Standard" style:list-style-name="WWNum68">
      <loext:graphic-properties draw:fill="solid" draw:fill-color="#ffffff"/>
      <style:paragraph-properties fo:margin-left="3.579cm" fo:margin-top="0cm" fo:margin-bottom="0cm" style:contextual-spacing="false" fo:line-height="100%" fo:text-indent="-0.635cm" style:auto-text-indent="false" fo:background-color="#ffffff"/>
      <style:text-properties officeooo:paragraph-rsid="0011aec9"/>
    </style:style>
    <style:style style:name="P369" style:family="paragraph" style:parent-style-name="Standard">
      <loext:graphic-properties draw:fill="solid" draw:fill-color="#ffffff"/>
      <style:paragraph-properties fo:margin-left="1.27cm" fo:margin-top="0cm" fo:margin-bottom="0.318cm" style:contextual-spacing="false" fo:line-height="100%" fo:background-color="#ffffff"/>
      <style:text-properties officeooo:paragraph-rsid="0011aec9"/>
    </style:style>
    <style:style style:name="P370" style:family="paragraph" style:parent-style-name="Standard" style:list-style-name="WWNum69">
      <loext:graphic-properties draw:fill="solid" draw:fill-color="#ffffff"/>
      <style:paragraph-properties fo:margin-left="3.175cm" fo:margin-top="0cm" fo:margin-bottom="0cm" style:contextual-spacing="false" fo:line-height="100%" fo:text-indent="-0.635cm" style:auto-text-indent="false" fo:background-color="#ffffff"/>
      <style:text-properties officeooo:paragraph-rsid="0011aec9"/>
    </style:style>
    <style:style style:name="P371" style:family="paragraph" style:parent-style-name="Standard" style:list-style-name="WWNum7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2" style:family="paragraph" style:parent-style-name="Standard" style:list-style-name="WWNum71">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3" style:family="paragraph" style:parent-style-name="Standard" style:list-style-name="WWNum71">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4" style:family="paragraph" style:parent-style-name="Standard" style:list-style-name="WWNum71">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5" style:family="paragraph" style:parent-style-name="Standard" style:list-style-name="WWNum71">
      <loext:graphic-properties draw:fill="solid" draw:fill-color="#ffffff"/>
      <style:paragraph-properties fo:margin-left="3.579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6" style:family="paragraph" style:parent-style-name="Standard" style:list-style-name="WWNum74">
      <loext:graphic-properties draw:fill="solid" draw:fill-color="#ffffff"/>
      <style:paragraph-properties fo:margin-left="3.60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7" style:family="paragraph" style:parent-style-name="Standard" style:list-style-name="WWNum75">
      <loext:graphic-properties draw:fill="solid" draw:fill-color="#ffffff"/>
      <style:paragraph-properties fo:margin-left="4.83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8" style:family="paragraph" style:parent-style-name="Standard" style:list-style-name="WWNum76">
      <loext:graphic-properties draw:fill="solid" draw:fill-color="#ffffff"/>
      <style:paragraph-properties fo:margin-left="3.60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79" style:family="paragraph" style:parent-style-name="Standard" style:list-style-name="WWNum77">
      <loext:graphic-properties draw:fill="solid" draw:fill-color="#ffffff"/>
      <style:paragraph-properties fo:margin-left="4.83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0" style:family="paragraph" style:parent-style-name="Standard" style:list-style-name="WWNum77">
      <loext:graphic-properties draw:fill="solid" draw:fill-color="#ffffff"/>
      <style:paragraph-properties fo:margin-left="4.86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1" style:family="paragraph" style:parent-style-name="Standard" style:list-style-name="WWNum77">
      <loext:graphic-properties draw:fill="solid" draw:fill-color="#ffffff"/>
      <style:paragraph-properties fo:margin-left="4.82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2" style:family="paragraph" style:parent-style-name="Standard" style:list-style-name="WWNum78">
      <loext:graphic-properties draw:fill="solid" draw:fill-color="#ffffff"/>
      <style:paragraph-properties fo:margin-left="3.60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3"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officeooo:paragraph-rsid="0011aec9"/>
    </style:style>
    <style:style style:name="P384" style:family="paragraph" style:parent-style-name="Standard" style:list-style-name="WWNum8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5" style:family="paragraph" style:parent-style-name="Standard" style:list-style-name="WWNum84">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6" style:family="paragraph" style:parent-style-name="Standard" style:list-style-name="WWNum84">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7" style:family="paragraph" style:parent-style-name="Standard" style:list-style-name="WWNum85">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8" style:family="paragraph" style:parent-style-name="Standard" style:list-style-name="WWNum85">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89" style:family="paragraph" style:parent-style-name="Standard" style:list-style-name="WWNum87">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0" style:family="paragraph" style:parent-style-name="Standard" style:list-style-name="WWNum89">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1" style:family="paragraph" style:parent-style-name="Standard" style:list-style-name="WWNum91">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2" style:family="paragraph" style:parent-style-name="Standard" style:list-style-name="WWNum91">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3" style:family="paragraph" style:parent-style-name="Standard" style:list-style-name="WWNum91">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4" style:family="paragraph" style:parent-style-name="Standard" style:list-style-name="WWNum93">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5" style:family="paragraph" style:parent-style-name="Standard" style:list-style-name="WWNum93">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6" style:family="paragraph" style:parent-style-name="Standard" style:list-style-name="WWNum93">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7" style:family="paragraph" style:parent-style-name="Standard" style:list-style-name="WWNum94">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8" style:family="paragraph" style:parent-style-name="Standard" style:list-style-name="WWNum94">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399" style:family="paragraph" style:parent-style-name="Standard" style:list-style-name="WWNum95">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0" style:family="paragraph" style:parent-style-name="Standard" style:list-style-name="WWNum9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1" style:family="paragraph" style:parent-style-name="Standard" style:list-style-name="WWNum96">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loext:word-spacing-minimum="75%" loext:word-spacing-maximum="133%"/>
      <style:text-properties fo:color="#000000" loext:opacity="100%" style:font-name="Lato 2" fo:font-size="15pt" officeooo:paragraph-rsid="0011aec9" style:letter-kerning="false" fo:background-color="#ffffff" style:font-name-asian="Times New Roman" style:font-size-asian="15pt" style:language-asian="pt" style:country-asian="BR" style:font-name-complex="Arial1" style:font-size-complex="15pt"/>
    </style:style>
    <style:style style:name="P403" style:family="paragraph" style:parent-style-name="Standard" style:list-style-name="WWNum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4" style:family="paragraph" style:parent-style-name="Standard" style:list-style-name="WWNum1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5" style:family="paragraph" style:parent-style-name="Standard" style:list-style-name="WWNum1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6" style:family="paragraph" style:parent-style-name="Standard" style:list-style-name="WWNum14">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7" style:family="paragraph" style:parent-style-name="Standard" style:list-style-name="WWNum14">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8" style:family="paragraph" style:parent-style-name="Standard" style:list-style-name="WWNum14">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09" style:family="paragraph" style:parent-style-name="Standard" style:list-style-name="WWNum16">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0" style:family="paragraph" style:parent-style-name="Standard" style:list-style-name="WWNum16">
      <loext:graphic-properties draw:fill="solid" draw:fill-color="#ffffff"/>
      <style:paragraph-properties fo:margin-left="3.579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1" style:family="paragraph" style:parent-style-name="Standard" style:list-style-name="WWNum16">
      <loext:graphic-properties draw:fill="solid" draw:fill-color="#ffffff"/>
      <style:paragraph-properties fo:margin-left="3.47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2" style:family="paragraph" style:parent-style-name="Standard" style:list-style-name="WWNum16">
      <loext:graphic-properties draw:fill="solid" draw:fill-color="#ffffff"/>
      <style:paragraph-properties fo:margin-left="3.57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3" style:family="paragraph" style:parent-style-name="Standard" style:list-style-name="WWNum16">
      <loext:graphic-properties draw:fill="solid" draw:fill-color="#ffffff"/>
      <style:paragraph-properties fo:margin-left="3.59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4" style:family="paragraph" style:parent-style-name="Standard" style:list-style-name="WWNum16">
      <loext:graphic-properties draw:fill="solid" draw:fill-color="#ffffff"/>
      <style:paragraph-properties fo:margin-left="3.42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5" style:family="paragraph" style:parent-style-name="Standard" style:list-style-name="WWNum2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6" style:family="paragraph" style:parent-style-name="Standard">
      <loext:graphic-properties draw:fill="solid" draw:fill-color="#1d1f21"/>
      <style:paragraph-properties fo:margin-left="0.63cm" fo:margin-right="0.318cm" fo:margin-top="0cm" fo:margin-bottom="0cm" style:contextual-spacing="false" fo:line-height="100%" fo:background-color="#1d1f21" fo:padding-left="0.494cm" fo:padding-right="0.247cm" fo:padding-top="0cm" fo:padding-bottom="0cm" fo:border-left="4.51pt solid #b3c746" fo:border-right="0.26pt solid #b3c746" fo:border-top="none" fo:border-bottom="none" style:shadow="none"/>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417" style:family="paragraph" style:parent-style-name="Standard" style:list-style-name="WWNum3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8" style:family="paragraph" style:parent-style-name="Standard" style:list-style-name="WWNum34">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19" style:family="paragraph" style:parent-style-name="Standard" style:list-style-name="WWNum35">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0" style:family="paragraph" style:parent-style-name="Standard" style:list-style-name="WWNum35">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1" style:family="paragraph" style:parent-style-name="Standard" style:list-style-name="WWNum36">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2" style:family="paragraph" style:parent-style-name="Standard" style:list-style-name="WWNum37">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3" style:family="paragraph" style:parent-style-name="Standard" style:list-style-name="WWNum38">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4" style:family="paragraph" style:parent-style-name="Standard" style:list-style-name="WWNum38">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5" style:family="paragraph" style:parent-style-name="Standard" style:list-style-name="WWNum38">
      <loext:graphic-properties draw:fill="solid" draw:fill-color="#ffffff"/>
      <style:paragraph-properties fo:margin-left="3.552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6" style:family="paragraph" style:parent-style-name="Standard" style:list-style-name="WWNum39">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7" style:family="paragraph" style:parent-style-name="Standard" style:list-style-name="WWNum40">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8" style:family="paragraph" style:parent-style-name="Standard" style:list-style-name="WWNum40">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29" style:family="paragraph" style:parent-style-name="Standard" style:list-style-name="WWNum40">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0" style:family="paragraph" style:parent-style-name="Standard" style:list-style-name="WWNum40">
      <loext:graphic-properties draw:fill="solid" draw:fill-color="#ffffff"/>
      <style:paragraph-properties fo:margin-left="3.579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1" style:family="paragraph" style:parent-style-name="Standard" style:list-style-name="WWNum50">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2" style:family="paragraph" style:parent-style-name="Standard" style:list-style-name="WWNum51">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3" style:family="paragraph" style:parent-style-name="Standard" style:list-style-name="WWNum52">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4" style:family="paragraph" style:parent-style-name="Standard" style:list-style-name="WWNum53">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5" style:family="paragraph" style:parent-style-name="Standard" style:list-style-name="WWNum54">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6" style:family="paragraph" style:parent-style-name="Standard" style:list-style-name="WWNum55">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7" style:family="paragraph" style:parent-style-name="Standard" style:list-style-name="WWNum57">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8" style:family="paragraph" style:parent-style-name="Standard" style:list-style-name="WWNum57">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39" style:family="paragraph" style:parent-style-name="Standard" style:list-style-name="WWNum57">
      <loext:graphic-properties draw:fill="solid" draw:fill-color="#ffffff"/>
      <style:paragraph-properties fo:margin-left="3.579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0" style:family="paragraph" style:parent-style-name="Standard" style:list-style-name="WWNum59">
      <loext:graphic-properties draw:fill="solid" draw:fill-color="#ffffff"/>
      <style:paragraph-properties fo:margin-left="3.579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1" style:family="paragraph" style:parent-style-name="Standard" style:list-style-name="WWNum59">
      <loext:graphic-properties draw:fill="solid" draw:fill-color="#ffffff"/>
      <style:paragraph-properties fo:margin-left="3.47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2" style:family="paragraph" style:parent-style-name="Standard" style:list-style-name="WWNum59">
      <loext:graphic-properties draw:fill="solid" draw:fill-color="#ffffff"/>
      <style:paragraph-properties fo:margin-left="3.57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3" style:family="paragraph" style:parent-style-name="Standard" style:list-style-name="WWNum59">
      <loext:graphic-properties draw:fill="solid" draw:fill-color="#ffffff"/>
      <style:paragraph-properties fo:margin-left="3.59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4" style:family="paragraph" style:parent-style-name="Standard" style:list-style-name="WWNum59">
      <loext:graphic-properties draw:fill="solid" draw:fill-color="#ffffff"/>
      <style:paragraph-properties fo:margin-left="3.42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5" style:family="paragraph" style:parent-style-name="Standard" style:list-style-name="WWNum6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6" style:family="paragraph" style:parent-style-name="Standard">
      <loext:graphic-properties draw:fill="solid" draw:fill-color="#1d1f21"/>
      <style:paragraph-properties fo:margin-left="0.63cm" fo:margin-top="0cm" fo:margin-bottom="0cm" style:contextual-spacing="false" fo:line-height="100%" fo:text-align="justify" style:justify-single-word="false" fo:background-color="#1d1f21" fo:padding-left="0.494cm" fo:padding-right="0.247cm" fo:padding-top="0cm" fo:padding-bottom="0cm" fo:border-left="4.51pt solid #b3c746" fo:border-right="0.26pt solid #b3c746" fo:border-top="none" fo:border-bottom="none" style:shadow="none"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447" style:family="paragraph" style:parent-style-name="Standard" style:list-style-name="WWNum75">
      <loext:graphic-properties draw:fill="solid" draw:fill-color="#ffffff"/>
      <style:paragraph-properties fo:margin-left="2.33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8" style:family="paragraph" style:parent-style-name="Standard" style:list-style-name="WWNum76">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49" style:family="paragraph" style:parent-style-name="Standard" style:list-style-name="WWNum77">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0" style:family="paragraph" style:parent-style-name="Standard" style:list-style-name="WWNum77">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1" style:family="paragraph" style:parent-style-name="Standard" style:list-style-name="WWNum78">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2" style:family="paragraph" style:parent-style-name="Standard" style:list-style-name="WWNum79">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3" style:family="paragraph" style:parent-style-name="Standard" style:list-style-name="WWNum79">
      <loext:graphic-properties draw:fill="solid" draw:fill-color="#ffffff"/>
      <style:paragraph-properties fo:margin-left="2.644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4" style:family="paragraph" style:parent-style-name="Standard" style:list-style-name="WWNum80">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5" style:family="paragraph" style:parent-style-name="Standard" style:list-style-name="WWNum80">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6" style:family="paragraph" style:parent-style-name="Standard" style:list-style-name="WWNum81">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7" style:family="paragraph" style:parent-style-name="Standard" style:list-style-name="WWNum82">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8" style:family="paragraph" style:parent-style-name="Standard" style:list-style-name="WWNum82">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59" style:family="paragraph" style:parent-style-name="Standard" style:list-style-name="WWNum82">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0" style:family="paragraph" style:parent-style-name="Standard" style:list-style-name="WWNum82">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1" style:family="paragraph" style:parent-style-name="Standard" style:list-style-name="WWNum8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2" style:family="paragraph" style:parent-style-name="Standard" style:list-style-name="WWNum8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3" style:family="paragraph" style:parent-style-name="Standard">
      <loext:graphic-properties draw:fill="solid" draw:fill-color="#1d1f21"/>
      <style:paragraph-properties fo:margin-left="0.63cm" fo:margin-top="0cm" fo:margin-bottom="0.212cm" style:contextual-spacing="false" fo:line-height="100%" fo:text-align="justify" style:justify-single-word="false" fo:background-color="#1d1f21" fo:padding-left="0.494cm" fo:padding-right="0.247cm" fo:padding-top="0cm" fo:padding-bottom="0.247cm" fo:border-left="4.51pt solid #b3c746" fo:border-right="0.26pt solid #b3c746" fo:border-top="none" fo:border-bottom="0.26pt solid #b3c746" style:shadow="none" loext:word-spacing-minimum="75%" loext:word-spacing-maximum="133%"/>
      <style:text-properties officeooo:paragraph-rsid="0011aec9"/>
    </style:style>
    <style:style style:name="P464" style:family="paragraph" style:parent-style-name="Standard" style:list-style-name="WWNum92">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5" style:family="paragraph" style:parent-style-name="Standard" style:list-style-name="WWNum93">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6" style:family="paragraph" style:parent-style-name="Standard" style:list-style-name="WWNum94">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7" style:family="paragraph" style:parent-style-name="Standard" style:list-style-name="WWNum95">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8" style:family="paragraph" style:parent-style-name="Standard" style:list-style-name="WWNum96">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69" style:family="paragraph" style:parent-style-name="Standard" style:list-style-name="WWNum97">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0" style:family="paragraph" style:parent-style-name="Standard" style:list-style-name="WWNum9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1" style:family="paragraph" style:parent-style-name="Standard" style:list-style-name="WWNum100">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2" style:family="paragraph" style:parent-style-name="Standard" style:list-style-name="WWNum103">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3" style:family="paragraph" style:parent-style-name="Standard" style:list-style-name="WWNum10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4" style:family="paragraph" style:parent-style-name="Standard" style:list-style-name="WWNum106">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5" style:family="paragraph" style:parent-style-name="Standard" style:list-style-name="WWNum10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6" style:family="paragraph" style:parent-style-name="Standard" style:list-style-name="WWNum108">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7" style:family="paragraph" style:parent-style-name="Standard" style:list-style-name="WWNum113">
      <loext:graphic-properties draw:fill="solid" draw:fill-color="#ffffff"/>
      <style:paragraph-properties fo:margin-left="2.644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78"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479" style:family="paragraph" style:parent-style-name="Standard" style:list-style-name="WWNum114">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0" style:family="paragraph" style:parent-style-name="Standard" style:list-style-name="WWNum115">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1" style:family="paragraph" style:parent-style-name="Standard" style:list-style-name="WWNum11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2" style:family="paragraph" style:parent-style-name="Standard" style:list-style-name="WWNum120">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3" style:family="paragraph" style:parent-style-name="Standard" style:list-style-name="WWNum121">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4" style:family="paragraph" style:parent-style-name="Standard" style:list-style-name="WWNum12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5" style:family="paragraph" style:parent-style-name="Standard">
      <loext:graphic-properties draw:fill="solid" draw:fill-color="#ffffff"/>
      <style:paragraph-properties fo:margin-left="0.635cm" fo:margin-top="0cm" fo:margin-bottom="0.318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P486" style:family="paragraph" style:parent-style-name="Standard" style:list-style-name="WWNum123">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7" style:family="paragraph" style:parent-style-name="Standard" style:list-style-name="WWNum124">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8" style:family="paragraph" style:parent-style-name="Standard" style:list-style-name="WWNum124">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89" style:family="paragraph" style:parent-style-name="Standard" style:list-style-name="WWNum124">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0" style:family="paragraph" style:parent-style-name="Standard" style:list-style-name="WWNum124">
      <loext:graphic-properties draw:fill="solid" draw:fill-color="#ffffff"/>
      <style:paragraph-properties fo:margin-left="3.579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1" style:family="paragraph" style:parent-style-name="Standard" style:list-style-name="WWNum12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2" style:family="paragraph" style:parent-style-name="Standard" style:list-style-name="WWNum128">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3" style:family="paragraph" style:parent-style-name="Standard" style:list-style-name="WWNum129">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4" style:family="paragraph" style:parent-style-name="Standard" style:list-style-name="WWNum130">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5" style:family="paragraph" style:parent-style-name="Standard" style:list-style-name="WWNum131">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6" style:family="paragraph" style:parent-style-name="Standard" style:list-style-name="WWNum131">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7" style:family="paragraph" style:parent-style-name="Standard" style:list-style-name="WWNum132">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8" style:family="paragraph" style:parent-style-name="Standard" style:list-style-name="WWNum133">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499" style:family="paragraph" style:parent-style-name="Standard" style:list-style-name="WWNum133">
      <loext:graphic-properties draw:fill="solid" draw:fill-color="#ffffff"/>
      <style:paragraph-properties fo:margin-left="3.59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0" style:family="paragraph" style:parent-style-name="Standard" style:list-style-name="WWNum133">
      <loext:graphic-properties draw:fill="solid" draw:fill-color="#ffffff"/>
      <style:paragraph-properties fo:margin-left="3.552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1" style:family="paragraph" style:parent-style-name="Standard" style:list-style-name="WWNum133">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2" style:family="paragraph" style:parent-style-name="Standard" style:list-style-name="WWNum134">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3" style:family="paragraph" style:parent-style-name="Standard" style:list-style-name="WWNum134">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4" style:family="paragraph" style:parent-style-name="Standard" style:list-style-name="WWNum135">
      <loext:graphic-properties draw:fill="solid" draw:fill-color="#ffffff"/>
      <style:paragraph-properties fo:margin-left="3.579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5" style:family="paragraph" style:parent-style-name="Standard" style:list-style-name="WWNum136">
      <loext:graphic-properties draw:fill="solid" draw:fill-color="#ffffff"/>
      <style:paragraph-properties fo:margin-left="4.445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6" style:family="paragraph" style:parent-style-name="Standard" style:list-style-name="WWNum136">
      <loext:graphic-properties draw:fill="solid" draw:fill-color="#ffffff"/>
      <style:paragraph-properties fo:margin-left="4.445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7" style:family="paragraph" style:parent-style-name="Standard" style:list-style-name="WWNum137">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8" style:family="paragraph" style:parent-style-name="Standard" style:list-style-name="WWNum138">
      <loext:graphic-properties draw:fill="solid" draw:fill-color="#ffffff"/>
      <style:paragraph-properties fo:margin-left="3.563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09" style:family="paragraph" style:parent-style-name="Standard" style:list-style-name="WWNum138">
      <loext:graphic-properties draw:fill="solid" draw:fill-color="#ffffff"/>
      <style:paragraph-properties fo:margin-left="3.597cm" fo:margin-top="0cm" fo:margin-bottom="0.318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10" style:family="paragraph" style:parent-style-name="Standard" style:list-style-name="WWNum139">
      <loext:graphic-properties draw:fill="solid" draw:fill-color="#ffffff"/>
      <style:paragraph-properties fo:margin-left="2.337cm" fo:margin-top="0cm" fo:margin-bottom="0cm" style:contextual-spacing="false" fo:line-height="100%" fo:text-align="justify" style:justify-single-word="false" fo:text-indent="-0.635cm" style:auto-text-indent="false" fo:background-color="#ffffff" loext:word-spacing-minimum="75%" loext:word-spacing-maximum="133%"/>
      <style:text-properties officeooo:paragraph-rsid="0011aec9"/>
    </style:style>
    <style:style style:name="P511" style:family="paragraph" style:parent-style-name="Standard">
      <loext:graphic-properties draw:fill="solid" draw:fill-color="#ffffff"/>
      <style:paragraph-properties fo:margin-left="1.27cm" fo:margin-top="0cm" fo:margin-bottom="0.318cm" style:contextual-spacing="false" fo:line-height="100%" fo:text-align="justify" style:justify-single-word="false" fo:background-color="#ffffff" loext:word-spacing-minimum="75%" loext:word-spacing-maximum="133%"/>
      <style:text-properties fo:color="#242a42" loext:opacity="100%" style:font-name="Arial" fo:font-size="10.5pt" officeooo:paragraph-rsid="0011aec9" style:letter-kerning="false" style:font-name-asian="Times New Roman" style:font-size-asian="10.5pt" style:language-asian="pt" style:country-asian="BR" style:font-name-complex="Arial1" style:font-size-complex="10.5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color="#242a42" loext:opacity="100%" style:font-name="Arial" fo:font-size="18pt" fo:font-weight="bold" style:letter-kerning="false" style:font-name-asian="Times New Roman" style:font-size-asian="18pt" style:language-asian="pt" style:country-asian="BR" style:font-weight-asian="bold" style:font-name-complex="Arial1" style:font-size-complex="18pt" style:font-weight-complex="bold"/>
    </style:style>
    <style:style style:name="T4" style:family="text">
      <style:text-properties fo:color="#000000" loext:opacity="100%" style:font-name="Lato 2" fo:font-size="18pt" fo:font-weight="bold" style:letter-kerning="false" style:font-name-asian="Times New Roman" style:font-size-asian="18pt" style:language-asian="pt" style:country-asian="BR" style:font-weight-asian="bold" style:font-name-complex="Arial1" style:font-size-complex="18pt" style:font-weight-complex="bold"/>
    </style:style>
    <style:style style:name="T5" style:family="text">
      <style:text-properties fo:color="#000000" loext:opacity="100%" style:font-name="Arial" fo:font-size="10.5pt" style:letter-kerning="false" style:font-name-asian="Times New Roman" style:font-size-asian="10.5pt" style:language-asian="pt" style:country-asian="BR" style:font-name-complex="Arial1" style:font-size-complex="10.5pt"/>
    </style:style>
    <style:style style:name="T6" style:family="text">
      <style:text-properties fo:color="#000000" loext:opacity="100%" style:font-name="Lato 2" fo:font-size="15pt" style:letter-kerning="false" fo:background-color="#ffffff" loext:char-shading-value="0" style:font-name-asian="Times New Roman" style:font-size-asian="15pt" style:language-asian="pt" style:country-asian="BR" style:font-name-complex="Arial1" style:font-size-complex="15pt"/>
    </style:style>
    <style:style style:name="T7" style:family="text">
      <style:text-properties fo:color="#000000" loext:opacity="100%" style:font-name="Lato 2" fo:font-size="15pt" style:text-underline-style="solid" style:text-underline-width="auto" style:text-underline-color="font-color" style:letter-kerning="false" fo:background-color="#ffffff" loext:char-shading-value="0" style:font-name-asian="Times New Roman" style:font-size-asian="15pt" style:language-asian="pt" style:country-asian="BR" style:font-name-complex="Arial1" style:font-size-complex="15pt"/>
    </style:style>
    <style:style style:name="T8" style:family="text">
      <style:text-properties fo:color="#000000" loext:opacity="100%" style:font-name="Lato 2" fo:font-size="15pt" fo:font-weight="bold" style:letter-kerning="false" fo:background-color="#ffffff" loext:char-shading-value="0" style:font-name-asian="Times New Roman" style:font-size-asian="15pt" style:language-asian="pt" style:country-asian="BR" style:font-weight-asian="bold" style:font-name-complex="Arial1" style:font-size-complex="15pt" style:font-weight-complex="bold"/>
    </style:style>
    <style:style style:name="T9" style:family="text">
      <style:text-properties fo:color="#242a42" loext:opacity="100%" style:font-name="Arial" fo:font-size="10.5pt" style:letter-kerning="false" style:font-name-asian="Times New Roman" style:font-size-asian="10.5pt" style:language-asian="pt" style:country-asian="BR" style:font-name-complex="Arial1" style:font-size-complex="10.5pt"/>
    </style:style>
    <style:style style:name="T10" style:family="text">
      <style:text-properties fo:color="#000000" loext:opacity="100%" fo:font-family="Roboto" style:font-family-generic="roman" style:font-pitch="variable" fo:font-size="12pt" style:letter-kerning="false" style:font-name-asian="Times New Roman" style:font-size-asian="12pt" style:language-asian="pt" style:country-asian="BR" style:font-name-complex="Arial1" style:font-size-complex="12pt"/>
    </style:style>
    <style:style style:name="T11" style:family="text">
      <style:text-properties fo:color="#242a42" loext:opacity="100%" style:font-name="Arial" fo:font-size="13.5pt" fo:font-weight="bold" style:letter-kerning="false" style:font-name-asian="Times New Roman" style:font-size-asian="13.5pt" style:language-asian="pt" style:country-asian="BR" style:font-weight-asian="bold" style:font-name-complex="Arial1" style:font-size-complex="13.5pt" style:font-weight-complex="bold"/>
    </style:style>
    <style:style style:name="T12" style:family="text">
      <style:text-properties fo:color="#000000" loext:opacity="100%" style:font-name="Lato 2" fo:font-size="16pt" fo:font-weight="bold" style:letter-kerning="false" style:font-name-asian="Times New Roman" style:font-size-asian="16pt" style:language-asian="pt" style:country-asian="BR" style:font-weight-asian="bold" style:font-name-complex="Arial1" style:font-size-complex="16pt" style:font-weight-complex="bold"/>
    </style:style>
    <style:style style:name="T13" style:family="text">
      <style:text-properties fo:color="#000000" loext:opacity="100%" style:font-name="Lato 2" fo:font-size="15pt" style:letter-kerning="false" style:font-name-asian="Times New Roman" style:font-size-asian="15pt" style:language-asian="pt" style:country-asian="BR" style:font-name-complex="Arial1" style:font-size-complex="15pt"/>
    </style:style>
    <style:style style:name="T14" style:family="text">
      <style:text-properties fo:color="#000000" loext:opacity="100%" style:font-name="Lato 2" fo:font-size="15pt" fo:font-weight="bold" style:letter-kerning="false" style:font-name-asian="Times New Roman" style:font-size-asian="15pt" style:language-asian="pt" style:country-asian="BR" style:font-weight-asian="bold" style:font-name-complex="Arial1" style:font-size-complex="15pt" style:font-weight-complex="bold"/>
    </style:style>
    <style:style style:name="T15" style:family="text">
      <style:text-properties fo:color="#3863dc" loext:opacity="100%" style:font-name="Arial" fo:font-size="10.5pt" style:letter-kerning="false" style:font-name-asian="Times New Roman" style:font-size-asian="10.5pt" style:language-asian="pt" style:country-asian="BR" style:font-name-complex="Arial1" style:font-size-complex="10.5pt"/>
    </style:style>
    <style:style style:name="T16" style:family="text">
      <style:text-properties fo:color="#ffffff" loext:opacity="100%" fo:font-family="'Source Code Pro'" style:font-family-generic="roman" style:font-pitch="variable" fo:font-size="12pt" style:letter-kerning="false" style:font-name-asian="Times New Roman" style:font-size-asian="12pt" style:language-asian="pt" style:country-asian="BR" style:font-name-complex="Arial1" style:font-size-complex="12pt"/>
    </style:style>
    <style:style style:name="T17" style:family="text">
      <style:text-properties fo:color="#e6db74" loext:opacity="100%" fo:font-family="'Source Code Pro'" style:font-family-generic="roman" style:font-pitch="variable" fo:font-size="12pt" style:letter-kerning="false" style:font-name-asian="Times New Roman" style:font-size-asian="12pt" style:language-asian="pt" style:country-asian="BR" style:font-name-complex="Arial1" style:font-size-complex="12pt"/>
    </style:style>
    <style:style style:name="T18" style:family="text">
      <style:text-properties style:font-name="Arial" fo:font-size="12pt" style:letter-kerning="false" style:font-name-asian="Times New Roman" style:font-size-asian="12pt" style:language-asian="pt" style:country-asian="BR" style:font-name-complex="Arial1" style:font-size-complex="12pt"/>
    </style:style>
    <style:style style:name="T19" style:family="text">
      <style:text-properties style:font-name="Arial" fo:font-size="18pt" fo:font-weight="bold" style:letter-kerning="false" style:font-name-asian="Times New Roman" style:font-size-asian="18pt" style:language-asian="pt" style:country-asian="BR" style:font-weight-asian="bold" style:font-name-complex="Arial1" style:font-size-complex="18pt" style:font-weight-complex="bold"/>
    </style:style>
    <style:style style:name="T20" style:family="text">
      <style:text-properties style:font-name="Arial" fo:font-size="13.5pt" fo:font-weight="bold" style:letter-kerning="false" style:font-name-asian="Times New Roman" style:font-size-asian="13.5pt" style:language-asian="pt" style:country-asian="BR" style:font-weight-asian="bold" style:font-name-complex="Arial1" style:font-size-complex="13.5pt" style:font-weight-complex="bold"/>
    </style:style>
    <style:style style:name="T21" style:family="text">
      <style:text-properties fo:color="#f92672" loext:opacity="100%" fo:font-family="'Source Code Pro'" style:font-family-generic="roman" style:font-pitch="variable" fo:font-size="12pt" style:letter-kerning="false" style:font-name-asian="Times New Roman" style:font-size-asian="12pt" style:language-asian="pt" style:country-asian="BR" style:font-name-complex="Arial1" style:font-size-complex="12pt"/>
    </style:style>
    <style:style style:name="T22" style:family="text">
      <style:text-properties fo:color="#ae81ff" loext:opacity="100%" fo:font-family="'Source Code Pro'" style:font-family-generic="roman" style:font-pitch="variable" fo:font-size="12pt" style:letter-kerning="false" style:font-name-asian="Times New Roman" style:font-size-asian="12pt" style:language-asian="pt" style:country-asian="BR" style:font-name-complex="Arial1" style:font-size-complex="12pt"/>
    </style:style>
    <style:style style:name="T23" style:family="text">
      <style:text-properties fo:color="#ffffff" loext:opacity="100%" fo:font-family="'Source Code Pro'" style:font-family-generic="roman" style:font-pitch="variable" fo:font-size="15pt" style:letter-kerning="false" style:font-name-asian="Times New Roman" style:font-size-asian="15pt" style:language-asian="pt" style:country-asian="BR" style:font-name-complex="Arial1" style:font-size-complex="15pt"/>
    </style:style>
    <style:style style:name="T24" style:family="text">
      <style:text-properties fo:color="#000000" loext:opacity="100%" fo:font-family="Roboto" style:font-family-generic="roman" style:font-pitch="variable" fo:font-size="16pt" fo:font-weight="bold" style:letter-kerning="false" style:font-name-asian="Times New Roman" style:font-size-asian="16pt" style:language-asian="pt" style:country-asian="BR" style:font-weight-asian="bold" style:font-name-complex="Arial1" style:font-size-complex="16pt" style:font-weight-complex="bold"/>
    </style:style>
    <style:style style:name="T25" style:family="text">
      <style:text-properties fo:color="#75715e" loext:opacity="100%" fo:font-family="'Source Code Pro'" style:font-family-generic="roman" style:font-pitch="variable" fo:font-size="12pt" style:letter-kerning="false" style:font-name-asian="Times New Roman" style:font-size-asian="12pt" style:language-asian="pt" style:country-asian="BR" style:font-name-complex="Arial1" style:font-size-complex="12pt"/>
    </style:style>
    <style:style style:name="T26" style:family="text">
      <style:text-properties fo:color="#000000" loext:opacity="100%" fo:font-family="Roboto" style:font-family-generic="roman" style:font-pitch="variable" fo:font-size="18pt" fo:font-weight="bold" style:letter-kerning="false" style:font-name-asian="Times New Roman" style:font-size-asian="18pt" style:language-asian="pt" style:country-asian="BR" style:font-weight-asian="bold" style:font-name-complex="Arial1" style:font-size-complex="18pt" style:font-weight-complex="bold"/>
    </style:style>
    <style:style style:name="T27" style:family="text">
      <style:text-properties fo:color="#002465" loext:opacity="100%" style:font-name="Lato 2" fo:font-size="15pt" fo:font-style="italic" fo:font-weight="bold" style:letter-kerning="false" fo:background-color="#ffffff" loext:char-shading-value="0" style:font-name-asian="Times New Roman" style:font-size-asian="15pt" style:language-asian="pt" style:country-asian="BR" style:font-style-asian="italic" style:font-weight-asian="bold" style:font-name-complex="Arial1" style:font-size-complex="15pt" style:font-style-complex="italic" style:font-weight-complex="bold"/>
    </style:style>
    <style:style style:name="T28" style:family="text">
      <style:text-properties fo:color="#000000" loext:opacity="100%" style:font-name="Lato 2" fo:font-size="15pt" fo:font-style="italic" style:letter-kerning="false" fo:background-color="#ffffff" loext:char-shading-value="0" style:font-name-asian="Times New Roman" style:font-size-asian="15pt" style:language-asian="pt" style:country-asian="BR" style:font-style-asian="italic" style:font-name-complex="Arial1" style:font-size-complex="15pt" style:font-style-complex="italic"/>
    </style:style>
    <style:style style:name="T29" style:family="text">
      <style:text-properties fo:color="#002465" loext:opacity="100%" style:font-name="Lato 2" fo:font-size="15pt" fo:font-weight="bold" style:letter-kerning="false" fo:background-color="#ffffff" loext:char-shading-value="0" style:font-name-asian="Times New Roman" style:font-size-asian="15pt" style:language-asian="pt" style:country-asian="BR" style:font-weight-asian="bold" style:font-name-complex="Arial1" style:font-size-complex="15pt" style:font-weight-complex="bold"/>
    </style:style>
    <style:style style:name="T30" style:family="text">
      <style:text-properties fo:color="#0000ff" loext:opacity="100%" style:font-name="Lato 2" fo:font-size="15pt" style:text-underline-style="solid" style:text-underline-width="auto" style:text-underline-color="font-color" style:letter-kerning="false" fo:background-color="#ffffff" loext:char-shading-value="0" style:font-name-asian="Times New Roman" style:font-size-asian="15pt" style:language-asian="pt" style:country-asian="BR" style:font-name-complex="Arial1" style:font-size-complex="15pt"/>
    </style:style>
    <style:style style:name="T31" style:family="text">
      <style:text-properties fo:color="#000000" loext:opacity="100%" style:font-name="Arial" fo:font-size="15pt" style:letter-kerning="false" style:font-name-asian="Times New Roman" style:font-size-asian="15pt" style:language-asian="pt" style:country-asian="BR" style:font-name-complex="Arial1" style:font-size-complex="15pt"/>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family="'Times New Roman'" style:font-family-generic="roman" style:font-pitch="variable" fo:font-size="12pt" style:letter-kerning="false" style:font-name-asian="Times New Roman" style:font-size-asian="12pt" style:language-asian="pt" style:country-asian="BR" style:font-name-complex="Times New Roman" style:font-size-complex="12pt"/>
    </style:style>
    <style:style style:name="T34" style:family="text">
      <style:text-properties fo:color="#000000" loext:opacity="100%" style:font-name="Lato 2" fo:font-size="15pt" style:letter-kerning="false" style:font-name-asian="Times New Roman" style:font-size-asian="15pt" style:language-asian="pt" style:country-asian="BR" style:font-name-complex="Times New Roman" style:font-size-complex="15pt"/>
    </style:style>
    <style:style style:name="T35" style:family="text">
      <style:text-properties fo:color="#f92672" loext:opacity="100%" fo:font-family="'Source Code Pro'" style:font-family-generic="roman" style:font-pitch="variable" style:letter-kerning="false" style:font-name-asian="Times New Roman" style:language-asian="pt" style:country-asian="BR" style:font-name-complex="Arial1"/>
    </style:style>
    <style:style style:name="T36" style:family="text">
      <style:text-properties fo:color="#ffffff" loext:opacity="100%" fo:font-family="'Source Code Pro'" style:font-family-generic="roman" style:font-pitch="variable" style:letter-kerning="false" style:font-name-asian="Times New Roman" style:language-asian="pt" style:country-asian="BR" style:font-name-complex="Arial1"/>
    </style:style>
    <style:style style:name="T37" style:family="text">
      <style:text-properties fo:color="#75715e" loext:opacity="100%" fo:font-family="'Source Code Pro'" style:font-family-generic="roman" style:font-pitch="variable" style:letter-kerning="false" style:font-name-asian="Times New Roman" style:language-asian="pt" style:country-asian="BR" style:font-name-complex="Arial1"/>
    </style:style>
    <style:style style:name="T38" style:family="text">
      <style:text-properties fo:color="#e6db74" loext:opacity="100%" fo:font-family="'Source Code Pro'" style:font-family-generic="roman" style:font-pitch="variable" style:letter-kerning="false" style:font-name-asian="Times New Roman" style:language-asian="pt" style:country-asian="BR" style:font-name-complex="Arial1"/>
    </style:style>
    <style:style style:name="T39" style:family="text">
      <style:text-properties fo:color="#ae81ff" loext:opacity="100%" fo:font-family="'Source Code Pro'" style:font-family-generic="roman" style:font-pitch="variable" style:letter-kerning="false" style:font-name-asian="Times New Roman" style:language-asian="pt" style:country-asian="BR" style:font-name-complex="Arial1"/>
    </style:style>
    <style:style style:name="T40" style:family="text">
      <style:text-properties fo:color="#ff0000" loext:opacity="100%" style:font-name="Lato 2" fo:font-size="15pt" fo:font-weight="bold" style:letter-kerning="false" style:font-name-asian="Times New Roman" style:font-size-asian="15pt" style:language-asian="pt" style:country-asian="BR" style:font-weight-asian="bold" style:font-name-complex="Arial1" style:font-size-complex="15pt" style:font-weight-complex="bold"/>
    </style:style>
    <style:style style:name="T41" style:family="text">
      <style:text-properties fo:color="#ed0000" loext:opacity="100%" style:font-name="Lato 2" fo:font-size="15pt" fo:font-weight="bold" style:letter-kerning="false" fo:background-color="#ffffff" loext:char-shading-value="0" style:font-name-asian="Times New Roman" style:font-size-asian="15pt" style:language-asian="pt" style:country-asian="BR" style:font-weight-asian="bold" style:font-name-complex="Arial1" style:font-size-complex="15pt" style:font-weight-complex="bold"/>
    </style:style>
    <style:style style:name="T42" style:family="text">
      <style:text-properties fo:color="#ffffff" loext:opacity="100%" fo:font-family="'Source Code Pro'" style:font-family-generic="roman" style:font-pitch="variable" fo:font-size="12pt" style:letter-kerning="false" fo:background-color="#1d1f21" loext:char-shading-value="0" style:font-name-asian="Times New Roman" style:font-size-asian="12pt" style:language-asian="pt" style:country-asian="BR" style:font-name-complex="Arial1" style:font-size-complex="12pt"/>
    </style:style>
    <style:style style:name="T43" style:family="text">
      <style:text-properties fo:color="#e6db74" loext:opacity="100%" fo:font-family="'Source Code Pro'" style:font-family-generic="roman" style:font-pitch="variable" fo:font-size="12pt" style:letter-kerning="false" fo:background-color="#1d1f21" loext:char-shading-value="0" style:font-name-asian="Times New Roman" style:font-size-asian="12pt" style:language-asian="pt" style:country-asian="BR" style:font-name-complex="Arial1" style:font-size-complex="12pt"/>
    </style:style>
    <style:style style:name="T44" style:family="text">
      <style:text-properties fo:color="#ff0000" loext:opacity="100%" style:font-name="Lato 2" fo:font-size="15pt" style:letter-kerning="false" fo:background-color="#ffffff" loext:char-shading-value="0" style:font-name-asian="Times New Roman" style:font-size-asian="15pt" style:language-asian="pt" style:country-asian="BR" style:font-name-complex="Arial1" style:font-size-complex="15pt"/>
    </style:style>
    <style:style style:name="T45" style:family="text">
      <style:text-properties fo:color="#ff0000" loext:opacity="100%" style:font-name="Lato 2" fo:font-size="15pt" fo:font-weight="bold" style:letter-kerning="false" fo:background-color="#ffffff" loext:char-shading-value="0" style:font-name-asian="Times New Roman" style:font-size-asian="15pt" style:language-asian="pt" style:country-asian="BR" style:font-weight-asian="bold" style:font-name-complex="Arial1" style:font-size-complex="15pt" style:font-weight-complex="bold"/>
    </style:style>
    <style:style style:name="T46" style:family="text">
      <style:text-properties fo:color="#0d0d0d" loext:opacity="100%" style:font-name="Lato 2" fo:font-size="16pt" fo:font-weight="bold" style:letter-kerning="true" style:font-name-asian="Times New Roman" style:font-size-asian="16pt" style:language-asian="pt" style:country-asian="BR" style:font-weight-asian="bold" style:font-name-complex="Arial1" style:font-size-complex="16pt" style:font-weight-complex="bold"/>
    </style:style>
    <style:style style:name="T47" style:family="text">
      <style:text-properties fo:color="#242a42" loext:opacity="100%" style:font-name="Arial" fo:font-size="16pt" fo:font-weight="bold" style:letter-kerning="true" style:font-name-asian="Times New Roman" style:font-size-asian="16pt" style:language-asian="pt" style:country-asian="BR" style:font-weight-asian="bold" style:font-name-complex="Arial1" style:font-size-complex="16pt" style:font-weight-complex="bold"/>
    </style:style>
    <style:style style:name="T48" style:family="text">
      <style:text-properties fo:color="#242a42" loext:opacity="100%" style:font-name="Arial" fo:font-size="14pt" fo:font-weight="bold" style:letter-kerning="false" style:font-name-asian="Times New Roman" style:font-size-asian="14pt" style:language-asian="pt" style:country-asian="BR" style:font-weight-asian="bold" style:font-name-complex="Arial1" style:font-size-complex="14pt" style:font-weight-complex="bold"/>
    </style:style>
    <style:style style:name="T49" style:family="text">
      <style:text-properties fo:color="#000000" loext:opacity="100%" style:font-name="Lato 2" fo:font-size="14pt" fo:font-weight="bold" style:letter-kerning="false" style:font-name-asian="Times New Roman" style:font-size-asian="14pt" style:language-asian="pt" style:country-asian="BR" style:font-weight-asian="bold" style:font-name-complex="Arial1" style:font-size-complex="14pt" style:font-weight-complex="bold"/>
    </style:style>
    <style:style style:name="T50" style:family="text">
      <style:text-properties fo:color="#000000" loext:opacity="100%" style:font-name="Lato 2" fo:font-size="15pt" fo:font-style="italic" fo:font-weight="bold" style:letter-kerning="false" fo:background-color="#ffffff" loext:char-shading-value="0" style:font-name-asian="Times New Roman" style:font-size-asian="15pt" style:language-asian="pt" style:country-asian="BR" style:font-style-asian="italic" style:font-weight-asian="bold" style:font-name-complex="Arial1" style:font-size-complex="15pt"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598cm" fo:min-width="0.347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4.038cm" fo:min-width="14.476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3.614cm" fo:min-width="14.476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Semana do Desenvolvedor – Dia 1</text:span></text:p>
      <text:p text:style-name="P1" loext:marker-style-name="T1"><text:span text:style-name="T1">Ingestão de Pedidos via API e EventBridge</text:span></text:p>
      <text:p text:style-name="P2"/>
      <text:p text:style-name="P2" loext:marker-style-name="T2"><text:span text:style-name="T2">Visão Geral e Objetivos da Aula </text:span></text:p>
      <text:p text:style-name="P2">Este laboratório marca o início da semana do desenvolvedor AWS da Escola da Nuvem, voltada para alunos do curso AWS Developer Associate. Nesta sessão, construiremos o fluxo inicial para ingestão de pedidos. Nosso objetivo é criar um endpoint de API REST que receberá dados de pedidos, passará por uma Lambda de pré-validação, será enfileirado em uma fila SQS FIFO (First-In, First-Out) para garantir a ordem, e então processado por uma segunda Lambda que validará o pedido mais a fundo e publicará um evento em um barramento de eventos customizado no Amazon EventBridge. </text:p>
      <text:p text:style-name="P2"/>
      <text:p text:style-name="P2" loext:marker-style-name="T2"><text:span text:style-name="T2">Arquitetura completa</text:span></text:p>
      <text:p text:style-name="P2"><draw:frame draw:style-name="fr1" draw:name="Imagem 1" text:anchor-type="as-char" svg:width="15cm" svg:height="9.366cm" draw:z-index="0"><draw:image xlink:href="Pictures/1000000100000304000001E23B5F5543.png" xlink:type="simple" xlink:show="embed" xlink:actuate="onLoad" draw:mime-type="image/png"/></draw:frame></text:p>
      <text:p text:style-name="P2"/>
      <text:p text:style-name="P2" loext:marker-style-name="T2"><text:span text:style-name="T2">Arquitetura construída no dia 01</text:span></text:p>
      <text:p text:style-name="P2"><text:soft-page-break/><draw:frame draw:style-name="fr1" draw:name="Figura2" text:anchor-type="as-char" svg:width="15cm" svg:height="10.779cm" draw:z-index="1"><draw:image xlink:href="Pictures/100000010000029C000001E077A0522F.png" xlink:type="simple" xlink:show="embed" xlink:actuate="onLoad" draw:mime-type="image/png"/></draw:frame></text:p>
      <text:p text:style-name="P2"><text:span text:style-name="T2">Ao final desta aula, você terá:</text:span></text:p>
      <text:list xml:id="list547355127" text:style-name="WWNum1">
        <text:list-item>
          <text:p text:style-name="P3">Um endpoint API funcional para receber pedidos.</text:p>
        </text:list-item>
        <text:list-item>
          <text:p text:style-name="P3">Duas funções Lambda para validação.</text:p>
        </text:list-item>
        <text:list-item>
          <text:p text:style-name="P3">Uma fila SQS FIFO para desacoplar o processamento.</text:p>
        </text:list-item>
        <text:list-item>
          <text:p text:style-name="P3">Um barramento de eventos customizado para notificar sobre novos pedidos validados.</text:p>
        </text:list-item>
      </text:list>
      <text:p text:style-name="P2"/>
      <text:p text:style-name="P2"><text:span text:style-name="T2">Recursos a Serem Criados Nesta Aula:</text:span></text:p>
      <text:list xml:id="list3991426341" text:style-name="WWNum2">
        <text:list-item>
          <text:p text:style-name="P4">IAM Role: lambda-prevalidacao-role-seu-nome</text:p>
        </text:list-item>
        <text:list-item>
          <text:p text:style-name="P4">IAM Role: lambda-validacao-pedidos-role-seu-nome</text:p>
        </text:list-item>
        <text:list-item>
          <text:p text:style-name="P4">Amazon SQS FIFO DLQ: pedidos-fifo-dlq-seu-nome.fifo</text:p>
        </text:list-item>
        <text:list-item>
          <text:p text:style-name="P4">Amazon SQS FIFO Queue: pedidos-fifo-queue-seu-nome.fifo</text:p>
        </text:list-item>
        <text:list-item>
          <text:p text:style-name="P4">AWS Lambda Function: pre-validacao-lambda-seu-nome</text:p>
        </text:list-item>
        <text:list-item>
          <text:p text:style-name="P4">Amazon API Gateway (REST API): pedidos-api-seu-nome</text:p>
        </text:list-item>
        <text:list-item>
          <text:p text:style-name="P4">Amazon EventBridge Custom Event Bus: pedidos-event-bus-seu-nome</text:p>
        </text:list-item>
        <text:list-item>
          <text:p text:style-name="P4">AWS Lambda Function: validacao-pedidos-lambda-seu-nome</text:p>
        </text:list-item>
      </text:list>
      <text:p text:style-name="P2"><text:span text:style-name="T2">Lembrete Importante</text:span>: Substitua <text:span text:style-name="T2">seu-nome</text:span> em todos os nomes de recursos pelo seu nome ou um identificador único (ex: validacao-pedidos-lambda -joaosilva) para evitar conflitos. Trabalhe consistentemente na mesma região AWS.</text:p>
      <text:h text:style-name="P5" text:outline-level="2" loext:marker-style-name="T3"><text:span text:style-name="T4">Início</text:span></text:h>
      <text:list xml:id="list319434661" text:style-name="WWNum3">
        <text:list-item>
          <text:p text:style-name="P6" loext:marker-style-name="T5"><text:span text:style-name="T6">Acesse o </text:span><text:a xlink:type="simple" xlink:href="https://console.aws.amazon.com/" office:target-frame-name="_blank" xlink:show="new" text:style-name="ListLabel_20_820" text:visited-style-name="ListLabel_20_820"><text:span text:style-name="T7">console de gerenciamento da AWS</text:span></text:a><text:span text:style-name="T6"> com a conta fornecida pela Escola da Nuvem. Caso apresente a mensagem de erro “</text:span><text:span text:style-name="T8">The credential in your login link were invalid. Please contact your administrator</text:span><text:span text:style-name="T6">.” abaixo, clique no texto em azul onde consta a informação “</text:span><text:span text:style-name="T8">To logout, click here</text:span><text:span text:style-name="T6">”. </text:span></text:p>
        </text:list-item>
        <text:list-item>
          <text:p text:style-name="P7" loext:marker-style-name="T5"><text:span text:style-name="T6">Após efetuar login, irá mostrar o console de gerenciamento da AWS. Sempre confira, no canto superior direito do console, qual a conta está </text:span><text:soft-page-break/><text:span text:style-name="T6">logada, para evitar acessar com a conta incorreta e evitar gastos desnecessários.  </text:span></text:p>
        </text:list-item>
      </text:list>
      <text:p text:style-name="P8" loext:marker-style-name="T9"/>
      <text:h text:style-name="P9" text:outline-level="2" loext:marker-style-name="T3"><text:span text:style-name="T4">Acesso controlado no console AWS</text:span></text:h>
      <text:p text:style-name="P10" loext:marker-style-name="T9"><text:span text:style-name="T6">Os recursos liberados serão limitados para permitir apenas o necessário no laboratório. Mensagens de erro serão comuns de aparecer, caso tente acessar algum recurso não liberado na sua conta ou mesmo ao abrir algum serviço com limitações. Porém sempre siga à risca os passos propostos neste e em outros laboratórios. </text:span></text:p>
      <text:p text:style-name="P10" loext:marker-style-name="T9"><text:span text:style-name="T10">    </text:span></text:p>
      <text:h text:style-name="P9" text:outline-level="2" loext:marker-style-name="T3"><text:span text:style-name="T4">IAM Role Configuração de Permissões (IAM Roles)</text:span></text:h>
      <text:h text:style-name="P11" text:outline-level="3" loext:marker-style-name="T11"/>
      <text:h text:style-name="P9" text:outline-level="3" loext:marker-style-name="T11"><text:span text:style-name="T12">Criar Role para a Lambda de Pré-Validação (lambda-prevalidacao-role-seu-nome)</text:span></text:h>
      <text:p text:style-name="P12" loext:marker-style-name="T9"><text:span text:style-name="T13">Esta role será usada pela nossa primeira função Lambda, que fará a pré-validação e enviará a mensagem para a fila SQS.</text:span></text:p>
      <text:list xml:id="list2347465547" text:style-name="WWNum4">
        <text:list-item>
          <text:p text:style-name="P13" loext:marker-style-name="T5"><text:span text:style-name="T13">Acesse o serviço IAM no Console AWS.</text:span></text:p>
        </text:list-item>
        <text:list-item>
          <text:p text:style-name="P13" loext:marker-style-name="T5"><text:span text:style-name="T13">No menu à esquerda, clique em "</text:span><text:span text:style-name="T14">Roles</text:span><text:span text:style-name="T13">" e depois em "</text:span><text:span text:style-name="T14">Create role</text:span><text:span text:style-name="T13">".</text:span></text:p>
        </text:list-item>
        <text:list-item>
          <text:p text:style-name="P13" loext:marker-style-name="T5"><text:span text:style-name="T13">Em "</text:span><text:span text:style-name="T14">Trusted entity type</text:span><text:span text:style-name="T13">", selecione "</text:span><text:span text:style-name="T14">AWS service</text:span><text:span text:style-name="T13">".</text:span></text:p>
        </text:list-item>
        <text:list-item>
          <text:p text:style-name="P13" loext:marker-style-name="T5"><text:span text:style-name="T13">Em "Use case", selecione "Lambda" e clique em "</text:span><text:span text:style-name="T14">Next</text:span><text:span text:style-name="T13">".</text:span></text:p>
        </text:list-item>
        <text:list-item>
          <text:p text:style-name="P14" loext:marker-style-name="T5"><text:span text:style-name="T13">Na página "</text:span><text:span text:style-name="T14">Add permissions</text:span><text:span text:style-name="T13">":</text:span></text:p>
        </text:list-item>
      </text:list>
      <text:list xml:id="list848479036" text:style-name="WWNum5">
        <text:list-item>
          <text:p text:style-name="P15" loext:marker-style-name="T5"><text:span text:style-name="T13">Procure pela política AWSLambdaBasicExecutionRole e marque a caixa de seleção ao lado dela. Esta política permite que a Lambda escreva logs no CloudWatch.</text:span></text:p>
        </text:list-item>
        <text:list-item>
          <text:p text:style-name="P16" loext:marker-style-name="T5"><text:span text:style-name="T13">Clique em "</text:span><text:span text:style-name="T14">Next</text:span><text:span text:style-name="T13">".</text:span></text:p>
        </text:list-item>
      </text:list>
      <text:list xml:id="list224559068" text:style-name="WWNum6">
        <text:list-item>
          <text:p text:style-name="P17" loext:marker-style-name="T5"><text:span text:style-name="T13">Em "</text:span><text:span text:style-name="T14">Role details</text:span><text:span text:style-name="T13">":</text:span></text:p>
        </text:list-item>
      </text:list>
      <text:list xml:id="list3744548746" text:style-name="WWNum7">
        <text:list-item>
          <text:p text:style-name="P18" loext:marker-style-name="T5"><text:span text:style-name="T13">Role name:</text:span><text:span text:style-name="T14"> lambda-prevalidacao-role-seu-nome</text:span></text:p>
        </text:list-item>
        <text:list-item>
          <text:p text:style-name="P19" loext:marker-style-name="T5"><text:span text:style-name="T13">Description: (Opcional) Adicione uma breve descrição, como "</text:span><text:span text:style-name="T14">Role para Lambda de pre_validacao de pedidos</text:span><text:span text:style-name="T13">".</text:span></text:p>
        </text:list-item>
      </text:list>
      <text:list xml:id="list3425248626" text:style-name="WWNum8">
        <text:list-item>
          <text:p text:style-name="P20" loext:marker-style-name="T5"><text:span text:style-name="T13">Revise as configurações e clique em "</text:span><text:span text:style-name="T14">Create role</text:span><text:span text:style-name="T13">".</text:span></text:p>
        </text:list-item>
      </text:list>
      <text:list xml:id="list3051085963" text:style-name="WWNum9">
        <text:list-item>
          <text:p text:style-name="P21" loext:marker-style-name="T5"><text:span text:style-name="T13">Nota: Posteriormente, após criar a fila SQS, voltaremos a esta role para adicionar a permissão específica de envio de mensagens para fila.</text:span></text:p>
        </text:list-item>
      </text:list>
      <text:p text:style-name="P22" loext:marker-style-name="T9"/>
      <text:h text:style-name="P23" text:outline-level="3" loext:marker-style-name="T11"><text:span text:style-name="T12">Criar Role para a Lambda de Validação de Pedidos (lambda-validacao-pedidos-role-seu-nome)</text:span></text:h>
      <text:p text:style-name="P12" loext:marker-style-name="T9"><text:soft-page-break/><text:span text:style-name="T13">Esta role será usada pela nossa segunda função Lambda, que consumirá mensagens da fila SQS e publicará eventos no EventBridge.</text:span></text:p>
      <text:list xml:id="list4034833537" text:style-name="WWNum10">
        <text:list-item>
          <text:p text:style-name="P24" loext:marker-style-name="T5"><text:span text:style-name="T13">Ainda no IAM, clique em "</text:span><text:span text:style-name="T14">Roles</text:span><text:span text:style-name="T13">" e depois em "</text:span><text:span text:style-name="T14">Create role</text:span><text:span text:style-name="T13">".</text:span></text:p>
        </text:list-item>
        <text:list-item>
          <text:p text:style-name="P24" loext:marker-style-name="T5"><text:span text:style-name="T13">Trusted entity type: Selecione "</text:span><text:span text:style-name="T14">AWS service</text:span><text:span text:style-name="T13">".</text:span></text:p>
        </text:list-item>
        <text:list-item>
          <text:p text:style-name="P24" loext:marker-style-name="T5"><text:span text:style-name="T13">Use case: Selecione "</text:span><text:span text:style-name="T14">Lambda</text:span><text:span text:style-name="T13">" e clique em "</text:span><text:span text:style-name="T14">Next</text:span><text:span text:style-name="T13">".</text:span></text:p>
        </text:list-item>
        <text:list-item>
          <text:p text:style-name="P25" loext:marker-style-name="T5"><text:span text:style-name="T13">Permissions policies:</text:span></text:p>
        </text:list-item>
      </text:list>
      <text:list xml:id="list3959817239" text:style-name="WWNum11">
        <text:list-item>
          <text:p text:style-name="P26" loext:marker-style-name="T5"><text:span text:style-name="T13">Procure e marque </text:span><text:span text:style-name="T14">AWSLambdaBasicExecutionRole</text:span><text:span text:style-name="T13">.</text:span></text:p>
        </text:list-item>
        <text:list-item>
          <text:p text:style-name="P27" loext:marker-style-name="T5"><text:span text:style-name="T13">Clique em "</text:span><text:span text:style-name="T14">Next</text:span><text:span text:style-name="T13">".</text:span></text:p>
        </text:list-item>
      </text:list>
      <text:list xml:id="list2599281561" text:style-name="WWNum12">
        <text:list-item>
          <text:p text:style-name="P28" loext:marker-style-name="T5"><text:span text:style-name="T13">Role name: </text:span><text:span text:style-name="T14">lambda-validacao-pedidos-role-seu-nome</text:span><text:span text:style-name="T13">.</text:span></text:p>
        </text:list-item>
        <text:list-item>
          <text:p text:style-name="P29" loext:marker-style-name="T5"><text:span text:style-name="T13">Clique em "</text:span><text:span text:style-name="T14">Create role</text:span><text:span text:style-name="T13">".</text:span></text:p>
        </text:list-item>
      </text:list>
      <text:list xml:id="list845793351" text:style-name="WWNum13">
        <text:list-item>
          <text:p text:style-name="P30" loext:marker-style-name="T5"><text:span text:style-name="T13">Nota: Após criar a fila SQS e o Event Bus, retornaremos aqui para adicionar as permissões específicas.</text:span></text:p>
        </text:list-item>
      </text:list>
      <text:p text:style-name="P10" loext:marker-style-name="T9"><draw:custom-shape text:anchor-type="as-char" draw:z-index="2" draw:name="AutoShape 3"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4">Configuração do Enfileiramento de Mensagens (Amazon SQS FIFO)</text:span></text:h>
      <text:p text:style-name="P10" loext:marker-style-name="T9"><text:span text:style-name="T13">Usaremos uma fila SQS FIFO para garantir que os pedidos sejam processados na ordem em que chegam e para desacoplar a API da lógica de validação.</text:span></text:p>
      <text:p text:style-name="P22" loext:marker-style-name="T9"/>
      <text:h text:style-name="P23" text:outline-level="3" loext:marker-style-name="T11"><text:span text:style-name="T12">Criar a Fila de Mensagens Mortas (DLQ - Dead Letter Queue)</text:span></text:h>
      <text:p text:style-name="P12" loext:marker-style-name="T9"><text:span text:style-name="T13">A DLQ armazenará mensagens que não puderam ser processadas com sucesso pela fila principal após um número configurado de tentativas.</text:span></text:p>
      <text:list xml:id="list456741475" text:style-name="WWNum14">
        <text:list-item>
          <text:p text:style-name="P32" loext:marker-style-name="T5"><text:span text:style-name="T13">Acesse o serviço Amazon SQS no Console AWS.</text:span></text:p>
        </text:list-item>
        <text:list-item>
          <text:p text:style-name="P32" loext:marker-style-name="T5"><text:span text:style-name="T13">Clique em "</text:span><text:span text:style-name="T14">Create queue</text:span><text:span text:style-name="T13">".</text:span></text:p>
        </text:list-item>
        <text:list-item>
          <text:p text:style-name="P32" loext:marker-style-name="T5"><text:span text:style-name="T13">Type: Selecione "</text:span><text:span text:style-name="T14">FIFO</text:span><text:span text:style-name="T13">".</text:span></text:p>
        </text:list-item>
        <text:list-item>
          <text:p text:style-name="P32" loext:marker-style-name="T5"><text:span text:style-name="T13">Name:</text:span><text:span text:style-name="T14"> pedidos-fifo-dlq-seu-nome.fifo</text:span><text:span text:style-name="T13"> (o sufixo .fifo é obrigatório).</text:span></text:p>
        </text:list-item>
        <text:list-item>
          <text:p text:style-name="P32" loext:marker-style-name="T5"><text:span text:style-name="T13">Mantenha as demais configurações padrão por agora e clique em "</text:span><text:span text:style-name="T14">Create queue</text:span><text:span text:style-name="T13">".</text:span></text:p>
        </text:list-item>
        <text:list-item>
          <text:p text:style-name="P33" loext:marker-style-name="T5"><text:span text:style-name="T14">Anote o ARN desta DLQ</text:span><text:span text:style-name="T13">. Ele será necessário ao criar a fila principal.</text:span></text:p>
        </text:list-item>
      </text:list>
      <text:p text:style-name="P22" loext:marker-style-name="T9"/>
      <text:h text:style-name="P34" text:outline-level="3" loext:marker-style-name="T11"><text:span text:style-name="T12">Criar a Fila Principal de Pedidos (pedidos-fifo-queue-seu-nome.fifo)</text:span></text:h>
      <text:list xml:id="list932320243" text:style-name="WWNum15">
        <text:list-item>
          <text:p text:style-name="P35" loext:marker-style-name="T5"><text:span text:style-name="T13">Ainda no SQS, clique em "</text:span><text:span text:style-name="T14">Create queue</text:span><text:span text:style-name="T13">" novamente.</text:span></text:p>
        </text:list-item>
        <text:list-item>
          <text:p text:style-name="P35" loext:marker-style-name="T5"><text:span text:style-name="T13">Type: Selecione "</text:span><text:span text:style-name="T14">FIFO</text:span><text:span text:style-name="T13">".</text:span></text:p>
        </text:list-item>
        <text:list-item>
          <text:p text:style-name="P35" loext:marker-style-name="T5"><text:span text:style-name="T13">Name: </text:span><text:span text:style-name="T14">pedidos-fifo-queue-seu-nome.fifo</text:span></text:p>
        </text:list-item>
        <text:list-item>
          <text:p text:style-name="P36" loext:marker-style-name="T5"><text:span text:style-name="T13">Na seção "</text:span><text:span text:style-name="T14">Dead-letter queue (DLQ)</text:span><text:span text:style-name="T13">":</text:span></text:p>
        </text:list-item>
      </text:list>
      <text:list xml:id="list3950535145" text:style-name="WWNum16">
        <text:list-item>
          <text:p text:style-name="P37" loext:marker-style-name="T5"><text:soft-page-break/><text:span text:style-name="T13">Marque a caixa "</text:span><text:span text:style-name="T14">Enabled</text:span><text:span text:style-name="T13">".</text:span></text:p>
        </text:list-item>
        <text:list-item>
          <text:p text:style-name="P38" loext:marker-style-name="T5"><text:span text:style-name="T13">Em "</text:span><text:span text:style-name="T14">Amazon Resource Name (ARN) of the dead-letter queue</text:span><text:span text:style-name="T13">", selecione o </text:span><text:span text:style-name="T14">ARN da DLQ pedidos-fifo-dlq-seu-nome.fifo</text:span><text:span text:style-name="T13"> que você criou.</text:span></text:p>
        </text:list-item>
        <text:list-item>
          <text:p text:style-name="P39" loext:marker-style-name="T5"><text:span text:style-name="T14">Maximum receives</text:span><text:span text:style-name="T13">: Defina como </text:span><text:span text:style-name="T14">3</text:span><text:span text:style-name="T13">. Isso significa que uma mensagem será tentada 3 vezes antes de ser enviada para a DLQ.</text:span></text:p>
        </text:list-item>
      </text:list>
      <text:list xml:id="list1860802164" text:style-name="WWNum17">
        <text:list-item>
          <text:p text:style-name="P40" loext:marker-style-name="T5"><text:span text:style-name="T13">Mantenha as demais configurações padrão e clique em "</text:span><text:span text:style-name="T14">Create queue</text:span><text:span text:style-name="T13">".</text:span></text:p>
        </text:list-item>
        <text:list-item>
          <text:p text:style-name="P41" loext:marker-style-name="T5"><text:span text:style-name="T14">Anote o ARN e a URL desta fila principal</text:span><text:span text:style-name="T13">. Eles serão usados nas configurações das Lambdas e IAM Roles.</text:span></text:p>
        </text:list-item>
      </text:list>
      <text:p text:style-name="P22" loext:marker-style-name="T9"/>
      <text:h text:style-name="P9" text:outline-level="3" loext:marker-style-name="T11"><text:span text:style-name="T12">Atualizar Permissões da Role de Pré-Validação</text:span></text:h>
      <text:p text:style-name="P12" loext:marker-style-name="T9"><text:span text:style-name="T13">Agora que a fila SQS principal está criada, vamos conceder à </text:span><text:span text:style-name="T14">lambda-prevalidacao-role-seu-nome</text:span><text:span text:style-name="T13"> a permissão para enviar mensagens a ela.</text:span></text:p>
      <text:list xml:id="list267770750" text:style-name="WWNum18">
        <text:list-item>
          <text:p text:style-name="P42" loext:marker-style-name="T5"><text:span text:style-name="T13">Volte ao serviço IAM.</text:span></text:p>
        </text:list-item>
        <text:list-item>
          <text:p text:style-name="P42" loext:marker-style-name="T5"><text:span text:style-name="T13">Clique em "</text:span><text:span text:style-name="T14">Roles</text:span><text:span text:style-name="T13">" e encontre a role </text:span><text:span text:style-name="T14">lambda-prevalidacao-role-seu-nome</text:span><text:span text:style-name="T13">. Clique nela.</text:span></text:p>
        </text:list-item>
        <text:list-item>
          <text:p text:style-name="P42" loext:marker-style-name="T5"><text:span text:style-name="T13">Na aba "</text:span><text:span text:style-name="T14">Permissions</text:span><text:span text:style-name="T13">", sob "</text:span><text:span text:style-name="T14">Permissions policies</text:span><text:span text:style-name="T13">", clique em "</text:span><text:span text:style-name="T14">Add permissions</text:span><text:span text:style-name="T13">" e selecione "</text:span><text:span text:style-name="T14">Create inline policy</text:span><text:span text:style-name="T13">".</text:span></text:p>
        </text:list-item>
        <text:list-item>
          <text:p text:style-name="P42" loext:marker-style-name="T5"><text:span text:style-name="T13">Selecione a aba JSON.</text:span></text:p>
        </text:list-item>
        <text:list-item>
          <text:p text:style-name="P43" loext:marker-style-name="T5"><text:span text:style-name="T13">Cole o seguinte JSON , substituindo o campo selecionado na imagem abaixo, pelo ARN da sua fila SQS principal:</text:span></text:p>
        </text:list-item>
      </text:list>
      <text:p text:style-name="P44" loext:marker-style-name="T9"/>
      <text:p text:style-name="P45" loext:marker-style-name="T9"><text:span text:style-name="T15">Copiar</text:span></text:p>
      <text:p text:style-name="P46" loext:marker-style-name="T9"><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span text:style-name="T17">"sqs</text:span><text:span text:style-name="T16">:</text:span><text:span text:style-name="T17">SendMessage"</text:span><text:span text:style-name="T16">,</text:span></text:p>
      <text:p text:style-name="P47" loext:marker-style-name="T9"><text:span text:style-name="T16">           </text:span><text:span text:style-name="T17">"Resource"</text:span><text:span text:style-name="T16">: </text:span><text:span text:style-name="T17">"arn</text:span><text:span text:style-name="T16">:</text:span><text:span text:style-name="T17">aws</text:span><text:span text:style-name="T16">:</text:span><text:span text:style-name="T17">sqs</text:span><text:span text:style-name="T16">:</text:span><text:span text:style-name="T17">REGION</text:span><text:span text:style-name="T16">:</text:span><text:span text:style-name="T17">ACCOUNT_ID</text:span><text:span text:style-name="T16">:</text:span><text:span text:style-name="T17">pedidos</text:span><text:span text:style-name="T16">-</text:span><text:span text:style-name="T17">fifo</text:span><text:span text:style-name="T16">-</text:span><text:span text:style-name="T17">queue</text:span><text:span text:style-name="T16">-</text:span><text:span text:style-name="T17">seu</text:span><text:span text:style-name="T16">-</text:span><text:span text:style-name="T17">nome</text:span><text:span text:style-name="T16">.</text:span><text:span text:style-name="T17">fifo"</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2"/>
      <text:list xml:id="list2480161655" text:style-name="WWNum19">
        <text:list-item>
          <text:p text:style-name="P49" loext:marker-style-name="T5"><text:span text:style-name="T13">Clique em "</text:span><text:span text:style-name="T14">Next</text:span><text:span text:style-name="T13">".</text:span></text:p>
        </text:list-item>
        <text:list-item>
          <text:p text:style-name="P49" loext:marker-style-name="T5"><text:span text:style-name="T13">Em "</text:span><text:span text:style-name="T14">Review and create</text:span><text:span text:style-name="T13">" &gt; Policy details &gt; campo Name: </text:span><text:span text:style-name="T14">SQSSendMessageToPedidosFIFO-seu-nome</text:span><text:span text:style-name="T13">.</text:span></text:p>
        </text:list-item>
        <text:list-item>
          <text:p text:style-name="P50" loext:marker-style-name="T5"><text:span text:style-name="T13">Clique em "</text:span><text:span text:style-name="T14">Create policy</text:span><text:span text:style-name="T13">".</text:span></text:p>
        </text:list-item>
      </text:list>
      <text:p text:style-name="P51" loext:marker-style-name="T18"><draw:custom-shape text:anchor-type="as-char" draw:z-index="3" draw:name="AutoShape 6"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52" text:outline-level="2" loext:marker-style-name="T19"><text:soft-page-break/><text:span text:style-name="T4">Implementação da Lógica de Pré-Validação (AWS Lambda)</text:span></text:h>
      <text:p text:style-name="P51" loext:marker-style-name="T18"><text:span text:style-name="T13">Esta função Lambda será acionada pelo API Gateway, fará uma verificação inicial dos dados do pedido e, se válida, enviará para a fila SQS.</text:span></text:p>
      <text:p text:style-name="P53" loext:marker-style-name="T18"/>
      <text:h text:style-name="P54" text:outline-level="3" loext:marker-style-name="T20"><text:span text:style-name="T12">Criar a Função Lambda (pre-validacao-lambda-seu-nome)</text:span></text:h>
      <text:list xml:id="list4132348591" text:style-name="WWNum20">
        <text:list-item>
          <text:p text:style-name="P55" loext:marker-style-name="T5"><text:span text:style-name="T13">Acesse o serviço AWS Lambda no Console AWS.</text:span></text:p>
        </text:list-item>
        <text:list-item>
          <text:p text:style-name="P55" loext:marker-style-name="T5"><text:span text:style-name="T13">No menu à esquerda, clique em "</text:span><text:span text:style-name="T14">Functions</text:span><text:span text:style-name="T13">" e depois em "</text:span><text:span text:style-name="T14">Create function</text:span><text:span text:style-name="T13">".</text:span></text:p>
        </text:list-item>
        <text:list-item>
          <text:p text:style-name="P55" loext:marker-style-name="T5"><text:span text:style-name="T13">Selecione a opção "</text:span><text:span text:style-name="T14">Author from scratch</text:span><text:span text:style-name="T13">".</text:span></text:p>
        </text:list-item>
        <text:list-item>
          <text:p text:style-name="P55" loext:marker-style-name="T5"><text:span text:style-name="T13">Function name: </text:span><text:span text:style-name="T14">pre-validacao-lambda-seu-nome</text:span><text:span text:style-name="T13">.</text:span></text:p>
        </text:list-item>
        <text:list-item>
          <text:p text:style-name="P55" loext:marker-style-name="T5"><text:span text:style-name="T13">Runtime: Selecione </text:span><text:span text:style-name="T14">Python 3.12</text:span><text:span text:style-name="T13"> (ou uma versão mais recente suportada).</text:span></text:p>
        </text:list-item>
        <text:list-item>
          <text:p text:style-name="P55" loext:marker-style-name="T5"><text:span text:style-name="T13">Escolha a </text:span><text:span text:style-name="T14">role lambda-prevalidacao-role-seu-nome</text:span><text:span text:style-name="T13"> que você criou.</text:span></text:p>
        </text:list-item>
        <text:list-item>
          <text:p text:style-name="P55" loext:marker-style-name="T5"><text:span text:style-name="T13">Clique em "</text:span><text:span text:style-name="T14">Create function</text:span><text:span text:style-name="T13">".</text:span></text:p>
        </text:list-item>
        <text:list-item>
          <text:p text:style-name="P55" loext:marker-style-name="T5"><text:span text:style-name="T13">Configurar o Código e Variáveis de Ambiente. Na página da função Lambda, navegue até a aba "</text:span><text:span text:style-name="T14">Code</text:span><text:span text:style-name="T13">".</text:span></text:p>
        </text:list-item>
        <text:list-item>
          <text:p text:style-name="P56" loext:marker-style-name="T5"><text:span text:style-name="T13">No editor de código inline para o arquivo lambda_function.py, substitua o conteúdo existente pelo código Python que você encontra abaixo:</text:span></text:p>
        </text:list-item>
      </text:list>
      <text:p text:style-name="P57" loext:marker-style-name="T18"/>
      <text:p text:style-name="P58" loext:marker-style-name="T18"><text:span text:style-name="T21">import</text:span><text:span text:style-name="T16"> json</text:span></text:p>
      <text:p text:style-name="P59" loext:marker-style-name="T18"><text:span text:style-name="T21">import</text:span><text:span text:style-name="T16"> os</text:span></text:p>
      <text:p text:style-name="P59" loext:marker-style-name="T18"><text:span text:style-name="T21">import</text:span><text:span text:style-name="T16"> boto3</text:span></text:p>
      <text:p text:style-name="P60" loext:marker-style-name="T18"/>
      <text:p text:style-name="P59" loext:marker-style-name="T18"><text:span text:style-name="T16">SQS_QUEUE_URL = os.environ[</text:span><text:span text:style-name="T17">'SQS_QUEUE_URL'</text:span><text:span text:style-name="T16">]</text:span></text:p>
      <text:p text:style-name="P59" loext:marker-style-name="T18"><text:span text:style-name="T16">sqs = boto3.client(</text:span><text:span text:style-name="T17">'sqs'</text:span><text:span text:style-name="T16">)</text:span></text:p>
      <text:p text:style-name="P60" loext:marker-style-name="T18"/>
      <text:p text:style-name="P59" loext:marker-style-name="T18"><text:span text:style-name="T21">def</text:span><text:span text:style-name="T16"> lambda_handler(</text:span><text:span text:style-name="T21">event</text:span><text:span text:style-name="T16">, context):</text:span></text:p>
      <text:p text:style-name="P59" loext:marker-style-name="T18"><text:span text:style-name="T16">   </text:span><text:span text:style-name="T21">print</text:span><text:span text:style-name="T16">(f</text:span><text:span text:style-name="T17">"Evento recebido do API Gateway</text:span><text:span text:style-name="T16">:</text:span><text:span text:style-name="T17"> </text:span><text:span text:style-name="T16">{</text:span><text:span text:style-name="T17">event</text:span><text:span text:style-name="T16">}</text:span><text:span text:style-name="T17">"</text:span><text:span text:style-name="T16">)</text:span></text:p>
      <text:p text:style-name="P59" loext:marker-style-name="T18"><text:span text:style-name="T16">   </text:span><text:span text:style-name="T21">try</text:span><text:span text:style-name="T16">:</text:span></text:p>
      <text:p text:style-name="P59" loext:marker-style-name="T18"><text:span text:style-name="T16">       body_str = </text:span><text:span text:style-name="T21">event</text:span><text:span text:style-name="T16">.</text:span><text:span text:style-name="T21">get</text:span><text:span text:style-name="T16">(</text:span><text:span text:style-name="T17">'body'</text:span><text:span text:style-name="T16">, </text:span><text:span text:style-name="T17">'</text:span><text:span text:style-name="T16">{}</text:span><text:span text:style-name="T17">'</text:span><text:span text:style-name="T16">)</text:span></text:p>
      <text:p text:style-name="P59" loext:marker-style-name="T18"><text:span text:style-name="T16">       </text:span><text:span text:style-name="T21">if</text:span><text:span text:style-name="T16"> </text:span><text:span text:style-name="T21">not</text:span><text:span text:style-name="T16"> body_str:</text:span></text:p>
      <text:p text:style-name="P59" loext:marker-style-name="T18"><text:span text:style-name="T16">           body_str = </text:span><text:span text:style-name="T17">'</text:span><text:span text:style-name="T16">{}</text:span><text:span text:style-name="T17">'</text:span></text:p>
      <text:p text:style-name="P59" loext:marker-style-name="T18"><text:span text:style-name="T16">       body = json.loads(body_str)</text:span></text:p>
      <text:p text:style-name="P60" loext:marker-style-name="T18"/>
      <text:p text:style-name="P59" loext:marker-style-name="T18"><text:span text:style-name="T16">       pedido_id = body.</text:span><text:span text:style-name="T21">get</text:span><text:span text:style-name="T16">(</text:span><text:span text:style-name="T17">'pedidoId'</text:span><text:span text:style-name="T16">)</text:span></text:p>
      <text:p text:style-name="P59" loext:marker-style-name="T18"><text:span text:style-name="T16">       cliente_id = body.</text:span><text:span text:style-name="T21">get</text:span><text:span text:style-name="T16">(</text:span><text:span text:style-name="T17">'clienteId'</text:span><text:span text:style-name="T16">)</text:span></text:p>
      <text:p text:style-name="P60" loext:marker-style-name="T18"/>
      <text:p text:style-name="P59" loext:marker-style-name="T18"><text:span text:style-name="T16">       </text:span><text:span text:style-name="T21">if</text:span><text:span text:style-name="T16"> </text:span><text:span text:style-name="T21">not</text:span><text:span text:style-name="T16"> pedido_id </text:span><text:span text:style-name="T21">or</text:span><text:span text:style-name="T16"> </text:span><text:span text:style-name="T21">not</text:span><text:span text:style-name="T16"> cliente_id:</text:span></text:p>
      <text:p text:style-name="P59" loext:marker-style-name="T18"><text:span text:style-name="T16">           </text:span><text:span text:style-name="T21">print</text:span><text:span text:style-name="T16">(</text:span><text:span text:style-name="T17">"Erro</text:span><text:span text:style-name="T16">:</text:span><text:span text:style-name="T17"> pedidoId ou clienteId ausente</text:span><text:span text:style-name="T16">.</text:span><text:span text:style-name="T17">"</text:span><text:span text:style-name="T16">)</text:span></text:p>
      <text:p text:style-name="P59" loext:marker-style-name="T18"><text:span text:style-name="T16">           </text:span><text:span text:style-name="T21">return</text:span><text:span text:style-name="T16"> {</text:span></text:p>
      <text:p text:style-name="P59" loext:marker-style-name="T18"><text:span text:style-name="T16">               </text:span><text:span text:style-name="T17">'statusCode'</text:span><text:span text:style-name="T16">: </text:span><text:span text:style-name="T22">400</text:span><text:span text:style-name="T16">,</text:span></text:p>
      <text:p text:style-name="P59" loext:marker-style-name="T18"><text:soft-page-break/><text:span text:style-name="T16">               </text:span><text:span text:style-name="T17">'headers'</text:span><text:span text:style-name="T16">: {</text:span><text:span text:style-name="T17">'Content</text:span><text:span text:style-name="T16">-</text:span><text:span text:style-name="T17">Type'</text:span><text:span text:style-name="T16">: </text:span><text:span text:style-name="T17">'application/json'</text:span><text:span text:style-name="T16">},</text:span></text:p>
      <text:p text:style-name="P59" loext:marker-style-name="T18"><text:span text:style-name="T16">               </text:span><text:span text:style-name="T17">'body'</text:span><text:span text:style-name="T16">: json.dumps({</text:span><text:span text:style-name="T17">'message'</text:span><text:span text:style-name="T16">: </text:span><text:span text:style-name="T17">'pedidoId e clienteId são obrigatórios'</text:span><text:span text:style-name="T16">})</text:span></text:p>
      <text:p text:style-name="P59" loext:marker-style-name="T18"><text:span text:style-name="T16">           }</text:span></text:p>
      <text:p text:style-name="P60" loext:marker-style-name="T18"/>
      <text:p text:style-name="P59" loext:marker-style-name="T18"><text:span text:style-name="T16">       response = sqs.send_message(</text:span></text:p>
      <text:p text:style-name="P59" loext:marker-style-name="T18"><text:span text:style-name="T16">           QueueUrl=SQS_QUEUE_URL,</text:span></text:p>
      <text:p text:style-name="P59" loext:marker-style-name="T18"><text:span text:style-name="T16">           MessageBody=json.dumps(body),</text:span></text:p>
      <text:p text:style-name="P59" loext:marker-style-name="T18"><text:span text:style-name="T16">           MessageGroupId=str(pedido_id),</text:span></text:p>
      <text:p text:style-name="P59" loext:marker-style-name="T18"><text:span text:style-name="T16">           MessageDeduplicationId=str(context.aws_request_id)</text:span></text:p>
      <text:p text:style-name="P59" loext:marker-style-name="T18"><text:span text:style-name="T16">       )</text:span></text:p>
      <text:p text:style-name="P59" loext:marker-style-name="T18"><text:span text:style-name="T16">       </text:span><text:span text:style-name="T21">print</text:span><text:span text:style-name="T16">(f</text:span><text:span text:style-name="T17">"Mensagem enviada para SQS</text:span><text:span text:style-name="T16">:</text:span><text:span text:style-name="T17"> </text:span><text:span text:style-name="T16">{</text:span><text:span text:style-name="T17">response</text:span><text:span text:style-name="T16">[</text:span><text:span text:style-name="T17">'MessageId'</text:span><text:span text:style-name="T16">]}</text:span><text:span text:style-name="T17">"</text:span><text:span text:style-name="T16">)</text:span></text:p>
      <text:p text:style-name="P59" loext:marker-style-name="T18"><text:span text:style-name="T16">       </text:span><text:span text:style-name="T21">return</text:span><text:span text:style-name="T16"> {</text:span></text:p>
      <text:p text:style-name="P59" loext:marker-style-name="T18"><text:span text:style-name="T16">           </text:span><text:span text:style-name="T17">'statusCode'</text:span><text:span text:style-name="T16">: </text:span><text:span text:style-name="T22">200</text:span><text:span text:style-name="T16">,</text:span></text:p>
      <text:p text:style-name="P59" loext:marker-style-name="T18"><text:span text:style-name="T16">           </text:span><text:span text:style-name="T17">'headers'</text:span><text:span text:style-name="T16">: {</text:span><text:span text:style-name="T17">'Content</text:span><text:span text:style-name="T16">-</text:span><text:span text:style-name="T17">Type'</text:span><text:span text:style-name="T16">: </text:span><text:span text:style-name="T17">'application/json'</text:span><text:span text:style-name="T16">},</text:span></text:p>
      <text:p text:style-name="P59" loext:marker-style-name="T18"><text:span text:style-name="T16">           </text:span><text:span text:style-name="T17">'body'</text:span><text:span text:style-name="T16">: json.dumps({</text:span><text:span text:style-name="T17">'message'</text:span><text:span text:style-name="T16">: </text:span><text:span text:style-name="T17">'Pedido recebido e enfileirado'</text:span><text:span text:style-name="T16">, </text:span><text:span text:style-name="T17">'sqsMessageId'</text:span><text:span text:style-name="T16">: response[</text:span><text:span text:style-name="T17">'MessageId'</text:span><text:span text:style-name="T16">]})</text:span></text:p>
      <text:p text:style-name="P59" loext:marker-style-name="T18"><text:span text:style-name="T16">       }</text:span></text:p>
      <text:p text:style-name="P59" loext:marker-style-name="T18"><text:span text:style-name="T16">   </text:span><text:span text:style-name="T21">except</text:span><text:span text:style-name="T16"> json.JSONDecodeError:</text:span></text:p>
      <text:p text:style-name="P59" loext:marker-style-name="T18"><text:span text:style-name="T16">       </text:span><text:span text:style-name="T21">print</text:span><text:span text:style-name="T16">(</text:span><text:span text:style-name="T17">"Erro</text:span><text:span text:style-name="T16">:</text:span><text:span text:style-name="T17"> Corpo da requisição não é um JSON válido</text:span><text:span text:style-name="T16">.</text:span><text:span text:style-name="T17">"</text:span><text:span text:style-name="T16">)</text:span></text:p>
      <text:p text:style-name="P59" loext:marker-style-name="T18"><text:span text:style-name="T16">       </text:span><text:span text:style-name="T21">return</text:span><text:span text:style-name="T16"> {</text:span></text:p>
      <text:p text:style-name="P59" loext:marker-style-name="T18"><text:span text:style-name="T16">           </text:span><text:span text:style-name="T17">'statusCode'</text:span><text:span text:style-name="T16">: </text:span><text:span text:style-name="T22">400</text:span><text:span text:style-name="T16">,</text:span></text:p>
      <text:p text:style-name="P59" loext:marker-style-name="T18"><text:span text:style-name="T16">           </text:span><text:span text:style-name="T17">'headers'</text:span><text:span text:style-name="T16">: {</text:span><text:span text:style-name="T17">'Content</text:span><text:span text:style-name="T16">-</text:span><text:span text:style-name="T17">Type'</text:span><text:span text:style-name="T16">: </text:span><text:span text:style-name="T17">'application/json'</text:span><text:span text:style-name="T16">},</text:span></text:p>
      <text:p text:style-name="P59" loext:marker-style-name="T18"><text:span text:style-name="T16">           </text:span><text:span text:style-name="T17">'body'</text:span><text:span text:style-name="T16">: json.dumps({</text:span><text:span text:style-name="T17">'message'</text:span><text:span text:style-name="T16">: </text:span><text:span text:style-name="T17">'Corpo da requisição inválido</text:span><text:span text:style-name="T16">,</text:span><text:span text:style-name="T17"> não é um JSON válido'</text:span><text:span text:style-name="T16">})</text:span></text:p>
      <text:p text:style-name="P59" loext:marker-style-name="T18"><text:span text:style-name="T16">       }</text:span></text:p>
      <text:p text:style-name="P59" loext:marker-style-name="T18"><text:span text:style-name="T16">   </text:span><text:span text:style-name="T21">except</text:span><text:span text:style-name="T16"> Exception </text:span><text:span text:style-name="T21">as</text:span><text:span text:style-name="T16"> e:</text:span></text:p>
      <text:p text:style-name="P59" loext:marker-style-name="T18"><text:span text:style-name="T16">       </text:span><text:span text:style-name="T21">print</text:span><text:span text:style-name="T16">(f</text:span><text:span text:style-name="T17">"Erro inesperado</text:span><text:span text:style-name="T16">:</text:span><text:span text:style-name="T17"> </text:span><text:span text:style-name="T16">{</text:span><text:span text:style-name="T17">str</text:span><text:span text:style-name="T16">(</text:span><text:span text:style-name="T17">e</text:span><text:span text:style-name="T16">)}</text:span><text:span text:style-name="T17">"</text:span><text:span text:style-name="T16">)</text:span></text:p>
      <text:p text:style-name="P59" loext:marker-style-name="T18"><text:span text:style-name="T16">       </text:span><text:span text:style-name="T21">return</text:span><text:span text:style-name="T16"> {</text:span></text:p>
      <text:p text:style-name="P59" loext:marker-style-name="T18"><text:span text:style-name="T16">           </text:span><text:span text:style-name="T17">'statusCode'</text:span><text:span text:style-name="T16">: </text:span><text:span text:style-name="T22">500</text:span><text:span text:style-name="T16">,</text:span></text:p>
      <text:p text:style-name="P59" loext:marker-style-name="T18"><text:span text:style-name="T16">           </text:span><text:span text:style-name="T17">'headers'</text:span><text:span text:style-name="T16">: {</text:span><text:span text:style-name="T17">'Content</text:span><text:span text:style-name="T16">-</text:span><text:span text:style-name="T17">Type'</text:span><text:span text:style-name="T16">: </text:span><text:span text:style-name="T17">'application/json'</text:span><text:span text:style-name="T16">},</text:span></text:p>
      <text:p text:style-name="P59" loext:marker-style-name="T18"><text:span text:style-name="T16">           </text:span><text:span text:style-name="T17">'body'</text:span><text:span text:style-name="T16">: json.dumps({</text:span><text:span text:style-name="T17">'message'</text:span><text:span text:style-name="T16">: f</text:span><text:span text:style-name="T17">'Erro interno do servidor</text:span><text:span text:style-name="T16">:</text:span><text:span text:style-name="T17"> </text:span><text:span text:style-name="T16">{</text:span><text:span text:style-name="T17">str</text:span><text:span text:style-name="T16">(</text:span><text:span text:style-name="T17">e</text:span><text:span text:style-name="T16">)}</text:span><text:span text:style-name="T17">'</text:span><text:span text:style-name="T16">})</text:span></text:p>
      <text:p text:style-name="P61" loext:marker-style-name="T18"><text:span text:style-name="T23">      </text:span><text:span text:style-name="T16"> }</text:span></text:p>
      <text:p text:style-name="P57" loext:marker-style-name="T18"/>
      <text:list xml:id="list566426340" text:style-name="WWNum21">
        <text:list-item>
          <text:p text:style-name="P62" loext:marker-style-name="T5"><text:span text:style-name="T13">Clique no botão "</text:span><text:span text:style-name="T14">Deploy</text:span><text:span text:style-name="T13">" (acima do editor de código) para salvar as alterações.</text:span></text:p>
        </text:list-item>
        <text:list-item>
          <text:p text:style-name="P62" loext:marker-style-name="T5"><text:span text:style-name="T13">Navegue até a aba "</text:span><text:span text:style-name="T14">Configuration</text:span><text:span text:style-name="T13">" e selecione "</text:span><text:span text:style-name="T14">Environment variables</text:span><text:span text:style-name="T13">" no menu à esquerda.</text:span></text:p>
        </text:list-item>
        <text:list-item>
          <text:p text:style-name="P62" loext:marker-style-name="T5"><text:span text:style-name="T13">Clique em "</text:span><text:span text:style-name="T14">Edit</text:span><text:span text:style-name="T13">".</text:span></text:p>
        </text:list-item>
        <text:list-item>
          <text:p text:style-name="P63" loext:marker-style-name="T5"><text:span text:style-name="T13">Clique em "</text:span><text:span text:style-name="T14">Add environment variable</text:span><text:span text:style-name="T13">".</text:span></text:p>
        </text:list-item>
      </text:list>
      <text:list xml:id="list2506347862" text:style-name="WWNum22">
        <text:list-item>
          <text:p text:style-name="P64" loext:marker-style-name="T5"><text:span text:style-name="T14">Key</text:span><text:span text:style-name="T13">: SQS_QUEUE_URL</text:span></text:p>
        </text:list-item>
        <text:list-item>
          <text:p text:style-name="P65" loext:marker-style-name="T5"><text:span text:style-name="T14">Value</text:span><text:span text:style-name="T13">: Cole a URL da fila pedidos-fifo-queue-seu-nome.fifo (anotada anteriormente).</text:span></text:p>
        </text:list-item>
      </text:list>
      <text:list xml:id="list1067598959" text:style-name="WWNum23">
        <text:list-item>
          <text:p text:style-name="P66" loext:marker-style-name="T5"><text:span text:style-name="T13">Clique em "</text:span><text:span text:style-name="T14">Save</text:span><text:span text:style-name="T13">".</text:span></text:p>
        </text:list-item>
      </text:list>
      <text:p text:style-name="P51" loext:marker-style-name="T18"><draw:custom-shape text:anchor-type="as-char" draw:z-index="4" draw:name="AutoShape 7"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52" text:outline-level="2" loext:marker-style-name="T19"><text:span text:style-name="T4">Criação do Ponto de Entrada (Amazon API Gateway)</text:span></text:h>
      <text:p text:style-name="P51" loext:marker-style-name="T18"><text:soft-page-break/><text:span text:style-name="T13">Configuraremos um API Gateway para expor um endpoint REST que acionará nossa Lambda de pré-validação.</text:span></text:p>
      <text:p text:style-name="P53" loext:marker-style-name="T18"/>
      <text:h text:style-name="P54" text:outline-level="3" loext:marker-style-name="T20"><text:span text:style-name="T12">Criar a API REST (pedidos-api-seu-nome)</text:span></text:h>
      <text:list xml:id="list3705387081" text:style-name="WWNum24">
        <text:list-item>
          <text:p text:style-name="P67" loext:marker-style-name="T5"><text:span text:style-name="T13">Acesse o serviço Amazon API Gateway no Console AWS.</text:span></text:p>
        </text:list-item>
        <text:list-item>
          <text:p text:style-name="P67" loext:marker-style-name="T5"><text:span text:style-name="T13">No menu à esquerda, clique em "</text:span><text:span text:style-name="T14">APIs</text:span><text:span text:style-name="T13">" e depois em "</text:span><text:span text:style-name="T14">Create API</text:span><text:span text:style-name="T13">".</text:span></text:p>
        </text:list-item>
        <text:list-item>
          <text:p text:style-name="P67" loext:marker-style-name="T5"><text:span text:style-name="T13">Em "</text:span><text:span text:style-name="T14">Choose an API type</text:span><text:span text:style-name="T13">", selecione "</text:span><text:span text:style-name="T14">REST API</text:span><text:span text:style-name="T13">" clicando em Build.</text:span></text:p>
        </text:list-item>
        <text:list-item>
          <text:p text:style-name="P68" loext:marker-style-name="T5"><text:span text:style-name="T13">API details: </text:span></text:p>
        </text:list-item>
      </text:list>
      <text:list xml:id="list3589035935" text:style-name="WWNum25">
        <text:list-item>
          <text:p text:style-name="P69" loext:marker-style-name="T5"><text:span text:style-name="T13">Selecione "</text:span><text:span text:style-name="T14">New API</text:span><text:span text:style-name="T13">".</text:span></text:p>
        </text:list-item>
        <text:list-item>
          <text:p text:style-name="P70" loext:marker-style-name="T5"><text:span text:style-name="T13">API name: </text:span><text:span text:style-name="T14">pedidos-api-seu-nome</text:span></text:p>
        </text:list-item>
        <text:list-item>
          <text:p text:style-name="P71" loext:marker-style-name="T5"><text:span text:style-name="T13">Description: (Opcional) Ex: "</text:span><text:span text:style-name="T14">API para recebimento de pedidos do laboratório</text:span><text:span text:style-name="T13">".</text:span></text:p>
        </text:list-item>
        <text:list-item>
          <text:p text:style-name="P72" loext:marker-style-name="T5"><text:span text:style-name="T13">Endpoint Type: Selecione "</text:span><text:span text:style-name="T14">Regional</text:span><text:span text:style-name="T13">".</text:span></text:p>
        </text:list-item>
      </text:list>
      <text:list xml:id="list4069874400" text:style-name="WWNum26">
        <text:list-item>
          <text:p text:style-name="P73" loext:marker-style-name="T5"><text:span text:style-name="T13">Clique em "</text:span><text:span text:style-name="T14">Create API</text:span><text:span text:style-name="T13">".</text:span></text:p>
        </text:list-item>
      </text:list>
      <text:p text:style-name="P53" loext:marker-style-name="T18"/>
      <text:h text:style-name="P54" text:outline-level="3" loext:marker-style-name="T20"><text:span text:style-name="T24">Configurar o Recurso e Método POST</text:span></text:h>
      <text:list xml:id="list2684259326" text:style-name="WWNum27">
        <text:list-item>
          <text:p text:style-name="P74" loext:marker-style-name="T5"><text:span text:style-name="T13">Com sua nova API pedidos-api-seu-nome selecionada, no menu lateral, selecione "</text:span><text:span text:style-name="T14">Resource</text:span><text:span text:style-name="T13">" e escolha "</text:span><text:span text:style-name="T14">Create Resource</text:span><text:span text:style-name="T13">".</text:span></text:p>
        </text:list-item>
        <text:list-item>
          <text:p text:style-name="P75" loext:marker-style-name="T5"><text:span text:style-name="T13">Em Resource details:</text:span></text:p>
        </text:list-item>
      </text:list>
      <text:list xml:id="list4196725636" text:style-name="WWNum28">
        <text:list-item>
          <text:p text:style-name="P76" loext:marker-style-name="T5"><text:span text:style-name="T13">Resource Name: pedidos</text:span></text:p>
        </text:list-item>
        <text:list-item>
          <text:p text:style-name="P77" loext:marker-style-name="T5"><text:span text:style-name="T13">(O "</text:span><text:span text:style-name="T14">Resource Path</text:span><text:span text:style-name="T13">" será preenchido automaticamente como /pedidos)</text:span></text:p>
        </text:list-item>
        <text:list-item>
          <text:p text:style-name="P78" loext:marker-style-name="T5"><text:span text:style-name="T13">Clique em "</text:span><text:span text:style-name="T14">Create Resource</text:span><text:span text:style-name="T13">".</text:span></text:p>
        </text:list-item>
      </text:list>
      <text:list xml:id="list411139259" text:style-name="WWNum29">
        <text:list-item>
          <text:p text:style-name="P79" loext:marker-style-name="T5"><text:span text:style-name="T13">Com o recurso /pedidos selecionado na tela de recursos à direita, clique em "</text:span><text:span text:style-name="T14">Create Method</text:span><text:span text:style-name="T13">":</text:span></text:p>
        </text:list-item>
      </text:list>
      <text:list xml:id="list1195776276" text:style-name="WWNum30">
        <text:list-item>
          <text:p text:style-name="P80" loext:marker-style-name="T5"><text:span text:style-name="T13">Na página "</text:span><text:span text:style-name="T14">Create method</text:span><text:span text:style-name="T13">" do método POST:</text:span></text:p>
        </text:list-item>
      </text:list>
      <text:list xml:id="list2215221133" text:style-name="WWNum31">
        <text:list-item>
          <text:p text:style-name="P81" loext:marker-style-name="T5"><text:span text:style-name="T13">No menu suspenso "</text:span><text:span text:style-name="T14">Method type</text:span><text:span text:style-name="T13">", selecione POST.</text:span></text:p>
        </text:list-item>
        <text:list-item>
          <text:p text:style-name="P82" loext:marker-style-name="T5"><text:span text:style-name="T13">Integration type: Selecione "</text:span><text:span text:style-name="T14">Lambda Function</text:span><text:span text:style-name="T13">".</text:span></text:p>
        </text:list-item>
        <text:list-item>
          <text:p text:style-name="P83" loext:marker-style-name="T5"><text:span text:style-name="T13">Selecione "</text:span><text:span text:style-name="T14">Use Lambda Proxy integration</text:span><text:span text:style-name="T13">".</text:span></text:p>
        </text:list-item>
      </text:list>
      <text:list xml:id="list1606156958" text:style-name="WWNum32">
        <text:list-item>
          <text:p text:style-name="P84" loext:marker-style-name="T5"><text:span text:style-name="T13">Lambda Region: Certifique-se de que a região correta está selecionada (a região que você está utilizando nesse laboratório).</text:span></text:p>
        </text:list-item>
        <text:list-item>
          <text:p text:style-name="P85" loext:marker-style-name="T5"><text:span text:style-name="T13">Lambda Function: Comece a digitar</text:span><text:span text:style-name="T14"> pre-validacao-lambda-seu-nome</text:span><text:span text:style-name="T13"> e selecione sua função Lambda na lista que aparece.</text:span></text:p>
        </text:list-item>
        <text:list-item>
          <text:p text:style-name="P86" loext:marker-style-name="T5"><text:span text:style-name="T13">Clique em "</text:span><text:span text:style-name="T14">Create method</text:span><text:span text:style-name="T13">".</text:span></text:p>
        </text:list-item>
      </text:list>
      <text:p text:style-name="P22" loext:marker-style-name="T9"><text:soft-page-break/></text:p>
      <text:h text:style-name="P9" text:outline-level="3" loext:marker-style-name="T11"><text:span text:style-name="T12">Deploy da API</text:span></text:h>
      <text:p text:style-name="P12" loext:marker-style-name="T9"><text:span text:style-name="T13">Para que a API possa ser acessada externamente, precisamos fazer o deploy dela em um "</text:span><text:span text:style-name="T14">stage</text:span><text:span text:style-name="T13">".</text:span></text:p>
      <text:list xml:id="list3860781605" text:style-name="WWNum33">
        <text:list-item>
          <text:p text:style-name="P87" loext:marker-style-name="T5"><text:span text:style-name="T13">Com sua API selecionada, clique em "</text:span><text:span text:style-name="T14">Deploy API</text:span><text:span text:style-name="T13">" no canto direito superior.</text:span></text:p>
        </text:list-item>
      </text:list>
      <text:p text:style-name="P44" loext:marker-style-name="T9"/>
      <text:list xml:id="list1040575497" text:style-name="WWNum34">
        <text:list-item>
          <text:p text:style-name="P88" loext:marker-style-name="T5"><text:span text:style-name="T13">Na caixa de diálogo "</text:span><text:span text:style-name="T14">Deploy API</text:span><text:span text:style-name="T13">":</text:span></text:p>
        </text:list-item>
      </text:list>
      <text:list xml:id="list1648478639" text:style-name="WWNum35">
        <text:list-item>
          <text:p text:style-name="P89" loext:marker-style-name="T5"><text:span text:style-name="T13">Stage: Selecione "</text:span><text:span text:style-name="T14">[New Stage]</text:span><text:span text:style-name="T13">".</text:span></text:p>
        </text:list-item>
        <text:list-item>
          <text:p text:style-name="P90" loext:marker-style-name="T5"><text:span text:style-name="T13">Stage name: </text:span><text:span text:style-name="T14">dev</text:span><text:span text:style-name="T13">.</text:span></text:p>
        </text:list-item>
        <text:list-item>
          <text:p text:style-name="P91" loext:marker-style-name="T5"><text:span text:style-name="T13">Deployment description: </text:span><text:span text:style-name="T14">Estágio Dev. Versão 1</text:span><text:span text:style-name="T13"> (Opcional).</text:span></text:p>
        </text:list-item>
        <text:list-item>
          <text:p text:style-name="P92" loext:marker-style-name="T5"><text:span text:style-name="T13">Clique em "</text:span><text:span text:style-name="T14">Deploy</text:span><text:span text:style-name="T13">".</text:span></text:p>
        </text:list-item>
      </text:list>
      <text:list xml:id="list2571223563" text:style-name="WWNum36">
        <text:list-item>
          <text:p text:style-name="P93" loext:marker-style-name="T5"><text:span text:style-name="T13">Após o deploy, você será levado para a página do "</text:span><text:span text:style-name="T14">Stage Editor</text:span><text:span text:style-name="T13">". Expanda os detalhes do seu stage, clicando no sinal de “</text:span><text:span text:style-name="T14">+</text:span><text:span text:style-name="T13">”:</text:span></text:p>
        </text:list-item>
      </text:list>
      <text:list xml:id="list58803792" text:style-name="WWNum37">
        <text:list-item>
          <text:p text:style-name="P94" loext:marker-style-name="T5"><text:span text:style-name="T13">Anote a URL de Invocação (Invoke URL). Ela será usada para testar a API. Exemplo: https://abcdef123.execute-api.us-east-1.amazonaws.com/dev.</text:span></text:p>
        </text:list-item>
      </text:list>
      <text:p text:style-name="P22" loext:marker-style-name="T9"/>
      <text:h text:style-name="P9" text:outline-level="2" loext:marker-style-name="T3"><text:span text:style-name="T4">Teste Inicial do Fluxo de Ingestão (API -&gt; Lambda -&gt; SQS)</text:span></text:h>
      <text:p text:style-name="P10" loext:marker-style-name="T9"><text:span text:style-name="T13">Vamos verificar se a primeira parte do nosso fluxo está funcionando corretamente.</text:span></text:p>
      <text:p text:style-name="P22" loext:marker-style-name="T9"/>
      <text:h text:style-name="P9" text:outline-level="3" loext:marker-style-name="T11"><text:span text:style-name="T12">Enviar uma Requisição de Teste usando curl</text:span></text:h>
      <text:p text:style-name="P10" loext:marker-style-name="T9"><text:span text:style-name="T13">Você pode usar ferramentas como Postman, Insomnia ou o comando curl no terminal.</text:span></text:p>
      <text:p text:style-name="P12" loext:marker-style-name="T9"><text:span text:style-name="T13">Neste laboratório, vamos usar o curl, uma ferramenta de linha de comando que permite enviar requisições HTTP diretamente do terminal. Vamos testar a integração com sua API criada no Amazon API Gateway.</text:span></text:p>
      <text:list xml:id="list1560952843" text:style-name="WWNum38">
        <text:list-item>
          <text:p text:style-name="P95" loext:marker-style-name="T5"><text:span text:style-name="T13">Prepare a Requisição: Você enviará uma requisição POST para a URL da sua API com um payload em formato JSON. Utilize o comando que você encontrará abaixo e altere os valores abaixo:</text:span></text:p>
        </text:list-item>
      </text:list>
      <text:p text:style-name="P44" loext:marker-style-name="T9"/>
      <text:p text:style-name="P96" loext:marker-style-name="T9"><text:span text:style-name="T16">curl -X POST &lt;INVOKE_URL&gt;/pedidos \</text:span></text:p>
      <text:p text:style-name="P97" loext:marker-style-name="T9"><text:span text:style-name="T16"> -H </text:span><text:span text:style-name="T17">"Content</text:span><text:span text:style-name="T16">-</text:span><text:span text:style-name="T17">Type</text:span><text:span text:style-name="T16">:</text:span><text:span text:style-name="T17"> application/json"</text:span><text:span text:style-name="T16"> \</text:span></text:p>
      <text:p text:style-name="P97" loext:marker-style-name="T9"><text:span text:style-name="T16"> -d '{</text:span></text:p>
      <text:p text:style-name="P97" loext:marker-style-name="T9"><text:span text:style-name="T16">   </text:span><text:span text:style-name="T17">"pedidoId"</text:span><text:span text:style-name="T16">: </text:span><text:span text:style-name="T17">"lab001</text:span><text:span text:style-name="T16">-</text:span><text:span text:style-name="T17">seu</text:span><text:span text:style-name="T16">-</text:span><text:span text:style-name="T17">nome"</text:span><text:span text:style-name="T16">,</text:span></text:p>
      <text:p text:style-name="P97" loext:marker-style-name="T9"><text:span text:style-name="T16">   </text:span><text:span text:style-name="T17">"clienteId"</text:span><text:span text:style-name="T16">: </text:span><text:span text:style-name="T17">"clienteXYZ</text:span><text:span text:style-name="T16">-</text:span><text:span text:style-name="T17">seu</text:span><text:span text:style-name="T16">-</text:span><text:span text:style-name="T17">nome"</text:span><text:span text:style-name="T16">,</text:span></text:p>
      <text:p text:style-name="P97" loext:marker-style-name="T9"><text:span text:style-name="T16">   </text:span><text:span text:style-name="T17">"itens"</text:span><text:span text:style-name="T16">: [</text:span></text:p>
      <text:p text:style-name="P97" loext:marker-style-name="T9"><text:soft-page-break/><text:span text:style-name="T16">     {</text:span></text:p>
      <text:p text:style-name="P97" loext:marker-style-name="T9"><text:span text:style-name="T16">       </text:span><text:span text:style-name="T17">"produto"</text:span><text:span text:style-name="T16">: </text:span><text:span text:style-name="T17">"Caneta Azul"</text:span><text:span text:style-name="T16">,</text:span></text:p>
      <text:p text:style-name="P97" loext:marker-style-name="T9"><text:span text:style-name="T16">       </text:span><text:span text:style-name="T17">"quantidade"</text:span><text:span text:style-name="T16">: </text:span><text:span text:style-name="T22">10</text:span></text:p>
      <text:p text:style-name="P97" loext:marker-style-name="T9"><text:span text:style-name="T16">     },</text:span></text:p>
      <text:p text:style-name="P97" loext:marker-style-name="T9"><text:span text:style-name="T16">     {</text:span></text:p>
      <text:p text:style-name="P97" loext:marker-style-name="T9"><text:span text:style-name="T16">       </text:span><text:span text:style-name="T17">"produto"</text:span><text:span text:style-name="T16">: </text:span><text:span text:style-name="T17">"Caderno Universitário"</text:span><text:span text:style-name="T16">,</text:span></text:p>
      <text:p text:style-name="P97" loext:marker-style-name="T9"><text:span text:style-name="T16">       </text:span><text:span text:style-name="T17">"quantidade"</text:span><text:span text:style-name="T16">: </text:span><text:span text:style-name="T22">2</text:span></text:p>
      <text:p text:style-name="P97" loext:marker-style-name="T9"><text:span text:style-name="T16">     }</text:span></text:p>
      <text:p text:style-name="P97" loext:marker-style-name="T9"><text:span text:style-name="T16">   ]</text:span></text:p>
      <text:p text:style-name="P98" loext:marker-style-name="T9"><text:span text:style-name="T16"> }'</text:span></text:p>
      <text:p text:style-name="P44" loext:marker-style-name="T9"/>
      <text:list xml:id="list910714700" text:style-name="WWNum39">
        <text:list-item>
          <text:p text:style-name="P99" loext:marker-style-name="T5"><text:span text:style-name="T13">&lt;INVOKE_URL&gt;: URL de Invocação (Invoke URL) que você anotou anteriormente.</text:span></text:p>
        </text:list-item>
        <text:list-item>
          <text:p text:style-name="P100" loext:marker-style-name="T5"><text:span text:style-name="T13">pedidoId e clienteId: personalize com seus dados.</text:span></text:p>
        </text:list-item>
      </text:list>
      <text:list xml:id="list2500891134" text:style-name="WWNum40">
        <text:list-item>
          <text:p text:style-name="P101" loext:marker-style-name="T5"><text:span text:style-name="T13">Exemplo com URL fictício de como deverá ficar:</text:span></text:p>
        </text:list-item>
      </text:list>
      <text:p text:style-name="P44" loext:marker-style-name="T9"/>
      <text:p text:style-name="P102" loext:marker-style-name="T9"><text:span text:style-name="T16">curl -X POST https:</text:span><text:span text:style-name="T25">//abcdef123.execute-api.us-east-1.amazonaws.com/dev/pedidos \</text:span></text:p>
      <text:p text:style-name="P103" loext:marker-style-name="T9"><text:span text:style-name="T16"> -H </text:span><text:span text:style-name="T17">"Content</text:span><text:span text:style-name="T16">-</text:span><text:span text:style-name="T17">Type</text:span><text:span text:style-name="T16">:</text:span><text:span text:style-name="T17"> application/json"</text:span><text:span text:style-name="T16"> \</text:span></text:p>
      <text:p text:style-name="P103" loext:marker-style-name="T9"><text:span text:style-name="T16"> -d '{</text:span></text:p>
      <text:p text:style-name="P103" loext:marker-style-name="T9"><text:span text:style-name="T16">   </text:span><text:span text:style-name="T17">"pedidoId"</text:span><text:span text:style-name="T16">: </text:span><text:span text:style-name="T17">"labSemanaDev</text:span><text:span text:style-name="T16">-</text:span><text:span text:style-name="T17">josely"</text:span><text:span text:style-name="T16">,</text:span></text:p>
      <text:p text:style-name="P103" loext:marker-style-name="T9"><text:span text:style-name="T16">   </text:span><text:span text:style-name="T17">"clienteId"</text:span><text:span text:style-name="T16">: </text:span><text:span text:style-name="T17">"clienteXYZ</text:span><text:span text:style-name="T16">-</text:span><text:span text:style-name="T17">josely"</text:span><text:span text:style-name="T16">,</text:span></text:p>
      <text:p text:style-name="P103" loext:marker-style-name="T9"><text:span text:style-name="T16">   </text:span><text:span text:style-name="T17">"itens"</text:span><text:span text:style-name="T16">: [</text:span></text:p>
      <text:p text:style-name="P103" loext:marker-style-name="T9"><text:span text:style-name="T16">     {</text:span><text:span text:style-name="T17">"produto"</text:span><text:span text:style-name="T16">: </text:span><text:span text:style-name="T17">"Caneta Azul"</text:span><text:span text:style-name="T16">, </text:span><text:span text:style-name="T17">"quantidade"</text:span><text:span text:style-name="T16">: </text:span><text:span text:style-name="T22">10</text:span><text:span text:style-name="T16">},</text:span></text:p>
      <text:p text:style-name="P103" loext:marker-style-name="T9"><text:span text:style-name="T16">     {</text:span><text:span text:style-name="T17">"produto"</text:span><text:span text:style-name="T16">: </text:span><text:span text:style-name="T17">"Caderno Universitário"</text:span><text:span text:style-name="T16">, </text:span><text:span text:style-name="T17">"quantidade"</text:span><text:span text:style-name="T16">: </text:span><text:span text:style-name="T22">2</text:span><text:span text:style-name="T16">}</text:span></text:p>
      <text:p text:style-name="P103" loext:marker-style-name="T9"><text:span text:style-name="T16">   ]</text:span></text:p>
      <text:p text:style-name="P104" loext:marker-style-name="T9"><text:span text:style-name="T16"> }'</text:span></text:p>
      <text:p text:style-name="P105" loext:marker-style-name="T9"/>
      <text:p text:style-name="P106" loext:marker-style-name="T9"/>
      <text:list xml:id="list2539595543" text:style-name="WWNum41">
        <text:list-item>
          <text:p text:style-name="P107" loext:marker-style-name="T5"><text:span text:style-name="T13">Execute no terminal </text:span></text:p>
        </text:list-item>
      </text:list>
      <text:list xml:id="list2592378504" text:style-name="WWNum42">
        <text:list-item>
          <text:p text:style-name="P108" loext:marker-style-name="T5"><text:span text:style-name="T13">No Windows, você pode usar o Git Bash, PowerShell, WSL, terminal do VS Code ou o CloudShell.  Para este laboratório, estou utilizando o WSL, mas você pode usar o CloudShell e terá a mesma experiência. </text:span></text:p>
        </text:list-item>
      </text:list>
      <text:list xml:id="list2053356865" text:style-name="WWNum43">
        <text:list-item>
          <text:p text:style-name="P109" loext:marker-style-name="T5"><text:span text:style-name="T13">O Subsistema do Windows para Linux (WSL) é um recurso do Windows que permite executar um ambiente Linux em seu computador Windows, sem a necessidade de uma máquina virtual separada ou inicialização dupla. </text:span></text:p>
        </text:list-item>
      </text:list>
      <text:list xml:id="list3401648382" text:style-name="WWNum44">
        <text:list-item>
          <text:p text:style-name="P110" loext:marker-style-name="T5"><text:span text:style-name="T13">No Linux/macOS: use o terminal nativo. </text:span></text:p>
        </text:list-item>
      </text:list>
      <text:p text:style-name="P12" loext:marker-style-name="T9"><text:span text:style-name="T13">Após executar o comando, você deverá receber uma resposta da API indicando o sucesso ou falha do envio. </text:span></text:p>
      <text:list xml:id="list414462685" text:style-name="WWNum45">
        <text:list-item>
          <text:p text:style-name="P111" loext:marker-style-name="T5"><text:span text:style-name="T13">Resposta da API: Você deve receber uma resposta HTTP 200 OK com um corpo JSON semelhante a:</text:span></text:p>
        </text:list-item>
      </text:list>
      <text:p text:style-name="P44" loext:marker-style-name="T9"/>
      <text:p text:style-name="P96" loext:marker-style-name="T9"><text:soft-page-break/><text:span text:style-name="T16">{</text:span></text:p>
      <text:p text:style-name="P97" loext:marker-style-name="T9"><text:span text:style-name="T16"> </text:span><text:span text:style-name="T17">"message"</text:span><text:span text:style-name="T16">: </text:span><text:span text:style-name="T17">"Pedido recebido e enfileirado"</text:span><text:span text:style-name="T16">,</text:span></text:p>
      <text:p text:style-name="P97" loext:marker-style-name="T9"><text:span text:style-name="T16"> </text:span><text:span text:style-name="T17">"sqsMessageId"</text:span><text:span text:style-name="T16">: </text:span><text:span text:style-name="T17">"xxxxxxxx</text:span><text:span text:style-name="T16">-</text:span><text:span text:style-name="T17">xxxx</text:span><text:span text:style-name="T16">-</text:span><text:span text:style-name="T17">xxxx</text:span><text:span text:style-name="T16">-</text:span><text:span text:style-name="T17">xxxx</text:span><text:span text:style-name="T16">-</text:span><text:span text:style-name="T17">xxxxxxxxxxxx"</text:span></text:p>
      <text:p text:style-name="P98" loext:marker-style-name="T9"><text:span text:style-name="T16">}</text:span></text:p>
      <text:p text:style-name="P44" loext:marker-style-name="T9"/>
      <text:list xml:id="list3619565294" text:style-name="WWNum46">
        <text:list-item>
          <text:p text:style-name="P112" loext:marker-style-name="T5"><text:span text:style-name="T13">A saída esperada será algo parecido com a imagem abaixo:</text:span></text:p>
        </text:list-item>
      </text:list>
      <text:list xml:id="list2408782698" text:style-name="WWNum47">
        <text:list-item>
          <text:p text:style-name="P113" loext:marker-style-name="T5"><text:span text:style-name="T13">Logs da Lambda: </text:span></text:p>
        </text:list-item>
      </text:list>
      <text:list xml:id="list4294036546" text:style-name="WWNum48">
        <text:list-item>
          <text:p text:style-name="P114" loext:marker-style-name="T5"><text:span text:style-name="T13">Vá para o serviço CloudWatch no Console AWS. </text:span></text:p>
        </text:list-item>
        <text:list-item>
          <text:p text:style-name="P115" loext:marker-style-name="T5"><text:span text:style-name="T13">No menu à esquerda, selecione "</text:span><text:span text:style-name="T14">Log groups</text:span><text:span text:style-name="T13">". </text:span></text:p>
        </text:list-item>
        <text:list-item>
          <text:p text:style-name="P116" loext:marker-style-name="T5"><text:span text:style-name="T13">Encontre e clique no log group </text:span><text:span text:style-name="T14">/aws/lambda/pre-validacao-lambda-seu-nome</text:span><text:span text:style-name="T13">. </text:span></text:p>
        </text:list-item>
        <text:list-item>
          <text:p text:style-name="P115" loext:marker-style-name="T5"><text:span text:style-name="T13">Role para baixo até “</text:span><text:span text:style-name="T14">Log streams</text:span><text:span text:style-name="T13">”. </text:span></text:p>
        </text:list-item>
        <text:list-item>
          <text:p text:style-name="P117" loext:marker-style-name="T5"><text:span text:style-name="T13">Clique no log stream mais recente para ver os logs da execução. Você deve ver a mensagem "</text:span><text:span text:style-name="T14">Evento recebido do API Gateway</text:span><text:span text:style-name="T13">" e "</text:span><text:span text:style-name="T14">Mensagem enviada para SQS</text:span><text:span text:style-name="T13">": </text:span></text:p>
        </text:list-item>
      </text:list>
      <text:p text:style-name="P118" loext:marker-style-name="T9"/>
      <text:list xml:id="list3949980938" text:style-name="WWNum49">
        <text:list-item>
          <text:p text:style-name="P119" loext:marker-style-name="T5"><text:span text:style-name="T13">Mensagem na Fila SQS: </text:span></text:p>
        </text:list-item>
      </text:list>
      <text:list xml:id="list2167432165" text:style-name="WWNum50">
        <text:list-item>
          <text:p text:style-name="P120" loext:marker-style-name="T5"><text:span text:style-name="T13">Vá para o serviço SQS. </text:span></text:p>
        </text:list-item>
        <text:list-item>
          <text:p text:style-name="P121" loext:marker-style-name="T5"><text:span text:style-name="T13">Selecione sua fila </text:span><text:span text:style-name="T14">pedidos-fifo-queue-seu-nome.fifo</text:span><text:span text:style-name="T13">. </text:span></text:p>
        </text:list-item>
        <text:list-item>
          <text:p text:style-name="P122" loext:marker-style-name="T5"><text:span text:style-name="T13">Clique em "</text:span><text:span text:style-name="T14">Send and receive messages</text:span><text:span text:style-name="T13">". </text:span></text:p>
        </text:list-item>
        <text:list-item>
          <text:p text:style-name="P121" loext:marker-style-name="T5"><text:span text:style-name="T13">Na seção "</text:span><text:span text:style-name="T14">Receive messages</text:span><text:span text:style-name="T13">", clique em "</text:span><text:span text:style-name="T14">Poll for messages</text:span><text:span text:style-name="T13">". </text:span></text:p>
        </text:list-item>
        <text:list-item>
          <text:p text:style-name="P123" loext:marker-style-name="T5"><text:span text:style-name="T13">Você deverá ver uma mensagem na fila. Clique no ID da mensagem para ver seus detalhes e corpo. Não delete a mensagem ainda, pois ela será consumida pela próxima Lambda.</text:span></text:p>
        </text:list-item>
        <text:list-item>
          <text:p text:style-name="P124" loext:marker-style-name="T5"><text:span text:style-name="T13">Pode fechar clicando no “X”. </text:span></text:p>
        </text:list-item>
      </text:list>
      <text:p text:style-name="P22" loext:marker-style-name="T9"/>
      <text:h text:style-name="P9" text:outline-level="2" loext:marker-style-name="T3"><text:span text:style-name="T26">Configuração do Barramento de Eventos (Amazon EventBridge)</text:span></text:h>
      <text:p text:style-name="P22" loext:marker-style-name="T9"/>
      <text:p text:style-name="P45" loext:marker-style-name="T9"><text:span text:style-name="T6">O EventBridge permitirá que diferentes partes do nosso sistema reajam a eventos de forma desacoplada. Criaremos um barramento customizado para os eventos de nossos pedidos.</text:span></text:p>
      <text:p text:style-name="P105" loext:marker-style-name="T9"/>
      <text:h text:style-name="P34" text:outline-level="3" loext:marker-style-name="T11"><text:span text:style-name="T24">Criar o Custom Event Bus (pedidos-event-bus-seu-nome)</text:span></text:h>
      <text:list xml:id="list3903013629" text:style-name="WWNum51">
        <text:list-item>
          <text:p text:style-name="P125" loext:marker-style-name="T5"><text:span text:style-name="T6">Acesse o serviço </text:span><text:span text:style-name="T8">Amazon EventBridge</text:span><text:span text:style-name="T6"> no Console AWS.</text:span></text:p>
        </text:list-item>
      </text:list>
      <text:list xml:id="list1109474884" text:style-name="WWNum52">
        <text:list-item>
          <text:p text:style-name="P126" loext:marker-style-name="T5"><text:span text:style-name="T6">No menu à esquerda, selecione </text:span><text:span text:style-name="T8">"Event buses"</text:span><text:span text:style-name="T6">.</text:span></text:p>
        </text:list-item>
      </text:list>
      <text:list xml:id="list58822053" text:style-name="WWNum53">
        <text:list-item>
          <text:p text:style-name="P127" loext:marker-style-name="T5"><text:span text:style-name="T6">Clique em </text:span><text:span text:style-name="T8">"Create event bus"</text:span><text:span text:style-name="T6">.</text:span></text:p>
        </text:list-item>
      </text:list>
      <text:list xml:id="list1320845237" text:style-name="WWNum54">
        <text:list-item>
          <text:p text:style-name="P128" loext:marker-style-name="T5"><text:soft-page-break/><text:span text:style-name="T8">Name:</text:span><text:span text:style-name="T6"> pedidos-event-bus-seu-nome.</text:span></text:p>
        </text:list-item>
      </text:list>
      <text:list xml:id="list2561605291" text:style-name="WWNum55">
        <text:list-item>
          <text:p text:style-name="P129" loext:marker-style-name="T5"><text:span text:style-name="T6">Mantenha as outras opções padrão (não precisamos de Archive ou Schema Registry para este lab).</text:span></text:p>
        </text:list-item>
      </text:list>
      <text:list xml:id="list880187760" text:style-name="WWNum56">
        <text:list-item>
          <text:p text:style-name="P130" loext:marker-style-name="T5"><text:span text:style-name="T6">Clique em </text:span><text:span text:style-name="T8">"Create"</text:span><text:span text:style-name="T6">.</text:span></text:p>
        </text:list-item>
      </text:list>
      <text:list xml:id="list4237202382" text:style-name="WWNum57">
        <text:list-item>
          <text:p text:style-name="P131" loext:marker-style-name="T5"><text:span text:style-name="T8">Anote o ARN</text:span><text:span text:style-name="T6"> deste Event Bus. Ele será usado para configurar permissões e a Lambda.</text:span></text:p>
        </text:list-item>
      </text:list>
      <text:p text:style-name="P105" loext:marker-style-name="T9"/>
      <text:h text:style-name="P9" text:outline-level="3" loext:marker-style-name="T11"><text:span text:style-name="T24">Atualizar Permissões da Role de Validação de Pedidos</text:span></text:h>
      <text:p text:style-name="P132" loext:marker-style-name="T9"><text:span text:style-name="T6">Agora que a fila SQS e o Event Bus estão criados, vamos conceder à lambda-validacao-pedidos-role-seu-nome as permissões necessárias.</text:span></text:p>
      <text:list xml:id="list3273900341" text:style-name="WWNum58">
        <text:list-item>
          <text:p text:style-name="P133" loext:marker-style-name="T5"><text:span text:style-name="T6">Volte ao serviço </text:span><text:span text:style-name="T8">IAM</text:span><text:span text:style-name="T6">.</text:span></text:p>
        </text:list-item>
      </text:list>
      <text:list xml:id="list300812823" text:style-name="WWNum59">
        <text:list-item>
          <text:p text:style-name="P134" loext:marker-style-name="T5"><text:span text:style-name="T6">Clique em </text:span><text:span text:style-name="T8">"Roles"</text:span><text:span text:style-name="T6"> e encontre a role lambda-validacao-pedidos-role-seu-nome. Clique nela.</text:span></text:p>
        </text:list-item>
      </text:list>
      <text:list xml:id="list1257218095" text:style-name="WWNum60">
        <text:list-item>
          <text:p text:style-name="P135" loext:marker-style-name="T5"><text:span text:style-name="T6">Na aba </text:span><text:span text:style-name="T8">"Permissions"</text:span><text:span text:style-name="T6">, clique em </text:span><text:span text:style-name="T8">"Add permissions"</text:span><text:span text:style-name="T6"> e selecione </text:span><text:span text:style-name="T8">"Create inline policy"</text:span><text:span text:style-name="T6">.</text:span></text:p>
        </text:list-item>
      </text:list>
      <text:list xml:id="list641679017" text:style-name="WWNum61">
        <text:list-item>
          <text:p text:style-name="P136" loext:marker-style-name="T5"><text:span text:style-name="T6">Selecione a aba </text:span><text:span text:style-name="T8">JSON</text:span><text:span text:style-name="T6">.</text:span></text:p>
        </text:list-item>
      </text:list>
      <text:list xml:id="list39877210" text:style-name="WWNum62">
        <text:list-item>
          <text:p text:style-name="P137" loext:marker-style-name="T5"><text:span text:style-name="T6">Apague o código existente.</text:span></text:p>
        </text:list-item>
      </text:list>
      <text:list xml:id="list770636120" text:style-name="WWNum63">
        <text:list-item>
          <text:p text:style-name="P138" loext:marker-style-name="T5"><text:span text:style-name="T6">Cole o JSON abaixo</text:span><text:span text:style-name="T8">, </text:span><text:span text:style-name="T6">substituindo as seguintes informações:</text:span></text:p>
        </text:list-item>
      </text:list>
      <text:list xml:id="list168374987" text:style-name="WWNum64">
        <text:list-item>
          <text:p text:style-name="P139" loext:marker-style-name="T5"><text:span text:style-name="T27">COLE AQUI O ARN DA SUA FILA PRINCIPAL FIFO</text:span><text:span text:style-name="T28">: </text:span><text:span text:style-name="T6">Pelo o ARN da sua fila FIFO Principal. </text:span><text:span text:style-name="T8">Ex:</text:span><text:span text:style-name="T6"> arn:aws:sqs:us-east-1:237482015336:pedidos-fifo-queue-seu-nome.fifo</text:span></text:p>
        </text:list-item>
        <text:list-item>
          <text:p text:style-name="P140" loext:marker-style-name="T5"><text:span text:style-name="T29">COLE AQUI O ARN DO SEU EVENTBUS</text:span><text:span text:style-name="T6">: Pelo o ARN do Event bus recém-criado. </text:span><text:span text:style-name="T8">Ex:</text:span><text:span text:style-name="T6"> arn:aws:events:us-east-1:237482015336:event-bus/pedidos-event-bus-seu-nome</text:span></text:p>
        </text:list-item>
        <text:list-item>
          <text:p text:style-name="P141" loext:marker-style-name="T5"><text:span text:style-name="T6">Se dê algum erro ao colar o seu JSON, verifique se não tem espaços entre as aspas ao colar os seus ARNs do Event Bus e fila SQS.</text:span></text:p>
        </text:list-item>
      </text:list>
      <text:p text:style-name="P142" loext:marker-style-name="T9"/>
      <text:p text:style-name="P46" loext:marker-style-name="T9"><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p>
      <text:p text:style-name="P47" loext:marker-style-name="T9"><text:span text:style-name="T16">       </text:span><text:span text:style-name="T17">"sqs</text:span><text:span text:style-name="T16">:</text:span><text:span text:style-name="T17">ReceiveMessage"</text:span><text:span text:style-name="T16">,</text:span></text:p>
      <text:p text:style-name="P47" loext:marker-style-name="T9"><text:span text:style-name="T16">       </text:span><text:span text:style-name="T17">"sqs</text:span><text:span text:style-name="T16">:</text:span><text:span text:style-name="T17">DeleteMessage"</text:span><text:span text:style-name="T16">,</text:span></text:p>
      <text:p text:style-name="P47" loext:marker-style-name="T9"><text:span text:style-name="T16">       </text:span><text:span text:style-name="T17">"sqs</text:span><text:span text:style-name="T16">:</text:span><text:span text:style-name="T17">GetQueueAttributes"</text:span></text:p>
      <text:p text:style-name="P47" loext:marker-style-name="T9"><text:span text:style-name="T16">     ],</text:span></text:p>
      <text:p text:style-name="P47" loext:marker-style-name="T9"><text:span text:style-name="T16">     </text:span><text:span text:style-name="T17">"Resource"</text:span><text:span text:style-name="T16">: </text:span><text:span text:style-name="T17">"COLE AQUI O ARN DA SUA FILA PRINCIPAL FIFO"</text:span></text:p>
      <text:p text:style-name="P47" loext:marker-style-name="T9"><text:span text:style-name="T16">   },</text:span></text:p>
      <text:p text:style-name="P47" loext:marker-style-name="T9"><text:span text:style-name="T16">   {</text:span></text:p>
      <text:p text:style-name="P47" loext:marker-style-name="T9"><text:soft-page-break/><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span text:style-name="T17">"events</text:span><text:span text:style-name="T16">:</text:span><text:span text:style-name="T17">PutEvents"</text:span><text:span text:style-name="T16">,</text:span></text:p>
      <text:p text:style-name="P47" loext:marker-style-name="T9"><text:span text:style-name="T16">     </text:span><text:span text:style-name="T17">"Resource"</text:span><text:span text:style-name="T16">: </text:span><text:span text:style-name="T17">"COLE AQUI O ARN DO SEU EVENT BUS"</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143" loext:marker-style-name="T9"/>
      <text:list xml:id="list784615067" text:style-name="WWNum65">
        <text:list-item>
          <text:p text:style-name="P144" loext:marker-style-name="T5"><text:span text:style-name="T6">Clique em </text:span><text:span text:style-name="T8">"Next"</text:span><text:span text:style-name="T6">.</text:span></text:p>
        </text:list-item>
      </text:list>
      <text:list xml:id="list824713671" text:style-name="WWNum66">
        <text:list-item>
          <text:p text:style-name="P145" loext:marker-style-name="T5"><text:span text:style-name="T8">Policy name: </text:span><text:span text:style-name="T6">SQSReadEventBridgePutPolicy-seu-nome.</text:span></text:p>
        </text:list-item>
      </text:list>
      <text:list xml:id="list3419726888" text:style-name="WWNum67">
        <text:list-item>
          <text:p text:style-name="P146" loext:marker-style-name="T5"><text:span text:style-name="T6">Clique em </text:span><text:span text:style-name="T8">"Create policy"</text:span><text:span text:style-name="T6">.</text:span></text:p>
        </text:list-item>
      </text:list>
      <text:p text:style-name="P45" loext:marker-style-name="T9"><draw:custom-shape text:anchor-type="as-char" draw:z-index="5" draw:name="AutoShape 13"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26">Implementação da Lógica de Validação de Pedidos (AWS Lambda)</text:span></text:h>
      <text:p text:style-name="P45" loext:marker-style-name="T9"><text:span text:style-name="T6">Esta segunda função Lambda será acionada por novas mensagens na fila SQS, fará uma validação mais detalhada do pedido e publicará um evento no EventBridge.</text:span></text:p>
      <text:p text:style-name="P105" loext:marker-style-name="T9"/>
      <text:h text:style-name="P5" text:outline-level="3" loext:marker-style-name="T11"><text:span text:style-name="T12">Criar a Função Lambda (validacao-pedidos-lambda-seu-nome)</text:span></text:h>
      <text:list xml:id="list1829827296" text:style-name="WWNum68">
        <text:list-item>
          <text:p text:style-name="P147" loext:marker-style-name="T5"><text:span text:style-name="T6">Acesse o serviço </text:span><text:span text:style-name="T8">AWS Lambda</text:span><text:span text:style-name="T6">.</text:span></text:p>
        </text:list-item>
      </text:list>
      <text:list xml:id="list3538746293" text:style-name="WWNum69">
        <text:list-item>
          <text:p text:style-name="P148" loext:marker-style-name="T5"><text:span text:style-name="T6">Clique em </text:span><text:span text:style-name="T8">"Create function"</text:span><text:span text:style-name="T6">.</text:span></text:p>
        </text:list-item>
      </text:list>
      <text:list xml:id="list759619597" text:style-name="WWNum70">
        <text:list-item>
          <text:p text:style-name="P149" loext:marker-style-name="T5"><text:span text:style-name="T6">Selecione </text:span><text:span text:style-name="T8">"Author from scratch"</text:span><text:span text:style-name="T6">.</text:span></text:p>
        </text:list-item>
      </text:list>
      <text:list xml:id="list4021252257" text:style-name="WWNum71">
        <text:list-item>
          <text:p text:style-name="P150" loext:marker-style-name="T5"><text:span text:style-name="T8">Function name:</text:span><text:span text:style-name="T6"> validacao-pedidos-lambda-seu-nome.</text:span></text:p>
        </text:list-item>
      </text:list>
      <text:list xml:id="list1642562417" text:style-name="WWNum72">
        <text:list-item>
          <text:p text:style-name="P151" loext:marker-style-name="T5"><text:span text:style-name="T8">Runtime:</text:span><text:span text:style-name="T6"> Selecione </text:span><text:span text:style-name="T8">Python 3.12</text:span><text:span text:style-name="T6">.</text:span></text:p>
        </text:list-item>
      </text:list>
      <text:list xml:id="list4175987830" text:style-name="WWNum73">
        <text:list-item>
          <text:p text:style-name="P152" loext:marker-style-name="T5"><text:span text:style-name="T8">Escolha a role:</text:span><text:span text:style-name="T6"> lambda-validacao-pedidos-role-seu-nome.</text:span></text:p>
        </text:list-item>
      </text:list>
      <text:list xml:id="list3271659539" text:style-name="WWNum74">
        <text:list-item>
          <text:p text:style-name="P153" loext:marker-style-name="T5"><text:span text:style-name="T6">Clique em </text:span><text:span text:style-name="T8">"Create function"</text:span><text:span text:style-name="T6">.</text:span></text:p>
        </text:list-item>
        <text:list-item>
          <text:p text:style-name="P153" loext:marker-style-name="T5"><text:span text:style-name="T6">Configurar o Código, Variáveis de Ambiente e Trigger SQS</text:span></text:p>
        </text:list-item>
        <text:list-item>
          <text:p text:style-name="P154" loext:marker-style-name="T5"><text:span text:style-name="T6">Na página da função, aba </text:span><text:span text:style-name="T8">"Code"</text:span><text:span text:style-name="T6">, substitua o conteúdo de lambda_function.py pelo código em python que você encontrará abaixo.</text:span></text:p>
        </text:list-item>
      </text:list>
      <text:p text:style-name="P155" loext:marker-style-name="T9"/>
      <text:p text:style-name="P46" loext:marker-style-name="T9"><text:span text:style-name="T21">import</text:span><text:span text:style-name="T16"> json</text:span></text:p>
      <text:p text:style-name="P47" loext:marker-style-name="T9"><text:span text:style-name="T21">import</text:span><text:span text:style-name="T16"> os</text:span></text:p>
      <text:p text:style-name="P47" loext:marker-style-name="T9"><text:span text:style-name="T21">import</text:span><text:span text:style-name="T16"> boto3</text:span></text:p>
      <text:p text:style-name="P47" loext:marker-style-name="T9"><text:span text:style-name="T21">from</text:span><text:span text:style-name="T16"> datetime </text:span><text:span text:style-name="T21">import</text:span><text:span text:style-name="T16"> datetime</text:span></text:p>
      <text:p text:style-name="P156" loext:marker-style-name="T9"/>
      <text:p text:style-name="P47" loext:marker-style-name="T9"><text:span text:style-name="T16">EVENT_BUS_NAME = os.environ[</text:span><text:span text:style-name="T17">'EVENT_BUS_NAME'</text:span><text:span text:style-name="T16">]</text:span></text:p>
      <text:p text:style-name="P47" loext:marker-style-name="T9"><text:span text:style-name="T16">event_bridge = boto3.client(</text:span><text:span text:style-name="T17">'events'</text:span><text:span text:style-name="T16">)</text:span></text:p>
      <text:p text:style-name="P156" loext:marker-style-name="T9"/>
      <text:p text:style-name="P47" loext:marker-style-name="T9"><text:span text:style-name="T21">def</text:span><text:span text:style-name="T16"> lambda_handler(</text:span><text:span text:style-name="T21">event</text:span><text:span text:style-name="T16">, context):</text:span></text:p>
      <text:p text:style-name="P47" loext:marker-style-name="T9"><text:span text:style-name="T16">   </text:span><text:span text:style-name="T21">print</text:span><text:span text:style-name="T16">(f</text:span><text:span text:style-name="T17">"Evento SQS recebido</text:span><text:span text:style-name="T16">:</text:span><text:span text:style-name="T17"> </text:span><text:span text:style-name="T16">{</text:span><text:span text:style-name="T17">event</text:span><text:span text:style-name="T16">}</text:span><text:span text:style-name="T17">"</text:span><text:span text:style-name="T16">)</text:span></text:p>
      <text:p text:style-name="P47" loext:marker-style-name="T9"><text:span text:style-name="T16">   </text:span><text:span text:style-name="T21">for</text:span><text:span text:style-name="T16"> record </text:span><text:span text:style-name="T21">in</text:span><text:span text:style-name="T16"> event[</text:span><text:span text:style-name="T17">'Records'</text:span><text:span text:style-name="T16">]:</text:span></text:p>
      <text:p text:style-name="P47" loext:marker-style-name="T9"><text:span text:style-name="T16">       </text:span><text:span text:style-name="T21">try</text:span><text:span text:style-name="T16">:</text:span></text:p>
      <text:p text:style-name="P47" loext:marker-style-name="T9"><text:span text:style-name="T16">           pedido_data_str = record[</text:span><text:span text:style-name="T17">'body'</text:span><text:span text:style-name="T16">]</text:span></text:p>
      <text:p text:style-name="P47" loext:marker-style-name="T9"><text:soft-page-break/><text:span text:style-name="T16">           pedido_data = json.loads(pedido_data_str)</text:span></text:p>
      <text:p text:style-name="P47" loext:marker-style-name="T9"><text:span text:style-name="T16">           </text:span><text:span text:style-name="T21">print</text:span><text:span text:style-name="T16">(f</text:span><text:span text:style-name="T17">"Processando pedido do SQS</text:span><text:span text:style-name="T16">:</text:span><text:span text:style-name="T17"> </text:span><text:span text:style-name="T16">{</text:span><text:span text:style-name="T17">pedido_data</text:span><text:span text:style-name="T16">}</text:span><text:span text:style-name="T17">"</text:span><text:span text:style-name="T16">)</text:span></text:p>
      <text:p text:style-name="P156" loext:marker-style-name="T9"/>
      <text:p text:style-name="P47" loext:marker-style-name="T9"><text:span text:style-name="T16">           </text:span><text:span text:style-name="T21">if</text:span><text:span text:style-name="T16"> </text:span><text:span text:style-name="T21">not</text:span><text:span text:style-name="T16"> pedido_data.</text:span><text:span text:style-name="T21">get</text:span><text:span text:style-name="T16">(</text:span><text:span text:style-name="T17">'itens'</text:span><text:span text:style-name="T16">) </text:span><text:span text:style-name="T21">or</text:span><text:span text:style-name="T16"> </text:span><text:span text:style-name="T21">not</text:span><text:span text:style-name="T16"> isinstance(pedido_data.</text:span><text:span text:style-name="T21">get</text:span><text:span text:style-name="T16">(</text:span><text:span text:style-name="T17">'itens'</text:span><text:span text:style-name="T16">), </text:span><text:span text:style-name="T21">list</text:span><text:span text:style-name="T16">) </text:span><text:span text:style-name="T21">or</text:span><text:span text:style-name="T16"> len(pedido_data.</text:span><text:span text:style-name="T21">get</text:span><text:span text:style-name="T16">(</text:span><text:span text:style-name="T17">'itens'</text:span><text:span text:style-name="T16">)) == </text:span><text:span text:style-name="T22">0</text:span><text:span text:style-name="T16">:</text:span></text:p>
      <text:p text:style-name="P47" loext:marker-style-name="T9"><text:span text:style-name="T16">               </text:span><text:span text:style-name="T21">print</text:span><text:span text:style-name="T16">(f</text:span><text:span text:style-name="T17">"Erro de validação</text:span><text:span text:style-name="T16">:</text:span><text:span text:style-name="T17"> Pedido </text:span><text:span text:style-name="T16">{</text:span><text:span text:style-name="T17">pedido_data</text:span><text:span text:style-name="T16">.</text:span><text:span text:style-name="T17">get</text:span><text:span text:style-name="T16">(</text:span><text:span text:style-name="T17">'pedidoId'</text:span><text:span text:style-name="T16">)}</text:span><text:span text:style-name="T17"> não possui 'itens' válidos</text:span><text:span text:style-name="T16">.</text:span><text:span text:style-name="T17">"</text:span><text:span text:style-name="T16">)</text:span></text:p>
      <text:p text:style-name="P47" loext:marker-style-name="T9"><text:span text:style-name="T16">               </text:span><text:span text:style-name="T25"># Para o lab, se falhar aqui, a mensagem será removida da fila.</text:span></text:p>
      <text:p text:style-name="P47" loext:marker-style-name="T9"><text:span text:style-name="T16">               </text:span><text:span text:style-name="T25"># Se quiser que vá para a DLQ da SQS, levante uma exceção: raise ValueError("Itens inválidos")</text:span></text:p>
      <text:p text:style-name="P47" loext:marker-style-name="T9"><text:span text:style-name="T16">               </text:span><text:span text:style-name="T21">continue</text:span></text:p>
      <text:p text:style-name="P156" loext:marker-style-name="T9"/>
      <text:p text:style-name="P47" loext:marker-style-name="T9"><text:span text:style-name="T16">           </text:span><text:span text:style-name="T21">print</text:span><text:span text:style-name="T16">(f</text:span><text:span text:style-name="T17">"Pedido </text:span><text:span text:style-name="T16">{</text:span><text:span text:style-name="T17">pedido_data</text:span><text:span text:style-name="T16">.</text:span><text:span text:style-name="T17">get</text:span><text:span text:style-name="T16">(</text:span><text:span text:style-name="T17">'pedidoId'</text:span><text:span text:style-name="T16">)}</text:span><text:span text:style-name="T17"> validado com sucesso</text:span><text:span text:style-name="T16">.</text:span><text:span text:style-name="T17">"</text:span><text:span text:style-name="T16">)</text:span></text:p>
      <text:p text:style-name="P47" loext:marker-style-name="T9"><text:span text:style-name="T16">           </text:span><text:span text:style-name="T21">if</text:span><text:span text:style-name="T16"> </text:span><text:span text:style-name="T17">'timestamp'</text:span><text:span text:style-name="T16"> </text:span><text:span text:style-name="T21">not</text:span><text:span text:style-name="T16"> </text:span><text:span text:style-name="T21">in</text:span><text:span text:style-name="T16"> pedido_data:</text:span></text:p>
      <text:p text:style-name="P47" loext:marker-style-name="T9"><text:span text:style-name="T16">               pedido_data[</text:span><text:span text:style-name="T17">'timestamp'</text:span><text:span text:style-name="T16">] = datetime.utcnow().isoformat() + </text:span><text:span text:style-name="T17">"Z"</text:span></text:p>
      <text:p text:style-name="P156" loext:marker-style-name="T9"/>
      <text:p text:style-name="P47" loext:marker-style-name="T9"><text:span text:style-name="T16">           response = event_bridge.put_events(</text:span></text:p>
      <text:p text:style-name="P47" loext:marker-style-name="T9"><text:span text:style-name="T16">               Entries=[{</text:span></text:p>
      <text:p text:style-name="P47" loext:marker-style-name="T9"><text:span text:style-name="T16">                   </text:span><text:span text:style-name="T17">'Source'</text:span><text:span text:style-name="T16">: </text:span><text:span text:style-name="T17">'lab</text:span><text:span text:style-name="T16">.</text:span><text:span text:style-name="T17">aula1</text:span><text:span text:style-name="T16">.</text:span><text:span text:style-name="T17">pedidos</text:span><text:span text:style-name="T16">.</text:span><text:span text:style-name="T17">validacao'</text:span><text:span text:style-name="T16">,</text:span></text:p>
      <text:p text:style-name="P47" loext:marker-style-name="T9"><text:span text:style-name="T16">                   </text:span><text:span text:style-name="T17">'DetailType'</text:span><text:span text:style-name="T16">: </text:span><text:span text:style-name="T17">'NovoPedidoValidado'</text:span><text:span text:style-name="T16">,</text:span></text:p>
      <text:p text:style-name="P47" loext:marker-style-name="T9"><text:span text:style-name="T16">                   </text:span><text:span text:style-name="T17">'Detail'</text:span><text:span text:style-name="T16">: json.dumps(pedido_data),</text:span></text:p>
      <text:p text:style-name="P47" loext:marker-style-name="T9"><text:span text:style-name="T16">                   </text:span><text:span text:style-name="T17">'EventBusName'</text:span><text:span text:style-name="T16">: EVENT_BUS_NAME</text:span></text:p>
      <text:p text:style-name="P47" loext:marker-style-name="T9"><text:span text:style-name="T16">               }]</text:span></text:p>
      <text:p text:style-name="P47" loext:marker-style-name="T9"><text:span text:style-name="T16">           )</text:span></text:p>
      <text:p text:style-name="P47" loext:marker-style-name="T9"><text:span text:style-name="T16">           </text:span><text:span text:style-name="T21">print</text:span><text:span text:style-name="T16">(f</text:span><text:span text:style-name="T17">"Evento publicado no EventBridge</text:span><text:span text:style-name="T16">:</text:span><text:span text:style-name="T17"> </text:span><text:span text:style-name="T16">{</text:span><text:span text:style-name="T17">response</text:span><text:span text:style-name="T16">}</text:span><text:span text:style-name="T17">"</text:span><text:span text:style-name="T16">)</text:span></text:p>
      <text:p text:style-name="P156" loext:marker-style-name="T9"/>
      <text:p text:style-name="P47" loext:marker-style-name="T9"><text:span text:style-name="T16">       </text:span><text:span text:style-name="T21">except</text:span><text:span text:style-name="T16"> json.JSONDecodeError </text:span><text:span text:style-name="T21">as</text:span><text:span text:style-name="T16"> je:</text:span></text:p>
      <text:p text:style-name="P47" loext:marker-style-name="T9"><text:span text:style-name="T16">           </text:span><text:span text:style-name="T21">print</text:span><text:span text:style-name="T16">(f</text:span><text:span text:style-name="T17">"Erro de JSON ao processar registro </text:span><text:span text:style-name="T16">{</text:span><text:span text:style-name="T17">record</text:span><text:span text:style-name="T16">[</text:span><text:span text:style-name="T17">'messageId'</text:span><text:span text:style-name="T16">]}:</text:span><text:span text:style-name="T17"> </text:span><text:span text:style-name="T16">{</text:span><text:span text:style-name="T17">str</text:span><text:span text:style-name="T16">(</text:span><text:span text:style-name="T17">je</text:span><text:span text:style-name="T16">)}</text:span><text:span text:style-name="T17">"</text:span><text:span text:style-name="T16">)</text:span></text:p>
      <text:p text:style-name="P47" loext:marker-style-name="T9"><text:span text:style-name="T16">           </text:span><text:span text:style-name="T21">raise</text:span><text:span text:style-name="T16"> je  </text:span><text:span text:style-name="T25"># Envia para DLQ da SQS se houver erro de parse</text:span></text:p>
      <text:p text:style-name="P47" loext:marker-style-name="T9"><text:span text:style-name="T16">       </text:span><text:span text:style-name="T21">except</text:span><text:span text:style-name="T16"> Exception </text:span><text:span text:style-name="T21">as</text:span><text:span text:style-name="T16"> e:</text:span></text:p>
      <text:p text:style-name="P47" loext:marker-style-name="T9"><text:span text:style-name="T16">           </text:span><text:span text:style-name="T21">print</text:span><text:span text:style-name="T16">(f</text:span><text:span text:style-name="T17">"Erro geral ao processar registro </text:span><text:span text:style-name="T16">{</text:span><text:span text:style-name="T17">record</text:span><text:span text:style-name="T16">[</text:span><text:span text:style-name="T17">'messageId'</text:span><text:span text:style-name="T16">]}:</text:span><text:span text:style-name="T17"> </text:span><text:span text:style-name="T16">{</text:span><text:span text:style-name="T17">str</text:span><text:span text:style-name="T16">(</text:span><text:span text:style-name="T17">e</text:span><text:span text:style-name="T16">)}</text:span><text:span text:style-name="T17">"</text:span><text:span text:style-name="T16">)</text:span></text:p>
      <text:p text:style-name="P47" loext:marker-style-name="T9"><text:span text:style-name="T16">           </text:span><text:span text:style-name="T21">raise</text:span><text:span text:style-name="T16"> e  </text:span><text:span text:style-name="T25"># Envia para DLQ da SQS</text:span></text:p>
      <text:p text:style-name="P48" loext:marker-style-name="T9"><text:span text:style-name="T16">   </text:span><text:span text:style-name="T21">return</text:span><text:span text:style-name="T16"> {</text:span><text:span text:style-name="T17">'statusCode'</text:span><text:span text:style-name="T16">: </text:span><text:span text:style-name="T22">200</text:span><text:span text:style-name="T16">, </text:span><text:span text:style-name="T17">'body'</text:span><text:span text:style-name="T16">: </text:span><text:span text:style-name="T17">'Processamento de mensagens SQS concluído'</text:span><text:span text:style-name="T16">}</text:span></text:p>
      <text:p text:style-name="P155" loext:marker-style-name="T9"/>
      <text:list xml:id="list1231644984" text:style-name="WWNum75">
        <text:list-item>
          <text:p text:style-name="P157" loext:marker-style-name="T5"><text:span text:style-name="T6">Clique em </text:span><text:span text:style-name="T8">"Deploy"</text:span><text:span text:style-name="T6">.</text:span></text:p>
        </text:list-item>
        <text:list-item>
          <text:p text:style-name="P157" loext:marker-style-name="T5"><text:span text:style-name="T6">Vá para a aba </text:span><text:span text:style-name="T8">"Configuration"</text:span><text:span text:style-name="T6"> &gt; </text:span><text:span text:style-name="T8">"Environment variables"</text:span><text:span text:style-name="T6">.</text:span></text:p>
        </text:list-item>
        <text:list-item>
          <text:p text:style-name="P158" loext:marker-style-name="T5"><text:span text:style-name="T6">Clique em </text:span><text:span text:style-name="T8">"Edit"</text:span><text:span text:style-name="T6">, depois em </text:span><text:span text:style-name="T8">"Add environment variable"</text:span><text:span text:style-name="T6">.</text:span></text:p>
        </text:list-item>
      </text:list>
      <text:list xml:id="list1414132596" text:style-name="WWNum76">
        <text:list-item>
          <text:p text:style-name="P159" loext:marker-style-name="T5"><text:span text:style-name="T8">Key:</text:span><text:span text:style-name="T6"> EVENT_BUS_NAME</text:span></text:p>
        </text:list-item>
        <text:list-item>
          <text:p text:style-name="P160" loext:marker-style-name="T5"><text:span text:style-name="T8">Value:</text:span><text:span text:style-name="T6"> pedidos-event-bus-seu-nome (o nome do seu Event Bus).</text:span></text:p>
        </text:list-item>
      </text:list>
      <text:list xml:id="list1208632452" text:style-name="WWNum77">
        <text:list-item>
          <text:p text:style-name="P161" loext:marker-style-name="T5"><text:span text:style-name="T6">Clique em </text:span><text:span text:style-name="T8">"Save"</text:span><text:span text:style-name="T6">.</text:span></text:p>
        </text:list-item>
        <text:list-item>
          <text:p text:style-name="P161" loext:marker-style-name="T5"><text:span text:style-name="T6">Ainda na aba </text:span><text:span text:style-name="T8">"Configuration"</text:span><text:span text:style-name="T6">, selecione </text:span><text:span text:style-name="T8">"Triggers"</text:span><text:span text:style-name="T6"> no menu à esquerda.</text:span></text:p>
        </text:list-item>
        <text:list-item>
          <text:p text:style-name="P161" loext:marker-style-name="T5"><text:span text:style-name="T6">Clique em </text:span><text:span text:style-name="T8">"Add trigger"</text:span><text:span text:style-name="T6">.</text:span></text:p>
        </text:list-item>
        <text:list-item>
          <text:p text:style-name="P162" loext:marker-style-name="T5"><text:span text:style-name="T8">Trigger configuration:</text:span></text:p>
        </text:list-item>
      </text:list>
      <text:list xml:id="list1656563594" text:style-name="WWNum78">
        <text:list-item>
          <text:p text:style-name="P163" loext:marker-style-name="T5"><text:soft-page-break/><text:span text:style-name="T6">No menu suspenso, selecione </text:span><text:span text:style-name="T8">"SQS"</text:span><text:span text:style-name="T6"> como a fonte.</text:span></text:p>
        </text:list-item>
        <text:list-item>
          <text:p text:style-name="P164" loext:marker-style-name="T5"><text:span text:style-name="T8">SQS queue:</text:span><text:span text:style-name="T6"> Selecione sua fila pedidos-fifo-queue-seu-nome.fifo.</text:span></text:p>
        </text:list-item>
        <text:list-item>
          <text:p text:style-name="P165" loext:marker-style-name="T5"><text:span text:style-name="T8">Batch size:</text:span><text:span text:style-name="T6"> Defina como 1 (isso é importante para processamento FIFO e para que a Lambda processe uma mensagem por invocação).</text:span></text:p>
        </text:list-item>
        <text:list-item>
          <text:p text:style-name="P166" loext:marker-style-name="T5"><text:span text:style-name="T6">Clique em </text:span><text:span text:style-name="T8">"Add"</text:span><text:span text:style-name="T6">.</text:span></text:p>
        </text:list-item>
      </text:list>
      <text:p text:style-name="P45" loext:marker-style-name="T9"><draw:custom-shape text:anchor-type="as-char" draw:z-index="6" draw:name="AutoShape 14"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26">Teste Completo do Fluxo do DIA 1</text:span></text:h>
      <text:p text:style-name="P132" loext:marker-style-name="T9"><text:span text:style-name="T6">Agora, vamos testar todo o fluxo construído nesta aula. Se você ainda tem a mensagem do teste anterior na fila SQS (pedidos-fifo-queue-seu-nome.fifo), a Lambda validacao-pedidos-lambda-seu-nome deverá processá-la automaticamente em breve. Caso contrário, enviar uma nova requisição. repita o passo "Enviar uma Requisição de Teste usando curl"</text:span></text:p>
      <text:list xml:id="list2604046456" text:style-name="WWNum79">
        <text:list-item>
          <text:p text:style-name="P167" loext:marker-style-name="T5"><text:span text:style-name="T6">Use curl para enviar uma </text:span><text:span text:style-name="T8">nova</text:span><text:span text:style-name="T6"> requisição POST para sua API Gateway, mas com um pedidoId diferente:</text:span></text:p>
        </text:list-item>
      </text:list>
      <text:p text:style-name="P168" loext:marker-style-name="T9"/>
      <text:p text:style-name="P46" loext:marker-style-name="T9"><text:span text:style-name="T16">curl -X POST &lt;INVOKE_URL&gt;/pedidos \</text:span></text:p>
      <text:p text:style-name="P47" loext:marker-style-name="T9"><text:span text:style-name="T16"> -H </text:span><text:span text:style-name="T17">"Content</text:span><text:span text:style-name="T16">-</text:span><text:span text:style-name="T17">Type</text:span><text:span text:style-name="T16">:</text:span><text:span text:style-name="T17"> application/json"</text:span><text:span text:style-name="T16"> \</text:span></text:p>
      <text:p text:style-name="P47" loext:marker-style-name="T9"><text:span text:style-name="T16"> -d '{</text:span></text:p>
      <text:p text:style-name="P47" loext:marker-style-name="T9"><text:span text:style-name="T16">   </text:span><text:span text:style-name="T17">"pedidoId"</text:span><text:span text:style-name="T16">: </text:span><text:span text:style-name="T17">"lab001</text:span><text:span text:style-name="T16">-</text:span><text:span text:style-name="T17">seu</text:span><text:span text:style-name="T16">-</text:span><text:span text:style-name="T17">nome"</text:span><text:span text:style-name="T16">,</text:span></text:p>
      <text:p text:style-name="P47" loext:marker-style-name="T9"><text:span text:style-name="T16">   </text:span><text:span text:style-name="T17">"clienteId"</text:span><text:span text:style-name="T16">: </text:span><text:span text:style-name="T17">"clienteABC</text:span><text:span text:style-name="T16">-</text:span><text:span text:style-name="T17">seu</text:span><text:span text:style-name="T16">-</text:span><text:span text:style-name="T17">nome"</text:span><text:span text:style-name="T16">,</text:span></text:p>
      <text:p text:style-name="P47" loext:marker-style-name="T9"><text:span text:style-name="T16">   </text:span><text:span text:style-name="T17">"itens"</text:span><text:span text:style-name="T16">: [</text:span></text:p>
      <text:p text:style-name="P47" loext:marker-style-name="T9"><text:span text:style-name="T16">     {</text:span><text:span text:style-name="T17">"produto"</text:span><text:span text:style-name="T16">: </text:span><text:span text:style-name="T17">"Borracha Branca"</text:span><text:span text:style-name="T16">, </text:span><text:span text:style-name="T17">"quantidade"</text:span><text:span text:style-name="T16">: </text:span><text:span text:style-name="T22">5</text:span><text:span text:style-name="T16">}</text:span></text:p>
      <text:p text:style-name="P47" loext:marker-style-name="T9"><text:span text:style-name="T16">   ]</text:span></text:p>
      <text:p text:style-name="P48" loext:marker-style-name="T9"><text:span text:style-name="T16"> }'</text:span></text:p>
      <text:p text:style-name="P143" loext:marker-style-name="T9"/>
      <text:list xml:id="list2910356286" text:style-name="WWNum80">
        <text:list-item>
          <text:p text:style-name="P169" loext:marker-style-name="T5"><text:span text:style-name="T8">&lt;INVOKE_URL&gt;</text:span><text:span text:style-name="T6">: URL de Invocação (Invoke URL). Ex: </text:span><text:a xlink:type="simple" xlink:href="https://rtc9oh0au6.execute-api.us-east-1.amazonaws.com/dev" office:target-frame-name="_blank" xlink:show="new" text:style-name="ListLabel_20_821" text:visited-style-name="ListLabel_20_821"><text:span text:style-name="T30">https://rtc9oh0au6.execute-api.us-east-1.amazonaws.com/dev</text:span></text:a></text:p>
        </text:list-item>
        <text:list-item>
          <text:p text:style-name="P170" loext:marker-style-name="T5"><text:span text:style-name="T8">pedidoId</text:span><text:span text:style-name="T6"> e </text:span><text:span text:style-name="T8">clienteId</text:span><text:span text:style-name="T6">: personalize com seus dados.</text:span></text:p>
        </text:list-item>
      </text:list>
      <text:p text:style-name="P105" loext:marker-style-name="T9"/>
      <text:h text:style-name="P5" text:outline-level="3" loext:marker-style-name="T11"><text:span text:style-name="T24">Verificar o Fluxo Completo</text:span></text:h>
      <text:list xml:id="list1013659792" text:style-name="WWNum81">
        <text:list-item>
          <text:p text:style-name="P171" loext:marker-style-name="T5"><text:span text:style-name="T8">Logs da pre-validacao-lambda-seu-nome:</text:span><text:span text:style-name="T6"> Verifique os logs no CloudWatch para confirmar que a API acionou está Lambda e que ela enviou a mensagem para a SQS: </text:span></text:p>
        </text:list-item>
      </text:list>
      <text:list xml:id="list1778840170" text:style-name="WWNum82">
        <text:list-item>
          <text:p text:style-name="P172" loext:marker-style-name="T5"><text:span text:style-name="T8">Fila SQS:</text:span><text:span text:style-name="T6"> Ela deve ser consumida rapidamente.</text:span></text:p>
        </text:list-item>
      </text:list>
      <text:list xml:id="list1129151658" text:style-name="WWNum83">
        <text:list-item>
          <text:p text:style-name="P173" loext:marker-style-name="T5"><text:span text:style-name="T8">Logs da validacao-pedidos-lambda-seu-nome:</text:span><text:span text:style-name="T6"> Verifique os logs no CloudWatch para esta Lambda. Você deve ver:</text:span></text:p>
        </text:list-item>
      </text:list>
      <text:list xml:id="list2889757078" text:style-name="WWNum84">
        <text:list-item>
          <text:p text:style-name="P174" loext:marker-style-name="T5"><text:span text:style-name="T6">"Evento SQS recebido".</text:span></text:p>
        </text:list-item>
        <text:list-item>
          <text:p text:style-name="P175" loext:marker-style-name="T5"><text:span text:style-name="T6">"Processando pedido do SQS".</text:span></text:p>
        </text:list-item>
        <text:list-item>
          <text:p text:style-name="P176" loext:marker-style-name="T5"><text:soft-page-break/><text:span text:style-name="T6">"Pedido X validado com sucesso".</text:span></text:p>
        </text:list-item>
        <text:list-item>
          <text:p text:style-name="P177" loext:marker-style-name="T5"><text:span text:style-name="T6">"Evento publicado no EventBridge".</text:span></text:p>
        </text:list-item>
      </text:list>
      <text:p text:style-name="P178" loext:marker-style-name="T9"/>
      <text:list xml:id="list2994001046" text:style-name="WWNum85">
        <text:list-item>
          <text:p text:style-name="P179" loext:marker-style-name="T5"><text:span text:style-name="T8">EventBridge Monitoring:</text:span></text:p>
        </text:list-item>
      </text:list>
      <text:list xml:id="list1450407847" text:style-name="WWNum86">
        <text:list-item>
          <text:p text:style-name="P180" loext:marker-style-name="T5"><text:span text:style-name="T6">Vá para </text:span><text:span text:style-name="T8">Amazon EventBridge</text:span><text:span text:style-name="T6"> &gt; </text:span><text:span text:style-name="T8">"Event buses"</text:span><text:span text:style-name="T6">.</text:span></text:p>
        </text:list-item>
        <text:list-item>
          <text:p text:style-name="P181" loext:marker-style-name="T5"><text:span text:style-name="T6">Selecione seu pedidos-event-bus-seu-nome.</text:span></text:p>
        </text:list-item>
        <text:list-item>
          <text:p text:style-name="P182" loext:marker-style-name="T5"><text:span text:style-name="T6">Clique na aba </text:span><text:span text:style-name="T8">"Monitoring"</text:span><text:span text:style-name="T6">.</text:span></text:p>
        </text:list-item>
        <text:list-item>
          <text:p text:style-name="P183" loext:marker-style-name="T5"><text:span text:style-name="T6">Você deverá ver um aumento na métrica PutEvents_Invocations ou MatchedEvents (pode levar alguns minutos para os gráficos atualizarem). Para uma verificação mais imediata de que o evento chegou, na próxima aula configuraremos uma regra que envia esses eventos para uma nova fila SQS.</text:span></text:p>
        </text:list-item>
      </text:list>
      <text:p text:style-name="P45" loext:marker-style-name="T9"><draw:custom-shape text:anchor-type="as-char" draw:z-index="7" draw:name="AutoShape 17"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4">Conclusão da Aula 1</text:span></text:h>
      <text:p text:style-name="P132" loext:marker-style-name="T9"><text:span text:style-name="T6">Parabéns! Você construiu com sucesso a primeira etapa da nossa arquitetura, implementando um fluxo de ingestão de pedidos que utiliza API Gateway, Lambda, SQS FIFO e EventBridge. Você aprendeu a:</text:span></text:p>
      <text:list xml:id="list2106845274" text:style-name="WWNum87">
        <text:list-item>
          <text:p text:style-name="P184" loext:marker-style-name="T31"><text:span text:style-name="T6">Criar e configurar IAM Roles para permissões granulares.</text:span></text:p>
        </text:list-item>
      </text:list>
      <text:list xml:id="list3194321094" text:style-name="WWNum88">
        <text:list-item>
          <text:p text:style-name="P185" loext:marker-style-name="T31"><text:span text:style-name="T6">Configurar filas SQS FIFO com DLQs.</text:span></text:p>
        </text:list-item>
      </text:list>
      <text:list xml:id="list3773693743" text:style-name="WWNum89">
        <text:list-item>
          <text:p text:style-name="P186" loext:marker-style-name="T31"><text:span text:style-name="T6">Desenvolver funções Lambda em Python para processamento de dados.</text:span></text:p>
        </text:list-item>
      </text:list>
      <text:list xml:id="list3670147085" text:style-name="WWNum90">
        <text:list-item>
          <text:p text:style-name="P187" loext:marker-style-name="T31"><text:span text:style-name="T6">Expor Lambdas como endpoints REST usando API Gateway.</text:span></text:p>
        </text:list-item>
      </text:list>
      <text:list xml:id="list2432165749" text:style-name="WWNum91">
        <text:list-item>
          <text:p text:style-name="P188" loext:marker-style-name="T31"><text:span text:style-name="T6">Publicar eventos customizados em um EventBridge.</text:span></text:p>
        </text:list-item>
      </text:list>
      <text:p text:style-name="P45" loext:marker-style-name="T9"><text:span text:style-name="T6">Na próxima aula, nos concentraremos na ingestão de arquivos via S3, outra forma comum de entrada de dados em sistemas.</text:span></text:p>
      <text:p text:style-name="P2"/>
      <text:p text:style-name="P1" loext:marker-style-name="T32"><text:span text:style-name="T32">SEMANA DO DESENVOLVEDOR - DIA 2</text:span></text:p>
      <text:p text:style-name="P1" loext:marker-style-name="T32"><text:span text:style-name="T32">Ingestão de Arquivos via S3, Rastreamento e Integração com o Fluxo Principal de Pedidos</text:span></text:p>
      <text:p text:style-name="P2"/>
      <text:p text:style-name="P2" loext:marker-style-name="T2"><text:span text:style-name="T2">Visão Geral e Objetivos da Aula </text:span></text:p>
      <text:p text:style-name="P2">Na aula anterior, estabelecemos o fluxo de ingestão de pedidos via API. Nesta segunda aula, vamos implementar um canal alternativo para a entrada de pedidos: o processamento de arquivos JSON enviados para um bucket S3. Esta funcionalidade é crucial para cenários onde pedidos são recebidos em lote ou de sistemas externos que geram arquivos. </text:p>
      <text:p text:style-name="P2"/>
      <text:p text:style-name="P2">O objetivo é configurar um bucket S3. Quando um novo arquivo JSON for carregado, uma notificação do S3 enviará um evento para uma fila SQS Standard. Uma função Lambda será acionada por esta fila, fará o download do arquivo, validará seu conteúdo e, crucialmente, se o arquivo contiver dados de pedidos válidos, esses pedidos serão transformados e enviados para a mesma Amazon SQS FIFO Pedidos que é utilizada pelo fluxo da API (criada na Aula 1). Além disso, o resultado da validação do arquivo será registrado em uma tabela DynamoDB e, em caso de erro na validação do arquivo, uma notificação será enviada via SNS. </text:p>
      <text:p text:style-name="P2"><text:soft-page-break/></text:p>
      <text:p text:style-name="P2" loext:marker-style-name="T2"><text:span text:style-name="T2">Arquitetura completa</text:span></text:p>
      <text:p text:style-name="P2"/>
      <text:p text:style-name="P2"><draw:frame draw:style-name="fr1" draw:name="Imagem 1 Copia 1" text:anchor-type="as-char" svg:width="15cm" svg:height="9.364cm" draw:z-index="8"><draw:image xlink:href="Pictures/1000000100000304000001E23B5F5543.png" xlink:type="simple" xlink:show="embed" xlink:actuate="onLoad" draw:mime-type="image/png"/></draw:frame></text:p>
      <text:p text:style-name="P2" loext:marker-style-name="T2"><text:span text:style-name="T2">Arquitetura construida no dia 02</text:span></text:p>
      <text:p text:style-name="P2"><draw:frame draw:style-name="fr1" draw:name="Figura2 Copia 1" text:anchor-type="as-char" svg:width="15cm" svg:height="9.62cm" draw:z-index="9"><draw:image xlink:href="Pictures/10000001000002C7000001C8705BEBD8.png" xlink:type="simple" xlink:show="embed" xlink:actuate="onLoad" draw:mime-type="image/png"/></draw:frame></text:p>
      <text:p text:style-name="P2"/>
      <text:p text:style-name="P12" loext:marker-style-name="T9"><text:span text:style-name="T14">Ao final desta aula, você terá:</text:span></text:p>
      <text:list xml:id="list105243144246537" text:continue-list="list547355127" text:style-name="WWNum1">
        <text:list-item>
          <text:p text:style-name="P189" loext:marker-style-name="T5"><text:span text:style-name="T13">Um bucket S3 configurado para receber arquivos JSON de pedidos. </text:span></text:p>
        </text:list-item>
        <text:list-item>
          <text:p text:style-name="P189" loext:marker-style-name="T5"><text:span text:style-name="T13">Duas filas SQS Standard para desacoplar o processamento inicial dos arquivos. </text:span></text:p>
        </text:list-item>
        <text:list-item>
          <text:p text:style-name="P189" loext:marker-style-name="T5"><text:span text:style-name="T13">Uma função Lambda para validar arquivos JSON do S3, extrair pedidos e enviá-los para o pipeline principal.</text:span></text:p>
        </text:list-item>
        <text:list-item>
          <text:p text:style-name="P189" loext:marker-style-name="T5"><text:soft-page-break/><text:span text:style-name="T13">Uma tabela DynamoDB para rastrear o histórico de validação de arquivos. </text:span></text:p>
        </text:list-item>
        <text:list-item>
          <text:p text:style-name="P189" loext:marker-style-name="T5"><text:span text:style-name="T13">Um tópico SNS para notificações de erro na validação de arquivos.</text:span></text:p>
        </text:list-item>
        <text:list-item>
          <text:p text:style-name="P190" loext:marker-style-name="T5"><text:span text:style-name="T13">A integração efetiva de uma segunda fonte de pedidos no sistema. </text:span></text:p>
        </text:list-item>
      </text:list>
      <text:p text:style-name="P22" loext:marker-style-name="T9"/>
      <text:p text:style-name="P12" loext:marker-style-name="T9"><text:span text:style-name="T14">Recursos a Serem Criados Nesta Aula:</text:span></text:p>
      <text:list xml:id="list105242364641037" text:continue-list="list3991426341" text:style-name="WWNum2">
        <text:list-item>
          <text:p text:style-name="P191" loext:marker-style-name="T5"><text:span text:style-name="T13">IAM Role: lambda-s3-validation-role-seu-nome (criação e adição de permissões)  </text:span></text:p>
        </text:list-item>
        <text:list-item>
          <text:p text:style-name="P191" loext:marker-style-name="T5"><text:span text:style-name="T13">Amazon S3 Bucket: datalake-arquivos-seu-nome </text:span></text:p>
        </text:list-item>
        <text:list-item>
          <text:p text:style-name="P191" loext:marker-style-name="T5"><text:span text:style-name="T13">Amazon SQS DLQ (Standard): s3-arquivos-json-dlq-seu-nome </text:span></text:p>
        </text:list-item>
        <text:list-item>
          <text:p text:style-name="P191" loext:marker-style-name="T5"><text:span text:style-name="T13">Amazon SQS Queue (Standard): s3-arquivos-json-queue-seu-nome </text:span></text:p>
        </text:list-item>
        <text:list-item>
          <text:p text:style-name="P191" loext:marker-style-name="T5"><text:span text:style-name="T13">AWS Lambda Function: validacao-s3-arquivos-lambda-seu-nome </text:span></text:p>
        </text:list-item>
        <text:list-item>
          <text:p text:style-name="P191" loext:marker-style-name="T5"><text:span text:style-name="T13">Amazon DynamoDB Table: controle-arquivos-historico-seu-nome </text:span></text:p>
        </text:list-item>
        <text:list-item>
          <text:p text:style-name="P192" loext:marker-style-name="T5"><text:span text:style-name="T13">Amazon SNS Topic: notificacao-erro-arquivos-seu-nome </text:span></text:p>
        </text:list-item>
      </text:list>
      <text:p text:style-name="P10" loext:marker-style-name="T9"><text:span text:style-name="T14">Lembrete Importante</text:span><text:span text:style-name="T13">: Substitua seu-nome em todos os nomes de recursos. Trabalhe consistentemente na mesma região AWS. </text:span></text:p>
      <text:p text:style-name="P22" loext:marker-style-name="T9"/>
      <text:h text:style-name="P5" text:outline-level="3" loext:marker-style-name="T11"><text:span text:style-name="T12">Atenção</text:span></text:h>
      <text:p text:style-name="P193" loext:marker-style-name="T33"><text:span text:style-name="T34">A interface do Console de Gerenciamento da AWS pode sofrer pequenas alterações visuais ao longo do tempo, mas os conceitos e a localização geral dos serviços  permanecem consistentes. As instruções neste resumo seguem a estrutura geral das funcionalidades.</text:span></text:p>
      <text:p text:style-name="P22" loext:marker-style-name="T9"/>
      <text:h text:style-name="P5" text:outline-level="2" loext:marker-style-name="T3"><text:span text:style-name="T4">Início</text:span></text:h>
      <text:list xml:id="list105244330290581" text:continue-list="list319434661" text:style-name="WWNum3">
        <text:list-item>
          <text:p text:style-name="P6" loext:marker-style-name="T5"><text:span text:style-name="T6">Acesse o </text:span><text:a xlink:type="simple" xlink:href="https://console.aws.amazon.com/" office:target-frame-name="_blank" xlink:show="new" text:style-name="ListLabel_20_1180" text:visited-style-name="ListLabel_20_1180"><text:span text:style-name="T7">console de gerenciamento da AWS</text:span></text:a><text:span text:style-name="T6"> com a conta fornecida pela Escola da Nuvem. Caso apresente a mensagem de erro “</text:span><text:span text:style-name="T8">The credential in your login link were invalid. Please contact your administrator</text:span><text:span text:style-name="T6">.” abaixo, clique no texto em azul onde consta a informação “</text:span><text:span text:style-name="T8">To logout, click here</text:span><text:span text:style-name="T6">”. </text:span></text:p>
        </text:list-item>
        <text:list-item>
          <text:p text:style-name="P7" loext:marker-style-name="T5"><text:span text:style-name="T6">Após efetuar login, irá mostrar o console de gerenciamento da AWS. Sempre confira, no canto superior direito do console, qual a conta está logada, para evitar acessar com a conta incorreta e evitar gastos desnecessários.  </text:span></text:p>
        </text:list-item>
      </text:list>
      <text:p text:style-name="P8" loext:marker-style-name="T9"/>
      <text:h text:style-name="P9" text:outline-level="2" loext:marker-style-name="T3"><text:span text:style-name="T4">Acesso controlado no console AWS</text:span></text:h>
      <text:p text:style-name="P10" loext:marker-style-name="T9"><text:span text:style-name="T6">Os recursos liberados serão limitados para permitir apenas o necessário no laboratório. Mensagens de erro serão comuns de aparecer, caso tente acessar algum recurso não liberado na sua conta ou mesmo ao abrir algum serviço com </text:span><text:soft-page-break/><text:span text:style-name="T6">limitações. Porém sempre siga à risca os passos propostos neste e em outros laboratórios. </text:span></text:p>
      <text:p text:style-name="P22" loext:marker-style-name="T9"/>
      <text:h text:style-name="P23" text:outline-level="2" loext:marker-style-name="T3"><text:span text:style-name="T4">Configuração de Permissões (IAM Role)</text:span></text:h>
      <text:p text:style-name="P10" loext:marker-style-name="T9"><text:span text:style-name="T6">Criaremos uma IAM Role para a Lambda que processará os arquivos do S3. Esta role precisará de permissões para ler do S3, ler da SQS (Arquivos JSON), escrever no DynamoDB (Controle Arquivo Histórico), publicar no SNS e, </text:span><text:span text:style-name="T8">importante, enviar mensagens para a Amazon SQS FIFO Pedidos (criada na Aula 1)</text:span><text:span text:style-name="T6">.</text:span></text:p>
      <text:p text:style-name="P22" loext:marker-style-name="T9"/>
      <text:h text:style-name="P194" text:outline-level="3" loext:marker-style-name="T11"><text:span text:style-name="T12">Criar Role para a Lambda de Validação de Arquivos S3 (lambda-s3-validation-role-seu-nome)</text:span></text:h>
      <text:list xml:id="list105242978578698" text:continue-list="list2347465547" text:style-name="WWNum4">
        <text:list-item>
          <text:p text:style-name="P13" loext:marker-style-name="T5"><text:span text:style-name="T6">Acesse o serviço </text:span><text:span text:style-name="T8">IAM</text:span><text:span text:style-name="T6"> no Console AWS.</text:span></text:p>
        </text:list-item>
      </text:list>
      <text:list xml:id="list105244179289028" text:continue-list="list848479036" text:style-name="WWNum5">
        <text:list-item>
          <text:p text:style-name="P195" loext:marker-style-name="T5"><text:span text:style-name="T6">No menu à esquerda, clique em </text:span><text:span text:style-name="T8">"Roles"</text:span><text:span text:style-name="T6"> e depois em </text:span><text:span text:style-name="T8">"Create role"</text:span><text:span text:style-name="T6">.</text:span></text:p>
        </text:list-item>
      </text:list>
      <text:list xml:id="list105243824998497" text:continue-list="list224559068" text:style-name="WWNum6">
        <text:list-item>
          <text:p text:style-name="P17" loext:marker-style-name="T5"><text:span text:style-name="T8">Trusted entity type:</text:span><text:span text:style-name="T6"> Selecione </text:span><text:span text:style-name="T8">"AWS service"</text:span><text:span text:style-name="T6">.</text:span></text:p>
        </text:list-item>
      </text:list>
      <text:list xml:id="list105242913486159" text:continue-list="list3744548746" text:style-name="WWNum7">
        <text:list-item>
          <text:p text:style-name="P196" loext:marker-style-name="T5"><text:span text:style-name="T8">Use case:</text:span><text:span text:style-name="T6"> Selecione </text:span><text:span text:style-name="T8">"Lambda"</text:span><text:span text:style-name="T6"> e clique em </text:span><text:span text:style-name="T8">"Next"</text:span><text:span text:style-name="T6">.</text:span></text:p>
        </text:list-item>
      </text:list>
      <text:list xml:id="list105242965681886" text:continue-list="list3425248626" text:style-name="WWNum8">
        <text:list-item>
          <text:p text:style-name="P20" loext:marker-style-name="T5"><text:span text:style-name="T6">Na página </text:span><text:span text:style-name="T8">"Add permissions"</text:span><text:span text:style-name="T6">:</text:span></text:p>
        </text:list-item>
      </text:list>
      <text:list xml:id="list105243738050371" text:continue-list="list3051085963" text:style-name="WWNum9">
        <text:list-item>
          <text:p text:style-name="P21" loext:marker-style-name="T5"><text:span text:style-name="T6">Procure pela política AWSLambdaBasicExecutionRole e marque-a.</text:span></text:p>
        </text:list-item>
        <text:list-item>
          <text:p text:style-name="P197" loext:marker-style-name="T5"><text:span text:style-name="T6">Clique em </text:span><text:span text:style-name="T8">"Next"</text:span><text:span text:style-name="T6">.</text:span></text:p>
        </text:list-item>
      </text:list>
      <text:list xml:id="list105242957719350" text:continue-list="list4034833537" text:style-name="WWNum10">
        <text:list-item>
          <text:p text:style-name="P24" loext:marker-style-name="T5"><text:span text:style-name="T8">Role details</text:span><text:span text:style-name="T6">:</text:span></text:p>
        </text:list-item>
      </text:list>
      <text:list xml:id="list105242778644761" text:continue-list="list3959817239" text:style-name="WWNum11">
        <text:list-item>
          <text:p text:style-name="P26" loext:marker-style-name="T5"><text:span text:style-name="T8">Role name:</text:span><text:span text:style-name="T6"> lambda-s3-validation-role-seu-nome</text:span></text:p>
        </text:list-item>
        <text:list-item>
          <text:p text:style-name="P27" loext:marker-style-name="T5"><text:span text:style-name="T8">Description:</text:span><text:span text:style-name="T6"> (Opcional) Ex: "Role para Lambda de validacao de arquivos S3 e envio para SQS FIFO Pedidos".</text:span></text:p>
        </text:list-item>
      </text:list>
      <text:list xml:id="list105243073776411" text:continue-list="list2599281561" text:style-name="WWNum12">
        <text:list-item>
          <text:p text:style-name="P28" loext:marker-style-name="T5"><text:span text:style-name="T6">Clique em </text:span><text:span text:style-name="T8">"Create role"</text:span><text:span text:style-name="T6">.</text:span></text:p>
        </text:list-item>
      </text:list>
      <text:list xml:id="list105243622956533" text:continue-list="list845793351" text:style-name="WWNum13">
        <text:list-item>
          <text:p text:style-name="P30" loext:marker-style-name="T5"><text:span text:style-name="T28">Nota: Após criar os outros recursos, voltaremos a esta role para adicionar as permissões específicas.</text:span></text:p>
        </text:list-item>
      </text:list>
      <text:p text:style-name="P10" loext:marker-style-name="T9"><draw:custom-shape text:anchor-type="as-char" draw:z-index="10" draw:name="AutoShape 4"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figuração do Enfileiramento de Mensagens (Amazon SQS Standard - para arquivos)</text:span></text:h>
      <text:p text:style-name="P10" loext:marker-style-name="T9"><text:span text:style-name="T6">Esta fila receberá notificações do S3 sobre novos arquivos.</text:span></text:p>
      <text:p text:style-name="P22" loext:marker-style-name="T9"/>
      <text:h text:style-name="P194" text:outline-level="3" loext:marker-style-name="T11"><text:span text:style-name="T12">Criar a Fila de Mensagens Mortas (DLQ) (s3-arquivos-json-dlq-seu-nome)</text:span></text:h>
      <text:list xml:id="list105244481856648" text:continue-list="list456741475" text:style-name="WWNum14">
        <text:list-item>
          <text:p text:style-name="P32" loext:marker-style-name="T5"><text:span text:style-name="T6">Acesse o serviço </text:span><text:span text:style-name="T8">Amazon SQS</text:span><text:span text:style-name="T6">.</text:span></text:p>
        </text:list-item>
      </text:list>
      <text:list xml:id="list105244414603084" text:continue-list="list932320243" text:style-name="WWNum15">
        <text:list-item>
          <text:p text:style-name="P35" loext:marker-style-name="T5"><text:span text:style-name="T6">Clique em </text:span><text:span text:style-name="T8">"Create queue"</text:span><text:span text:style-name="T6">.</text:span></text:p>
        </text:list-item>
      </text:list>
      <text:list xml:id="list105242736531321" text:continue-list="list3950535145" text:style-name="WWNum16">
        <text:list-item>
          <text:p text:style-name="P198" loext:marker-style-name="T5"><text:span text:style-name="T8">Type:</text:span><text:span text:style-name="T6"> Selecione </text:span><text:span text:style-name="T8">"Standard"</text:span><text:span text:style-name="T6">.</text:span></text:p>
        </text:list-item>
      </text:list>
      <text:list xml:id="list105244472800870" text:continue-list="list1860802164" text:style-name="WWNum17">
        <text:list-item>
          <text:p text:style-name="P40" loext:marker-style-name="T5"><text:span text:style-name="T8">Name:</text:span><text:span text:style-name="T6"> s3-arquivos-json-dlq-seu-nome.</text:span></text:p>
        </text:list-item>
      </text:list>
      <text:list xml:id="list105243732901898" text:continue-list="list267770750" text:style-name="WWNum18">
        <text:list-item>
          <text:p text:style-name="P42" loext:marker-style-name="T5"><text:span text:style-name="T6">Clique em </text:span><text:span text:style-name="T8">"Create queue"</text:span><text:span text:style-name="T6">.</text:span></text:p>
        </text:list-item>
      </text:list>
      <text:list xml:id="list105243482828199" text:continue-list="list2480161655" text:style-name="WWNum19">
        <text:list-item>
          <text:p text:style-name="P199" loext:marker-style-name="T5"><text:soft-page-break/><text:span text:style-name="T8">Anote o ARN</text:span><text:span text:style-name="T6"> desta DLQ.</text:span></text:p>
        </text:list-item>
      </text:list>
      <text:p text:style-name="P22" loext:marker-style-name="T9"/>
      <text:h text:style-name="P194" text:outline-level="3" loext:marker-style-name="T11"><text:span text:style-name="T12">Criar a Fila Principal de Arquivos JSON (s3-arquivos-json-queue-seu-nome)</text:span></text:h>
      <text:list xml:id="list105243047903222" text:continue-list="list4132348591" text:style-name="WWNum20">
        <text:list-item>
          <text:p text:style-name="P200" loext:marker-style-name="T5"><text:span text:style-name="T6">Ainda no </text:span><text:span text:style-name="T8">SQS</text:span><text:span text:style-name="T6">, clique em </text:span><text:span text:style-name="T8">Queues</text:span><text:span text:style-name="T6">, no menu lateral.</text:span></text:p>
        </text:list-item>
      </text:list>
      <text:list xml:id="list105243097089877" text:continue-list="list566426340" text:style-name="WWNum21">
        <text:list-item>
          <text:p text:style-name="P201" loext:marker-style-name="T5"><text:span text:style-name="T6">Clique em </text:span><text:span text:style-name="T8">"Create queue"</text:span><text:span text:style-name="T6">.</text:span></text:p>
        </text:list-item>
      </text:list>
      <text:list xml:id="list105242768920834" text:continue-list="list2506347862" text:style-name="WWNum22">
        <text:list-item>
          <text:p text:style-name="P202" loext:marker-style-name="T5"><text:span text:style-name="T8">Type:</text:span><text:span text:style-name="T6"> Selecione </text:span><text:span text:style-name="T8">"Standard"</text:span><text:span text:style-name="T6">.</text:span></text:p>
        </text:list-item>
      </text:list>
      <text:list xml:id="list105243058384211" text:continue-list="list1067598959" text:style-name="WWNum23">
        <text:list-item>
          <text:p text:style-name="P203" loext:marker-style-name="T5"><text:span text:style-name="T8">Name:</text:span><text:span text:style-name="T6"> s3-arquivos-json-queue-seu-nome.</text:span></text:p>
        </text:list-item>
      </text:list>
      <text:list xml:id="list105243894740804" text:continue-list="list3705387081" text:style-name="WWNum24">
        <text:list-item>
          <text:p text:style-name="P204" loext:marker-style-name="T5"><text:span text:style-name="T6">Na seção </text:span><text:span text:style-name="T8">"Configuration":</text:span></text:p>
        </text:list-item>
      </text:list>
      <text:list xml:id="list105243611075804" text:continue-list="list3589035935" text:style-name="WWNum25">
        <text:list-item>
          <text:p text:style-name="P205" loext:marker-style-name="T5"><text:span text:style-name="T8">Visibility timeout:</text:span><text:span text:style-name="T6"> 30.</text:span></text:p>
        </text:list-item>
      </text:list>
      <text:list xml:id="list105243745799960" text:continue-list="list4069874400" text:style-name="WWNum26">
        <text:list-item>
          <text:p text:style-name="P206" loext:marker-style-name="T5"><text:span text:style-name="T6">Role para baixo até a seção </text:span><text:span text:style-name="T8">"Dead-letter queue (DLQ)"</text:span><text:span text:style-name="T6">:</text:span></text:p>
        </text:list-item>
      </text:list>
      <text:list xml:id="list105244138739114" text:continue-list="list2684259326" text:style-name="WWNum27">
        <text:list-item>
          <text:p text:style-name="P207" loext:marker-style-name="T5"><text:span text:style-name="T6">Marque </text:span><text:span text:style-name="T8">"Enabled"</text:span><text:span text:style-name="T6">.</text:span></text:p>
        </text:list-item>
        <text:list-item>
          <text:p text:style-name="P208" loext:marker-style-name="T5"><text:span text:style-name="T6">Em </text:span><text:span text:style-name="T8">"Amazon Resource Name (ARN) of the dead-letter queue"</text:span><text:span text:style-name="T6">:  cole o ARN da DLQ s3-arquivos-json-dlq-seu-nome.</text:span></text:p>
        </text:list-item>
        <text:list-item>
          <text:p text:style-name="P209" loext:marker-style-name="T5"><text:span text:style-name="T8">Maximum receives:</text:span><text:span text:style-name="T6"> 3.</text:span></text:p>
        </text:list-item>
      </text:list>
      <text:list xml:id="list105243712851557" text:continue-list="list4196725636" text:style-name="WWNum28">
        <text:list-item>
          <text:p text:style-name="P210" loext:marker-style-name="T5"><text:span text:style-name="T6">Mantenha as demais configurações padrão e clique em </text:span><text:span text:style-name="T8">"Create queue"</text:span><text:span text:style-name="T6">.</text:span></text:p>
        </text:list-item>
      </text:list>
      <text:list xml:id="list105243086221473" text:continue-list="list411139259" text:style-name="WWNum29">
        <text:list-item>
          <text:p text:style-name="P211" loext:marker-style-name="T5"><text:span text:style-name="T8">Anote o ARN e a URL</text:span><text:span text:style-name="T6"> desta fila, pois você precisará deles futuramente.</text:span></text:p>
        </text:list-item>
      </text:list>
      <text:p text:style-name="P10" loext:marker-style-name="T9"><draw:custom-shape text:anchor-type="as-char" draw:z-index="11" draw:name="AutoShape 5"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figuração do Armazenamento de Histórico de Arquivos (Amazon DynamoDB)</text:span></text:h>
      <text:p text:style-name="P10" loext:marker-style-name="T9"><text:span text:style-name="T6">Esta tabela rastreará o processamento de cada </text:span><text:span text:style-name="T28">arquivo</text:span><text:span text:style-name="T6">.</text:span></text:p>
      <text:p text:style-name="P22" loext:marker-style-name="T9"/>
      <text:h text:style-name="P194" text:outline-level="3" loext:marker-style-name="T11"><text:span text:style-name="T12">Criar a Tabela DynamoDB (controle-arquivos-historico-seu-nome)</text:span></text:h>
      <text:list xml:id="list105242587631798" text:continue-list="list1195776276" text:style-name="WWNum30">
        <text:list-item>
          <text:p text:style-name="P80" loext:marker-style-name="T5"><text:span text:style-name="T6">Busque pelo serviço do </text:span><text:span text:style-name="T8">Amazon DynamoDB</text:span><text:span text:style-name="T6"> na barra de pesquisa.</text:span></text:p>
        </text:list-item>
      </text:list>
      <text:list xml:id="list105243068442456" text:continue-list="list2215221133" text:style-name="WWNum31">
        <text:list-item>
          <text:p text:style-name="P212" loext:marker-style-name="T5"><text:span text:style-name="T6">No menu à esquerda, clique em </text:span><text:span text:style-name="T8">Tables</text:span><text:span text:style-name="T6">.</text:span></text:p>
        </text:list-item>
      </text:list>
      <text:list xml:id="list105243793765292" text:continue-list="list1606156958" text:style-name="WWNum32">
        <text:list-item>
          <text:p text:style-name="P213" loext:marker-style-name="T5"><text:span text:style-name="T6">Clique em </text:span><text:span text:style-name="T8">"Create table"</text:span><text:span text:style-name="T6">.</text:span></text:p>
        </text:list-item>
      </text:list>
      <text:list xml:id="list105242582012830" text:continue-list="list3860781605" text:style-name="WWNum33">
        <text:list-item>
          <text:p text:style-name="P87" loext:marker-style-name="T5"><text:span text:style-name="T8">Table name:</text:span><text:span text:style-name="T6"> controle-arquivos-historico-seu-nome</text:span></text:p>
        </text:list-item>
      </text:list>
      <text:list xml:id="list105244442405281" text:continue-list="list1040575497" text:style-name="WWNum34">
        <text:list-item>
          <text:p text:style-name="P88" loext:marker-style-name="T5"><text:span text:style-name="T8">Partition key:</text:span><text:span text:style-name="T6"> nomeArquivo (String).</text:span></text:p>
        </text:list-item>
      </text:list>
      <text:list xml:id="list105244076133759" text:continue-list="list1648478639" text:style-name="WWNum35">
        <text:list-item>
          <text:p text:style-name="P214" loext:marker-style-name="T5"><text:span text:style-name="T6">Clique em </text:span><text:span text:style-name="T8">"Create table"</text:span><text:span text:style-name="T6">.</text:span></text:p>
        </text:list-item>
      </text:list>
      <text:list xml:id="list105243067673723" text:continue-list="list2571223563" text:style-name="WWNum36">
        <text:list-item>
          <text:p text:style-name="P93" loext:marker-style-name="T5"><text:span text:style-name="T6">Em </text:span><text:span text:style-name="T8">Tables</text:span><text:span text:style-name="T6">, clique na tabela que você acabou de criar.</text:span></text:p>
        </text:list-item>
      </text:list>
      <text:list xml:id="list105243370052903" text:continue-list="list58803792" text:style-name="WWNum37">
        <text:list-item>
          <text:p text:style-name="P94" loext:marker-style-name="T5"><text:span text:style-name="T6">Na seção</text:span><text:span text:style-name="T8"> “General information”, anote o ARN</text:span><text:span text:style-name="T6"> desta tabela no seu bloco de notas.</text:span></text:p>
        </text:list-item>
      </text:list>
      <text:p text:style-name="P10" loext:marker-style-name="T9"><draw:custom-shape text:anchor-type="as-char" draw:z-index="12" draw:name="AutoShape 1"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figuração do Sistema de Notificação de Erros de Arquivo (Amazon SNS)</text:span></text:h>
      <text:p text:style-name="P10" loext:marker-style-name="T9"><text:span text:style-name="T6">Notificações para erros no processamento do </text:span><text:span text:style-name="T28">arquivo</text:span><text:span text:style-name="T6"> em si.</text:span></text:p>
      <text:p text:style-name="P22" loext:marker-style-name="T9"><text:soft-page-break/></text:p>
      <text:h text:style-name="P194" text:outline-level="3" loext:marker-style-name="T11"><text:span text:style-name="T12">Criar o Tópico SNS (notificacao-erro-arquivos-seu-nome)</text:span></text:h>
      <text:list xml:id="list105244040800944" text:continue-list="list1560952843" text:style-name="WWNum38">
        <text:list-item>
          <text:p text:style-name="P95" loext:marker-style-name="T5"><text:span text:style-name="T6">Busque pelo serviço do </text:span><text:span text:style-name="T8">Amazon SNS </text:span><text:span text:style-name="T6">na barra de pesquisa.</text:span></text:p>
        </text:list-item>
      </text:list>
      <text:list xml:id="list105244144352333" text:continue-list="list910714700" text:style-name="WWNum39">
        <text:list-item>
          <text:p text:style-name="P215" loext:marker-style-name="T5"><text:span text:style-name="T6">No menu à esquerda, clique em </text:span><text:span text:style-name="T8">"Topics"</text:span><text:span text:style-name="T6">.</text:span></text:p>
        </text:list-item>
      </text:list>
      <text:list xml:id="list105242737686483" text:continue-list="list2500891134" text:style-name="WWNum40">
        <text:list-item>
          <text:p text:style-name="P101" loext:marker-style-name="T5"><text:span text:style-name="T6">Clique em </text:span><text:span text:style-name="T8">"Create topic"</text:span><text:span text:style-name="T6">.</text:span></text:p>
        </text:list-item>
      </text:list>
      <text:list xml:id="list105244299007720" text:continue-list="list2539595543" text:style-name="WWNum41">
        <text:list-item>
          <text:p text:style-name="P107" loext:marker-style-name="T5"><text:span text:style-name="T8">Type:</text:span><text:span text:style-name="T6"> Selecione </text:span><text:span text:style-name="T8">"Standard"</text:span><text:span text:style-name="T6">.</text:span></text:p>
        </text:list-item>
      </text:list>
      <text:list xml:id="list105243286599520" text:continue-list="list2592378504" text:style-name="WWNum42">
        <text:list-item>
          <text:p text:style-name="P216" loext:marker-style-name="T5"><text:span text:style-name="T8">Name:</text:span><text:span text:style-name="T6"> notificacao-erro-arquivos-seu-nome.</text:span></text:p>
        </text:list-item>
      </text:list>
      <text:list xml:id="list105242483060866" text:continue-list="list2053356865" text:style-name="WWNum43">
        <text:list-item>
          <text:p text:style-name="P217" loext:marker-style-name="T5"><text:span text:style-name="T6">Clique em </text:span><text:span text:style-name="T8">"Create topic"</text:span><text:span text:style-name="T6">.</text:span></text:p>
        </text:list-item>
      </text:list>
      <text:list xml:id="list105244389721613" text:continue-list="list3401648382" text:style-name="WWNum44">
        <text:list-item>
          <text:p text:style-name="P218" loext:marker-style-name="T5"><text:span text:style-name="T8">Anote o ARN</text:span><text:span text:style-name="T6"> deste tópico no seu bloco de notas.</text:span></text:p>
        </text:list-item>
      </text:list>
      <text:p text:style-name="P22" loext:marker-style-name="T9"/>
      <text:h text:style-name="P194" text:outline-level="3" loext:marker-style-name="T11"><text:span text:style-name="T12">Criar uma Subscrição (Ex: E-mail)</text:span></text:h>
      <text:list xml:id="list105244003753176" text:continue-list="list414462685" text:style-name="WWNum45">
        <text:list-item>
          <text:p text:style-name="P111" loext:marker-style-name="T5"><text:span text:style-name="T6">Selecione o tópico criado, vá em </text:span><text:span text:style-name="T8">"Subscriptions"</text:span><text:span text:style-name="T6"> &gt; </text:span><text:span text:style-name="T8">"Create subscription"</text:span><text:span text:style-name="T6">.</text:span></text:p>
        </text:list-item>
      </text:list>
      <text:list xml:id="list105243183168713" text:continue-list="list3619565294" text:style-name="WWNum46">
        <text:list-item>
          <text:p text:style-name="P112" loext:marker-style-name="T5"><text:span text:style-name="T8">Protocol:</text:span><text:span text:style-name="T6"> Selecione </text:span><text:span text:style-name="T8">"Email"</text:span><text:span text:style-name="T6">.</text:span></text:p>
        </text:list-item>
      </text:list>
      <text:list xml:id="list105242921678356" text:continue-list="list2408782698" text:style-name="WWNum47">
        <text:list-item>
          <text:p text:style-name="P113" loext:marker-style-name="T5"><text:span text:style-name="T8">Endpoint:</text:span><text:span text:style-name="T6"> Insira seu endereço de e-mail (que você tenha acesso imediato).</text:span></text:p>
        </text:list-item>
      </text:list>
      <text:list xml:id="list105242620648513" text:continue-list="list4294036546" text:style-name="WWNum48">
        <text:list-item>
          <text:p text:style-name="P219" loext:marker-style-name="T5"><text:span text:style-name="T6">Clique em </text:span><text:span text:style-name="T8">"Create subscription"</text:span><text:span text:style-name="T6">.</text:span></text:p>
        </text:list-item>
      </text:list>
      <text:list xml:id="list105244094384352" text:continue-list="list3949980938" text:style-name="WWNum49">
        <text:list-item>
          <text:p text:style-name="P119" loext:marker-style-name="T5"><text:span text:style-name="T8">Acesse o seu Email</text:span><text:span text:style-name="T6"> e </text:span><text:span text:style-name="T8">confirme o e-mail</text:span><text:span text:style-name="T6"> que você receberá da AWS:</text:span></text:p>
        </text:list-item>
      </text:list>
      <text:p text:style-name="P22" loext:marker-style-name="T9"/>
      <text:p text:style-name="P105" loext:marker-style-name="T9"/>
      <text:p text:style-name="P22" loext:marker-style-name="T9"/>
      <text:h text:style-name="P23" text:outline-level="2" loext:marker-style-name="T3"><draw:custom-shape text:anchor-type="as-char" draw:z-index="13" draw:name="AutoShape 8"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Implementação da Lógica de Validação e Extração de Pedidos (AWS Lambda)</text:span></text:h>
      <text:p text:style-name="P10" loext:marker-style-name="T9"><text:span text:style-name="T6">Esta é a Lambda central desta aula. Ela será acionada por mensagens da s3-arquivos-json-queue-seu-nome.</text:span></text:p>
      <text:p text:style-name="P22" loext:marker-style-name="T9"/>
      <text:h text:style-name="P194" text:outline-level="3" loext:marker-style-name="T11"><text:span text:style-name="T12">Criar a Função Lambda (validacao-s3-arquivos-lambda-seu-nome)</text:span></text:h>
      <text:list xml:id="list105243923877164" text:continue-list="list2167432165" text:style-name="WWNum50">
        <text:list-item>
          <text:p text:style-name="P220" loext:marker-style-name="T5"><text:span text:style-name="T6">Busque pelo serviço do </text:span><text:span text:style-name="T8">AWS Lambda</text:span><text:span text:style-name="T6"> na barra de pesquisa.</text:span></text:p>
        </text:list-item>
      </text:list>
      <text:list xml:id="list105243279304425" text:continue-list="list3903013629" text:style-name="WWNum51">
        <text:list-item>
          <text:p text:style-name="P221" loext:marker-style-name="T5"><text:span text:style-name="T6">Acesse o serviço </text:span><text:span text:style-name="T8">AWS Lambda</text:span><text:span text:style-name="T6">.</text:span></text:p>
        </text:list-item>
      </text:list>
      <text:list xml:id="list105243675752644" text:continue-list="list1109474884" text:style-name="WWNum52">
        <text:list-item>
          <text:p text:style-name="P222" loext:marker-style-name="T5"><text:span text:style-name="T6">Clique em </text:span><text:span text:style-name="T8">"Create function"</text:span><text:span text:style-name="T6"> </text:span></text:p>
        </text:list-item>
      </text:list>
      <text:list xml:id="list105243630386990" text:continue-list="list58822053" text:style-name="WWNum53">
        <text:list-item>
          <text:p text:style-name="P223" loext:marker-style-name="T5"><text:span text:style-name="T6">Selecione </text:span><text:span text:style-name="T8">"Author from scratch"</text:span><text:span text:style-name="T6">.</text:span></text:p>
        </text:list-item>
      </text:list>
      <text:list xml:id="list105244059485521" text:continue-list="list1320845237" text:style-name="WWNum54">
        <text:list-item>
          <text:p text:style-name="P224" loext:marker-style-name="T5"><text:span text:style-name="T8">Function name:</text:span><text:span text:style-name="T6"> validacao-s3-arquivos-lambda-seu-nome.</text:span></text:p>
        </text:list-item>
      </text:list>
      <text:list xml:id="list105242960529456" text:continue-list="list2561605291" text:style-name="WWNum55">
        <text:list-item>
          <text:p text:style-name="P225" loext:marker-style-name="T5"><text:span text:style-name="T8">Runtime:</text:span><text:span text:style-name="T6"> Python 3.12.</text:span></text:p>
        </text:list-item>
      </text:list>
      <text:list xml:id="list105243235276516" text:continue-list="list880187760" text:style-name="WWNum56">
        <text:list-item>
          <text:p text:style-name="P226" loext:marker-style-name="T5"><text:span text:style-name="T8">Escolha a role</text:span><text:span text:style-name="T6"> selecione a role: lambda-s3-validation-role-seu-nome.</text:span></text:p>
        </text:list-item>
      </text:list>
      <text:list xml:id="list105243832657263" text:continue-list="list4237202382" text:style-name="WWNum57">
        <text:list-item>
          <text:p text:style-name="P227" loext:marker-style-name="T5"><text:span text:style-name="T6">Clique em </text:span><text:span text:style-name="T8">"Create function"</text:span><text:span text:style-name="T6">.</text:span></text:p>
        </text:list-item>
      </text:list>
      <text:p text:style-name="P105" loext:marker-style-name="T9"/>
      <text:h text:style-name="P228" text:outline-level="3" loext:marker-style-name="T11"><text:span text:style-name="T12">Configurar o Código e Variáveis de Ambiente</text:span></text:h>
      <text:list xml:id="list105244499329081" text:continue-list="list3273900341" text:style-name="WWNum58">
        <text:list-item>
          <text:p text:style-name="P229" loext:marker-style-name="T5"><text:soft-page-break/><text:span text:style-name="T6">Na aba </text:span><text:span text:style-name="T8">"Code"</text:span><text:span text:style-name="T6">, substitua lambda_function.py pelo código em python que você encontrará abaixo:</text:span></text:p>
        </text:list-item>
      </text:list>
      <text:p text:style-name="P155" loext:marker-style-name="T9"/>
      <text:p text:style-name="P46" loext:marker-style-name="T9"><text:span text:style-name="T35">import</text:span><text:span text:style-name="T36"> json</text:span></text:p>
      <text:p text:style-name="P47" loext:marker-style-name="T9"><text:span text:style-name="T35">import</text:span><text:span text:style-name="T36"> os</text:span></text:p>
      <text:p text:style-name="P47" loext:marker-style-name="T9"><text:span text:style-name="T35">import</text:span><text:span text:style-name="T36"> boto3</text:span></text:p>
      <text:p text:style-name="P47" loext:marker-style-name="T9"><text:span text:style-name="T35">from</text:span><text:span text:style-name="T36"> datetime </text:span><text:span text:style-name="T35">import</text:span><text:span text:style-name="T36"> datetime</text:span></text:p>
      <text:p text:style-name="P47" loext:marker-style-name="T9"><text:span text:style-name="T35">import</text:span><text:span text:style-name="T36"> urllib.parse</text:span></text:p>
      <text:p text:style-name="P47" loext:marker-style-name="T9"><text:span text:style-name="T35">import</text:span><text:span text:style-name="T36"> uuid  </text:span><text:span text:style-name="T37"># Para gerar MessageDeduplicationId se necessário</text:span></text:p>
      <text:p text:style-name="P156" loext:marker-style-name="T9"/>
      <text:p text:style-name="P47" loext:marker-style-name="T9"><text:span text:style-name="T36">DYNAMODB_TABLE_NAME = os.environ[</text:span><text:span text:style-name="T38">'DYNAMODB_TABLE_NAME'</text:span><text:span text:style-name="T36">]</text:span></text:p>
      <text:p text:style-name="P47" loext:marker-style-name="T9"><text:span text:style-name="T36">SNS_TOPIC_ARN = os.environ[</text:span><text:span text:style-name="T38">'SNS_TOPIC_ARN'</text:span><text:span text:style-name="T36">]</text:span></text:p>
      <text:p text:style-name="P47" loext:marker-style-name="T9"><text:span text:style-name="T36">SQS_FIFO_PEDIDOS_URL = os.environ[</text:span><text:span text:style-name="T38">'SQS_FIFO_PEDIDOS_URL'</text:span><text:span text:style-name="T36">]  </text:span><text:span text:style-name="T37"># URL da fila da Aula 1</text:span></text:p>
      <text:p text:style-name="P156" loext:marker-style-name="T9"/>
      <text:p text:style-name="P47" loext:marker-style-name="T9"><text:span text:style-name="T36">s3 = boto3.client(</text:span><text:span text:style-name="T38">'s3'</text:span><text:span text:style-name="T36">)</text:span></text:p>
      <text:p text:style-name="P47" loext:marker-style-name="T9"><text:span text:style-name="T36">dynamodb = boto3.resource(</text:span><text:span text:style-name="T38">'dynamodb'</text:span><text:span text:style-name="T36">)</text:span></text:p>
      <text:p text:style-name="P47" loext:marker-style-name="T9"><text:span text:style-name="T36">sns = boto3.client(</text:span><text:span text:style-name="T38">'sns'</text:span><text:span text:style-name="T36">)</text:span></text:p>
      <text:p text:style-name="P47" loext:marker-style-name="T9"><text:span text:style-name="T36">sqs = boto3.client(</text:span><text:span text:style-name="T38">'sqs'</text:span><text:span text:style-name="T36">)  </text:span><text:span text:style-name="T37"># Cliente SQS para enviar para a fila FIFO</text:span></text:p>
      <text:p text:style-name="P47" loext:marker-style-name="T9"><text:span text:style-name="T36">table = dynamodb.Table(DYNAMODB_TABLE_NAME)</text:span></text:p>
      <text:p text:style-name="P156" loext:marker-style-name="T9"/>
      <text:p text:style-name="P47" loext:marker-style-name="T9"><text:span text:style-name="T35">def</text:span><text:span text:style-name="T36"> lambda_handler(</text:span><text:span text:style-name="T35">event</text:span><text:span text:style-name="T36">, context):</text:span></text:p>
      <text:p text:style-name="P47" loext:marker-style-name="T9"><text:span text:style-name="T36">   </text:span><text:span text:style-name="T35">print</text:span><text:span text:style-name="T36">(f</text:span><text:span text:style-name="T38">"Evento SQS </text:span><text:span text:style-name="T36">(</text:span><text:span text:style-name="T38">arquivos</text:span><text:span text:style-name="T36">)</text:span><text:span text:style-name="T38"> recebido</text:span><text:span text:style-name="T36">:</text:span><text:span text:style-name="T38"> </text:span><text:span text:style-name="T36">{</text:span><text:span text:style-name="T38">event</text:span><text:span text:style-name="T36">}</text:span><text:span text:style-name="T38">"</text:span><text:span text:style-name="T36">)</text:span></text:p>
      <text:p text:style-name="P47" loext:marker-style-name="T9"><text:span text:style-name="T36">   </text:span><text:span text:style-name="T35">for</text:span><text:span text:style-name="T36"> record </text:span><text:span text:style-name="T35">in</text:span><text:span text:style-name="T36"> event[</text:span><text:span text:style-name="T38">'Records'</text:span><text:span text:style-name="T36">]:</text:span></text:p>
      <text:p text:style-name="P47" loext:marker-style-name="T9"><text:span text:style-name="T36">       s3_event_message_body = record[</text:span><text:span text:style-name="T38">'body'</text:span><text:span text:style-name="T36">]</text:span></text:p>
      <text:p text:style-name="P47" loext:marker-style-name="T9"><text:span text:style-name="T36">       object_key = None</text:span></text:p>
      <text:p text:style-name="P47" loext:marker-style-name="T9"><text:span text:style-name="T36">       bucket_name = None</text:span></text:p>
      <text:p text:style-name="P47" loext:marker-style-name="T9"><text:span text:style-name="T36">       </text:span></text:p>
      <text:p text:style-name="P47" loext:marker-style-name="T9"><text:span text:style-name="T36">       </text:span><text:span text:style-name="T35">try</text:span><text:span text:style-name="T36">:</text:span></text:p>
      <text:p text:style-name="P47" loext:marker-style-name="T9"><text:span text:style-name="T36">           s3_event_message = json.loads(s3_event_message_body)</text:span></text:p>
      <text:p text:style-name="P47" loext:marker-style-name="T9"><text:span text:style-name="T36">           </text:span><text:span text:style-name="T35">if</text:span><text:span text:style-name="T36"> </text:span><text:span text:style-name="T38">'Message'</text:span><text:span text:style-name="T36"> </text:span><text:span text:style-name="T35">in</text:span><text:span text:style-name="T36"> s3_event_message </text:span><text:span text:style-name="T35">and</text:span><text:span text:style-name="T36"> isinstance(s3_event_message[</text:span><text:span text:style-name="T38">'Message'</text:span><text:span text:style-name="T36">], str):</text:span></text:p>
      <text:p text:style-name="P47" loext:marker-style-name="T9"><text:span text:style-name="T36">               s3_notification = json.loads(s3_event_message[</text:span><text:span text:style-name="T38">'Message'</text:span><text:span text:style-name="T36">])</text:span></text:p>
      <text:p text:style-name="P47" loext:marker-style-name="T9"><text:span text:style-name="T36">           </text:span><text:span text:style-name="T35">else</text:span><text:span text:style-name="T36">:</text:span></text:p>
      <text:p text:style-name="P47" loext:marker-style-name="T9"><text:span text:style-name="T36">               s3_notification = s3_event_message</text:span></text:p>
      <text:p text:style-name="P156" loext:marker-style-name="T9"/>
      <text:p text:style-name="P47" loext:marker-style-name="T9"><text:span text:style-name="T36">           </text:span><text:span text:style-name="T35">for</text:span><text:span text:style-name="T36"> s3_record </text:span><text:span text:style-name="T35">in</text:span><text:span text:style-name="T36"> s3_notification[</text:span><text:span text:style-name="T38">'Records'</text:span><text:span text:style-name="T36">]:</text:span></text:p>
      <text:p text:style-name="P47" loext:marker-style-name="T9"><text:span text:style-name="T36">               bucket_name = s3_record[</text:span><text:span text:style-name="T38">'s3'</text:span><text:span text:style-name="T36">][</text:span><text:span text:style-name="T38">'bucket'</text:span><text:span text:style-name="T36">][</text:span><text:span text:style-name="T38">'name'</text:span><text:span text:style-name="T36">]</text:span></text:p>
      <text:p text:style-name="P47" loext:marker-style-name="T9"><text:span text:style-name="T36">               object_key_encoded = s3_record[</text:span><text:span text:style-name="T38">'s3'</text:span><text:span text:style-name="T36">][</text:span><text:span text:style-name="T38">'object'</text:span><text:span text:style-name="T36">][</text:span><text:span text:style-name="T38">'key'</text:span><text:span text:style-name="T36">]</text:span></text:p>
      <text:p text:style-name="P47" loext:marker-style-name="T9"><text:span text:style-name="T36">               object_key = urllib.parse.unquote_plus(object_key_encoded)</text:span></text:p>
      <text:p text:style-name="P156" loext:marker-style-name="T9"/>
      <text:p text:style-name="P47" loext:marker-style-name="T9"><text:span text:style-name="T36">               </text:span><text:span text:style-name="T35">print</text:span><text:span text:style-name="T36">(f"Processando arquivo: s3:</text:span><text:span text:style-name="T37">//{bucket_name}/{object_key}")</text:span></text:p>
      <text:p text:style-name="P47" loext:marker-style-name="T9"><text:span text:style-name="T36">               s3_object = s3.get_object(Bucket=bucket_name, Key=object_key)</text:span></text:p>
      <text:p text:style-name="P47" loext:marker-style-name="T9"><text:span text:style-name="T36">               file_content = s3_object[</text:span><text:span text:style-name="T38">'Body'</text:span><text:span text:style-name="T36">].</text:span><text:span text:style-name="T35">read</text:span><text:span text:style-name="T36">().decode(</text:span><text:span text:style-name="T38">'utf</text:span><text:span text:style-name="T36">-</text:span><text:span text:style-name="T38">8'</text:span><text:span text:style-name="T36">)</text:span></text:p>
      <text:p text:style-name="P47" loext:marker-style-name="T9"><text:span text:style-name="T36">               </text:span></text:p>
      <text:p text:style-name="P47" loext:marker-style-name="T9"><text:span text:style-name="T36">               status_validacao_arquivo = </text:span><text:span text:style-name="T38">"ERRO_VALIDACAO_ARQUIVO"</text:span></text:p>
      <text:p text:style-name="P47" loext:marker-style-name="T9"><text:span text:style-name="T36">               detalhes_erro_arquivo = </text:span><text:span text:style-name="T38">"Conteúdo do arquivo não é JSON válido</text:span><text:span text:style-name="T36">.</text:span><text:span text:style-name="T38">"</text:span></text:p>
      <text:p text:style-name="P47" loext:marker-style-name="T9"><text:span text:style-name="T36">               arquivo_data = None</text:span></text:p>
      <text:p text:style-name="P156" loext:marker-style-name="T9"/>
      <text:p text:style-name="P47" loext:marker-style-name="T9"><text:span text:style-name="T36">               </text:span><text:span text:style-name="T35">try</text:span><text:span text:style-name="T36">:</text:span></text:p>
      <text:p text:style-name="P47" loext:marker-style-name="T9"><text:span text:style-name="T36">                   arquivo_data = json.loads(file_content)</text:span></text:p>
      <text:p text:style-name="P47" loext:marker-style-name="T9"><text:span text:style-name="T36">                   </text:span><text:span text:style-name="T37"># Validação básica do schema do arquivo</text:span></text:p>
      <text:p text:style-name="P47" loext:marker-style-name="T9"><text:soft-page-break/><text:span text:style-name="T36">                   </text:span><text:span text:style-name="T35">if</text:span><text:span text:style-name="T36"> isinstance(arquivo_data, dict) </text:span><text:span text:style-name="T35">and</text:span><text:span text:style-name="T36"> </text:span><text:span text:style-name="T38">'lista_pedidos'</text:span><text:span text:style-name="T36"> </text:span><text:span text:style-name="T35">in</text:span><text:span text:style-name="T36"> arquivo_data </text:span><text:span text:style-name="T35">and</text:span><text:span text:style-name="T36"> isinstance(arquivo_data[</text:span><text:span text:style-name="T38">'lista_pedidos'</text:span><text:span text:style-name="T36">], </text:span><text:span text:style-name="T35">list</text:span><text:span text:style-name="T36">):</text:span></text:p>
      <text:p text:style-name="P47" loext:marker-style-name="T9"><text:span text:style-name="T36">                       status_validacao_arquivo = </text:span><text:span text:style-name="T38">"ARQUIVO_VALIDADO"</text:span></text:p>
      <text:p text:style-name="P47" loext:marker-style-name="T9"><text:span text:style-name="T36">                       detalhes_erro_arquivo = None</text:span></text:p>
      <text:p text:style-name="P47" loext:marker-style-name="T9"><text:span text:style-name="T36">                       </text:span><text:span text:style-name="T35">print</text:span><text:span text:style-name="T36">(f</text:span><text:span text:style-name="T38">"Schema do arquivo </text:span><text:span text:style-name="T36">{</text:span><text:span text:style-name="T38">object_key</text:span><text:span text:style-name="T36">}</text:span><text:span text:style-name="T38"> validado</text:span><text:span text:style-name="T36">.</text:span><text:span text:style-name="T38">"</text:span><text:span text:style-name="T36">)</text:span></text:p>
      <text:p text:style-name="P156" loext:marker-style-name="T9"/>
      <text:p text:style-name="P47" loext:marker-style-name="T9"><text:span text:style-name="T36">                       </text:span><text:span text:style-name="T37"># Processar pedidos</text:span></text:p>
      <text:p text:style-name="P47" loext:marker-style-name="T9"><text:span text:style-name="T36">                       </text:span><text:span text:style-name="T35">for</text:span><text:span text:style-name="T36"> pedido_item </text:span><text:span text:style-name="T35">in</text:span><text:span text:style-name="T36"> arquivo_data[</text:span><text:span text:style-name="T38">'lista_pedidos'</text:span><text:span text:style-name="T36">]:</text:span></text:p>
      <text:p text:style-name="P47" loext:marker-style-name="T9"><text:span text:style-name="T36">                           </text:span><text:span text:style-name="T35">if</text:span><text:span text:style-name="T36"> </text:span><text:span text:style-name="T38">'id_pedido_arquivo'</text:span><text:span text:style-name="T36"> </text:span><text:span text:style-name="T35">not</text:span><text:span text:style-name="T36"> </text:span><text:span text:style-name="T35">in</text:span><text:span text:style-name="T36"> pedido_item </text:span><text:span text:style-name="T35">or</text:span><text:span text:style-name="T36"> </text:span><text:span text:style-name="T38">'id_cliente_arquivo'</text:span><text:span text:style-name="T36"> </text:span><text:span text:style-name="T35">not</text:span><text:span text:style-name="T36"> </text:span><text:span text:style-name="T35">in</text:span><text:span text:style-name="T36"> pedido_item:</text:span></text:p>
      <text:p text:style-name="P47" loext:marker-style-name="T9"><text:span text:style-name="T36">                               </text:span><text:span text:style-name="T35">print</text:span><text:span text:style-name="T36">(f</text:span><text:span text:style-name="T38">"Pedido inválido no arquivo </text:span><text:span text:style-name="T36">{</text:span><text:span text:style-name="T38">object_key</text:span><text:span text:style-name="T36">}:</text:span><text:span text:style-name="T38"> </text:span><text:span text:style-name="T36">{</text:span><text:span text:style-name="T38">pedido_item</text:span><text:span text:style-name="T36">}.</text:span><text:span text:style-name="T38"> Campos obrigatórios ausentes</text:span><text:span text:style-name="T36">.</text:span><text:span text:style-name="T38">"</text:span><text:span text:style-name="T36">)</text:span></text:p>
      <text:p text:style-name="P47" loext:marker-style-name="T9"><text:span text:style-name="T36">                               </text:span><text:span text:style-name="T35">continue</text:span></text:p>
      <text:p text:style-name="P156" loext:marker-style-name="T9"/>
      <text:p text:style-name="P47" loext:marker-style-name="T9"><text:span text:style-name="T36">                           pedido_formatado = {</text:span></text:p>
      <text:p text:style-name="P47" loext:marker-style-name="T9"><text:span text:style-name="T36">                               </text:span><text:span text:style-name="T38">'pedidoId'</text:span><text:span text:style-name="T36">: str(pedido_item.</text:span><text:span text:style-name="T35">get</text:span><text:span text:style-name="T36">(</text:span><text:span text:style-name="T38">'id_pedido_arquivo'</text:span><text:span text:style-name="T36">)),</text:span></text:p>
      <text:p text:style-name="P47" loext:marker-style-name="T9"><text:span text:style-name="T36">                               </text:span><text:span text:style-name="T38">'clienteId'</text:span><text:span text:style-name="T36">: str(pedido_item.</text:span><text:span text:style-name="T35">get</text:span><text:span text:style-name="T36">(</text:span><text:span text:style-name="T38">'id_cliente_arquivo'</text:span><text:span text:style-name="T36">)),</text:span></text:p>
      <text:p text:style-name="P47" loext:marker-style-name="T9"><text:span text:style-name="T36">                               </text:span><text:span text:style-name="T38">'itens'</text:span><text:span text:style-name="T36">: pedido_item.</text:span><text:span text:style-name="T35">get</text:span><text:span text:style-name="T36">(</text:span><text:span text:style-name="T38">'itens_pedido_arquivo'</text:span><text:span text:style-name="T36">, []),</text:span></text:p>
      <text:p text:style-name="P47" loext:marker-style-name="T9"><text:span text:style-name="T36">                               </text:span><text:span text:style-name="T38">'origem'</text:span><text:span text:style-name="T36">: </text:span><text:span text:style-name="T38">'S3_FILE'</text:span><text:span text:style-name="T36">,</text:span></text:p>
      <text:p text:style-name="P47" loext:marker-style-name="T9"><text:span text:style-name="T36">                               </text:span><text:span text:style-name="T38">'nomeArquivoOriginal'</text:span><text:span text:style-name="T36">: object_key,</text:span></text:p>
      <text:p text:style-name="P47" loext:marker-style-name="T9"><text:span text:style-name="T36">                               </text:span><text:span text:style-name="T38">'timestamp_extracao_arquivo'</text:span><text:span text:style-name="T36">: datetime.utcnow().isoformat() + </text:span><text:span text:style-name="T38">"Z"</text:span></text:p>
      <text:p text:style-name="P47" loext:marker-style-name="T9"><text:span text:style-name="T36">                           }</text:span></text:p>
      <text:p text:style-name="P47" loext:marker-style-name="T9"><text:span text:style-name="T36">                           </text:span></text:p>
      <text:p text:style-name="P47" loext:marker-style-name="T9"><text:span text:style-name="T36">                           </text:span><text:span text:style-name="T35">try</text:span><text:span text:style-name="T36">:</text:span></text:p>
      <text:p text:style-name="P47" loext:marker-style-name="T9"><text:span text:style-name="T36">                               deduplication_id = f</text:span><text:span text:style-name="T38">"</text:span><text:span text:style-name="T36">{</text:span><text:span text:style-name="T38">object_key</text:span><text:span text:style-name="T36">}-{</text:span><text:span text:style-name="T38">pedido_formatado</text:span><text:span text:style-name="T36">[</text:span><text:span text:style-name="T38">'pedidoId'</text:span><text:span text:style-name="T36">]}-{</text:span><text:span text:style-name="T38">uuid</text:span><text:span text:style-name="T36">.</text:span><text:span text:style-name="T38">uuid4</text:span><text:span text:style-name="T36">()}</text:span><text:span text:style-name="T38">"</text:span></text:p>
      <text:p text:style-name="P47" loext:marker-style-name="T9"><text:span text:style-name="T36">                               sqs.send_message(</text:span></text:p>
      <text:p text:style-name="P47" loext:marker-style-name="T9"><text:span text:style-name="T36">                                   QueueUrl=SQS_FIFO_PEDIDOS_URL,</text:span></text:p>
      <text:p text:style-name="P47" loext:marker-style-name="T9"><text:span text:style-name="T36">                                   MessageBody=json.dumps(pedido_formatado),</text:span></text:p>
      <text:p text:style-name="P47" loext:marker-style-name="T9"><text:span text:style-name="T36">                                   MessageGroupId=str(pedido_formatado[</text:span><text:span text:style-name="T38">'pedidoId'</text:span><text:span text:style-name="T36">]),</text:span></text:p>
      <text:p text:style-name="P47" loext:marker-style-name="T9"><text:span text:style-name="T36">                                   MessageDeduplicationId=deduplication_id</text:span></text:p>
      <text:p text:style-name="P47" loext:marker-style-name="T9"><text:span text:style-name="T36">                               )</text:span></text:p>
      <text:p text:style-name="P47" loext:marker-style-name="T9"><text:span text:style-name="T36">                               </text:span><text:span text:style-name="T35">print</text:span><text:span text:style-name="T36">(f</text:span><text:span text:style-name="T38">"Pedido </text:span><text:span text:style-name="T36">{</text:span><text:span text:style-name="T38">pedido_formatado</text:span><text:span text:style-name="T36">[</text:span><text:span text:style-name="T38">'pedidoId'</text:span><text:span text:style-name="T36">]}</text:span><text:span text:style-name="T38"> do arquivo </text:span><text:span text:style-name="T36">{</text:span><text:span text:style-name="T38">object_key</text:span><text:span text:style-name="T36">}</text:span><text:span text:style-name="T38"> enviado para SQS FIFO Pedidos</text:span><text:span text:style-name="T36">.</text:span><text:span text:style-name="T38">"</text:span><text:span text:style-name="T36">)</text:span></text:p>
      <text:p text:style-name="P47" loext:marker-style-name="T9"><text:span text:style-name="T36">                           </text:span><text:span text:style-name="T35">except</text:span><text:span text:style-name="T36"> Exception </text:span><text:span text:style-name="T35">as</text:span><text:span text:style-name="T36"> sqs_e:</text:span></text:p>
      <text:p text:style-name="P47" loext:marker-style-name="T9"><text:span text:style-name="T36">                               </text:span><text:span text:style-name="T35">print</text:span><text:span text:style-name="T36">(f</text:span><text:span text:style-name="T38">"Erro ao enviar pedido do arquivo </text:span><text:span text:style-name="T36">{</text:span><text:span text:style-name="T38">object_key</text:span><text:span text:style-name="T36">}</text:span><text:span text:style-name="T38"> para SQS FIFO</text:span><text:span text:style-name="T36">:</text:span><text:span text:style-name="T38"> </text:span><text:span text:style-name="T36">{</text:span><text:span text:style-name="T38">str</text:span><text:span text:style-name="T36">(</text:span><text:span text:style-name="T38">sqs_e</text:span><text:span text:style-name="T36">)}</text:span><text:span text:style-name="T38">"</text:span><text:span text:style-name="T36">)</text:span></text:p>
      <text:p text:style-name="P47" loext:marker-style-name="T9"><text:span text:style-name="T36">                   </text:span><text:span text:style-name="T35">else</text:span><text:span text:style-name="T36">:</text:span></text:p>
      <text:p text:style-name="P47" loext:marker-style-name="T9"><text:span text:style-name="T36">                       detalhes_erro_arquivo = </text:span><text:span text:style-name="T38">"Schema do arquivo inválido</text:span><text:span text:style-name="T36">.</text:span><text:span text:style-name="T38"> Esperada chave 'lista_pedidos' contendo uma lista</text:span><text:span text:style-name="T36">.</text:span><text:span text:style-name="T38">"</text:span></text:p>
      <text:p text:style-name="P47" loext:marker-style-name="T9"><text:span text:style-name="T36">                       </text:span><text:span text:style-name="T35">print</text:span><text:span text:style-name="T36">(detalhes_erro_arquivo)</text:span></text:p>
      <text:p text:style-name="P47" loext:marker-style-name="T9"><text:span text:style-name="T36">               </text:span></text:p>
      <text:p text:style-name="P47" loext:marker-style-name="T9"><text:span text:style-name="T36">               </text:span><text:span text:style-name="T35">except</text:span><text:span text:style-name="T36"> json.JSONDecodeError </text:span><text:span text:style-name="T35">as</text:span><text:span text:style-name="T36"> je:</text:span></text:p>
      <text:p text:style-name="P47" loext:marker-style-name="T9"><text:span text:style-name="T36">                   </text:span><text:span text:style-name="T35">print</text:span><text:span text:style-name="T36">(f</text:span><text:span text:style-name="T38">"Arquivo </text:span><text:span text:style-name="T36">{</text:span><text:span text:style-name="T38">object_key</text:span><text:span text:style-name="T36">}</text:span><text:span text:style-name="T38"> não é um JSON válido</text:span><text:span text:style-name="T36">:</text:span><text:span text:style-name="T38"> </text:span><text:span text:style-name="T36">{</text:span><text:span text:style-name="T38">str</text:span><text:span text:style-name="T36">(</text:span><text:span text:style-name="T38">je</text:span><text:span text:style-name="T36">)}</text:span><text:span text:style-name="T38">"</text:span><text:span text:style-name="T36">)</text:span></text:p>
      <text:p text:style-name="P156" loext:marker-style-name="T9"/>
      <text:p text:style-name="P47" loext:marker-style-name="T9"><text:span text:style-name="T36">               </text:span><text:span text:style-name="T37"># Registrar no DynamoDB</text:span></text:p>
      <text:p text:style-name="P47" loext:marker-style-name="T9"><text:span text:style-name="T36">               item_to_put = {</text:span></text:p>
      <text:p text:style-name="P47" loext:marker-style-name="T9"><text:span text:style-name="T36">                   </text:span><text:span text:style-name="T38">'nomeArquivo'</text:span><text:span text:style-name="T36">: object_key,</text:span></text:p>
      <text:p text:style-name="P47" loext:marker-style-name="T9"><text:span text:style-name="T36">                   </text:span><text:span text:style-name="T38">'timestamp'</text:span><text:span text:style-name="T36">: datetime.utcnow().isoformat() + </text:span><text:span text:style-name="T38">"Z"</text:span><text:span text:style-name="T36">,</text:span></text:p>
      <text:p text:style-name="P47" loext:marker-style-name="T9"><text:span text:style-name="T36">                   </text:span><text:span text:style-name="T38">'statusValidacao'</text:span><text:span text:style-name="T36">: status_validacao_arquivo,</text:span></text:p>
      <text:p text:style-name="P47" loext:marker-style-name="T9"><text:span text:style-name="T36">                   </text:span><text:span text:style-name="T38">'bucket'</text:span><text:span text:style-name="T36">: bucket_name</text:span></text:p>
      <text:p text:style-name="P47" loext:marker-style-name="T9"><text:span text:style-name="T36">               }</text:span></text:p>
      <text:p text:style-name="P47" loext:marker-style-name="T9"><text:soft-page-break/><text:span text:style-name="T36">               </text:span><text:span text:style-name="T35">if</text:span><text:span text:style-name="T36"> detalhes_erro_arquivo:</text:span></text:p>
      <text:p text:style-name="P47" loext:marker-style-name="T9"><text:span text:style-name="T36">                   item_to_put[</text:span><text:span text:style-name="T38">'detalhesErro'</text:span><text:span text:style-name="T36">] = detalhes_erro_arquivo</text:span></text:p>
      <text:p text:style-name="P47" loext:marker-style-name="T9"><text:span text:style-name="T36">               </text:span></text:p>
      <text:p text:style-name="P47" loext:marker-style-name="T9"><text:span text:style-name="T36">               table.put_item(Item=item_to_put)</text:span></text:p>
      <text:p text:style-name="P156" loext:marker-style-name="T9"/>
      <text:p text:style-name="P47" loext:marker-style-name="T9"><text:span text:style-name="T36">               </text:span><text:span text:style-name="T37"># Notificar no SNS se houver erro no arquivo</text:span></text:p>
      <text:p text:style-name="P47" loext:marker-style-name="T9"><text:span text:style-name="T36">               </text:span><text:span text:style-name="T35">if</text:span><text:span text:style-name="T36"> status_validacao_arquivo != </text:span><text:span text:style-name="T38">"ARQUIVO_VALIDADO"</text:span><text:span text:style-name="T36">:</text:span></text:p>
      <text:p text:style-name="P47" loext:marker-style-name="T9"><text:span text:style-name="T36">                   message_sns = f</text:span><text:span text:style-name="T38">"Erro de validação no ARQUIVO</text:span><text:span text:style-name="T36">:</text:span><text:span text:style-name="T38"> </text:span><text:span text:style-name="T36">{</text:span><text:span text:style-name="T38">object_key</text:span><text:span text:style-name="T36">}</text:span><text:span text:style-name="T38"> do bucket </text:span><text:span text:style-name="T36">{</text:span><text:span text:style-name="T38">bucket_name</text:span><text:span text:style-name="T36">}.</text:span><text:span text:style-name="T38">\n"</text:span></text:p>
      <text:p text:style-name="P47" loext:marker-style-name="T9"><text:span text:style-name="T36">                   message_sns += f</text:span><text:span text:style-name="T38">"Status</text:span><text:span text:style-name="T36">:</text:span><text:span text:style-name="T38"> </text:span><text:span text:style-name="T36">{</text:span><text:span text:style-name="T38">status_validacao_arquivo</text:span><text:span text:style-name="T36">}</text:span><text:span text:style-name="T38">\n"</text:span></text:p>
      <text:p text:style-name="P47" loext:marker-style-name="T9"><text:span text:style-name="T36">                   </text:span><text:span text:style-name="T35">if</text:span><text:span text:style-name="T36"> detalhes_erro_arquivo:</text:span></text:p>
      <text:p text:style-name="P47" loext:marker-style-name="T9"><text:span text:style-name="T36">                       message_sns += f</text:span><text:span text:style-name="T38">"Detalhes</text:span><text:span text:style-name="T36">:</text:span><text:span text:style-name="T38"> </text:span><text:span text:style-name="T36">{</text:span><text:span text:style-name="T38">detalhes_erro_arquivo</text:span><text:span text:style-name="T36">}</text:span><text:span text:style-name="T38">"</text:span></text:p>
      <text:p text:style-name="P47" loext:marker-style-name="T9"><text:span text:style-name="T36">                   </text:span></text:p>
      <text:p text:style-name="P47" loext:marker-style-name="T9"><text:span text:style-name="T36">                   sns.publish(</text:span></text:p>
      <text:p text:style-name="P47" loext:marker-style-name="T9"><text:span text:style-name="T36">                       TopicArn=SNS_TOPIC_ARN,</text:span></text:p>
      <text:p text:style-name="P47" loext:marker-style-name="T9"><text:span text:style-name="T36">                       Message=message_sns,</text:span></text:p>
      <text:p text:style-name="P47" loext:marker-style-name="T9"><text:span text:style-name="T36">                       Subject=f</text:span><text:span text:style-name="T38">"Erro de Validação de ARQUIVO S3 </text:span><text:span text:style-name="T36">-</text:span><text:span text:style-name="T38"> </text:span><text:span text:style-name="T36">{</text:span><text:span text:style-name="T38">object_key</text:span><text:span text:style-name="T36">}</text:span><text:span text:style-name="T38">"</text:span></text:p>
      <text:p text:style-name="P47" loext:marker-style-name="T9"><text:span text:style-name="T36">                   )</text:span></text:p>
      <text:p text:style-name="P47" loext:marker-style-name="T9"><text:span text:style-name="T36">                   </text:span><text:span text:style-name="T35">print</text:span><text:span text:style-name="T36">(f</text:span><text:span text:style-name="T38">"Notificação de erro de ARQUIVO enviada para SNS para </text:span><text:span text:style-name="T36">{</text:span><text:span text:style-name="T38">object_key</text:span><text:span text:style-name="T36">}</text:span><text:span text:style-name="T38">"</text:span><text:span text:style-name="T36">)</text:span></text:p>
      <text:p text:style-name="P156" loext:marker-style-name="T9"/>
      <text:p text:style-name="P47" loext:marker-style-name="T9"><text:span text:style-name="T36">       </text:span><text:span text:style-name="T35">except</text:span><text:span text:style-name="T36"> Exception </text:span><text:span text:style-name="T35">as</text:span><text:span text:style-name="T36"> e:</text:span></text:p>
      <text:p text:style-name="P47" loext:marker-style-name="T9"><text:span text:style-name="T36">           err_msg = f</text:span><text:span text:style-name="T38">"Erro crítico ao processar SQS record </text:span><text:span text:style-name="T36">(</text:span><text:span text:style-name="T38">body</text:span><text:span text:style-name="T36">:</text:span><text:span text:style-name="T38"> </text:span><text:span text:style-name="T36">{</text:span><text:span text:style-name="T38">s3_event_message_body</text:span><text:span text:style-name="T36">}):</text:span><text:span text:style-name="T38"> </text:span><text:span text:style-name="T36">{</text:span><text:span text:style-name="T38">str</text:span><text:span text:style-name="T36">(</text:span><text:span text:style-name="T38">e</text:span><text:span text:style-name="T36">)}</text:span><text:span text:style-name="T38">"</text:span></text:p>
      <text:p text:style-name="P47" loext:marker-style-name="T9"><text:span text:style-name="T36">           </text:span><text:span text:style-name="T35">if</text:span><text:span text:style-name="T36"> object_key:</text:span></text:p>
      <text:p text:style-name="P47" loext:marker-style-name="T9"><text:span text:style-name="T36">               err_msg = f</text:span><text:span text:style-name="T38">"Erro crítico ao processar SQS record para arquivo </text:span><text:span text:style-name="T36">{</text:span><text:span text:style-name="T38">object_key</text:span><text:span text:style-name="T36">}</text:span><text:span text:style-name="T38"> </text:span><text:span text:style-name="T36">(</text:span><text:span text:style-name="T38">body</text:span><text:span text:style-name="T36">:</text:span><text:span text:style-name="T38"> </text:span><text:span text:style-name="T36">{</text:span><text:span text:style-name="T38">s3_event_message_body</text:span><text:span text:style-name="T36">}):</text:span><text:span text:style-name="T38"> </text:span><text:span text:style-name="T36">{</text:span><text:span text:style-name="T38">str</text:span><text:span text:style-name="T36">(</text:span><text:span text:style-name="T38">e</text:span><text:span text:style-name="T36">)}</text:span><text:span text:style-name="T38">"</text:span></text:p>
      <text:p text:style-name="P47" loext:marker-style-name="T9"><text:span text:style-name="T36">           </text:span><text:span text:style-name="T35">print</text:span><text:span text:style-name="T36">(err_msg)</text:span></text:p>
      <text:p text:style-name="P47" loext:marker-style-name="T9"><text:span text:style-name="T36">           </text:span><text:span text:style-name="T35">try</text:span><text:span text:style-name="T36">:</text:span></text:p>
      <text:p text:style-name="P47" loext:marker-style-name="T9"><text:span text:style-name="T36">               sns.publish(TopicArn=SNS_TOPIC_ARN, Message=err_msg, Subject=</text:span><text:span text:style-name="T38">"Erro Crítico no Processamento de Arquivo S3"</text:span><text:span text:style-name="T36">)</text:span></text:p>
      <text:p text:style-name="P47" loext:marker-style-name="T9"><text:span text:style-name="T36">           </text:span><text:span text:style-name="T35">except</text:span><text:span text:style-name="T36"> Exception </text:span><text:span text:style-name="T35">as</text:span><text:span text:style-name="T36"> sns_e:</text:span></text:p>
      <text:p text:style-name="P47" loext:marker-style-name="T9"><text:span text:style-name="T36">               </text:span><text:span text:style-name="T35">print</text:span><text:span text:style-name="T36">(f</text:span><text:span text:style-name="T38">"Falha ao enviar notificação SNS sobre erro crítico</text:span><text:span text:style-name="T36">:</text:span><text:span text:style-name="T38"> </text:span><text:span text:style-name="T36">{</text:span><text:span text:style-name="T38">str</text:span><text:span text:style-name="T36">(</text:span><text:span text:style-name="T38">sns_e</text:span><text:span text:style-name="T36">)}</text:span><text:span text:style-name="T38">"</text:span><text:span text:style-name="T36">)</text:span></text:p>
      <text:p text:style-name="P47" loext:marker-style-name="T9"><text:span text:style-name="T36">           </text:span><text:span text:style-name="T35">raise</text:span><text:span text:style-name="T36"> e</text:span></text:p>
      <text:p text:style-name="P47" loext:marker-style-name="T9"><text:span text:style-name="T36">   </text:span><text:span text:style-name="T35">return</text:span><text:span text:style-name="T36"> {</text:span><text:span text:style-name="T38">'statusCode'</text:span><text:span text:style-name="T36">: </text:span><text:span text:style-name="T39">200</text:span><text:span text:style-name="T36">, </text:span><text:span text:style-name="T38">'body'</text:span><text:span text:style-name="T36">: </text:span><text:span text:style-name="T38">'Processamento de arquivos S3 e envio de pedidos concluído'</text:span><text:span text:style-name="T36">}</text:span></text:p>
      <text:p text:style-name="P230" loext:marker-style-name="T9"/>
      <text:p text:style-name="P231" loext:marker-style-name="T9"><text:span text:style-name="T6"> </text:span></text:p>
      <text:list xml:id="list105244592799350" text:continue-list="list300812823" text:style-name="WWNum59">
        <text:list-item>
          <text:p text:style-name="P232" loext:marker-style-name="T5"><text:span text:style-name="T6">Clique em </text:span><text:span text:style-name="T8">"Deploy"</text:span><text:span text:style-name="T6">.</text:span></text:p>
        </text:list-item>
      </text:list>
      <text:list xml:id="list105243874092100" text:continue-list="list1257218095" text:style-name="WWNum60">
        <text:list-item>
          <text:p text:style-name="P233" loext:marker-style-name="T5"><text:span text:style-name="T6">Vá para </text:span><text:span text:style-name="T8">"Configuration"</text:span><text:span text:style-name="T6"> &gt; </text:span><text:span text:style-name="T8">"Environment variables"</text:span><text:span text:style-name="T6"> &gt; </text:span><text:span text:style-name="T8">"Edit"</text:span><text:span text:style-name="T6">.</text:span></text:p>
        </text:list-item>
      </text:list>
      <text:list xml:id="list105244537196719" text:continue-list="list641679017" text:style-name="WWNum61">
        <text:list-item>
          <text:p text:style-name="P234" loext:marker-style-name="T5"><text:span text:style-name="T6">Adicione as seguintes variáveis. Clique em </text:span><text:span text:style-name="T8">"Add environment variable"</text:span><text:span text:style-name="T6">:</text:span></text:p>
        </text:list-item>
      </text:list>
      <text:list xml:id="list105243478278450" text:continue-list="list39877210" text:style-name="WWNum62">
        <text:list-item>
          <text:p text:style-name="P235" loext:marker-style-name="T5"><text:span text:style-name="T8">Key 1:</text:span><text:span text:style-name="T6"> DYNAMODB_TABLE_NAME</text:span></text:p>
        </text:list-item>
        <text:list-item>
          <text:p text:style-name="P236" loext:marker-style-name="T5"><text:span text:style-name="T8">Value 1:</text:span><text:span text:style-name="T6"> controle-arquivos-historico-seu-nome</text:span></text:p>
        </text:list-item>
      </text:list>
      <text:p text:style-name="P237" loext:marker-style-name="T9"/>
      <text:p text:style-name="P238" loext:marker-style-name="T9"><text:span text:style-name="T40">Atenção:</text:span><text:span text:style-name="T6"> Se você não anotou o nome exato da sua tabela no DynamoDB, volte lá e confirme antes de prosseguir, verifique não tem espaços em </text:span><text:soft-page-break/><text:span text:style-name="T6">brancos antes e depois no nome da tabela. Se o nome estiver diferente, essa validação pode falhar.</text:span></text:p>
      <text:p text:style-name="P239" loext:marker-style-name="T9"/>
      <text:list xml:id="list105243191736687" text:continue-list="list770636120" text:style-name="WWNum63">
        <text:list-item>
          <text:p text:style-name="P240" loext:marker-style-name="T5"><text:span text:style-name="T6">Clique novamente em </text:span><text:span text:style-name="T8">"Add environment variable"</text:span><text:span text:style-name="T6">:</text:span></text:p>
        </text:list-item>
      </text:list>
      <text:list xml:id="list105243696464876" text:continue-list="list168374987" text:style-name="WWNum64">
        <text:list-item>
          <text:p text:style-name="P241" loext:marker-style-name="T5"><text:span text:style-name="T8">Key 2:</text:span><text:span text:style-name="T6"> SNS_TOPIC_ARN</text:span></text:p>
        </text:list-item>
        <text:list-item>
          <text:p text:style-name="P242" loext:marker-style-name="T5"><text:span text:style-name="T8">Value 2:</text:span><text:span text:style-name="T6"> Cole o ARN do seu tópico SNS notificacao-erro-arquivos-seu-nome (você anotou anteriormente no bloco de notas). </text:span></text:p>
        </text:list-item>
      </text:list>
      <text:list xml:id="list105243204129748" text:continue-list="list784615067" text:style-name="WWNum65">
        <text:list-item>
          <text:p text:style-name="P243" loext:marker-style-name="T5"><text:span text:style-name="T6">Clique novamente em </text:span><text:span text:style-name="T8">"Add environment variable"</text:span><text:span text:style-name="T6">:</text:span></text:p>
        </text:list-item>
      </text:list>
      <text:list xml:id="list105243489211174" text:continue-list="list824713671" text:style-name="WWNum66">
        <text:list-item>
          <text:p text:style-name="P244" loext:marker-style-name="T5"><text:span text:style-name="T8">Key 3:</text:span><text:span text:style-name="T6"> SQS_FIFO_PEDIDOS_URL</text:span></text:p>
        </text:list-item>
        <text:list-item>
          <text:p text:style-name="P245" loext:marker-style-name="T5"><text:span text:style-name="T8">Value 3:</text:span><text:span text:style-name="T6"> Cole a </text:span><text:span text:style-name="T8">URL</text:span><text:span text:style-name="T6"> da fila pedidos-fifo-queue-seu-nome.fifo (criada na Aula 1).</text:span></text:p>
        </text:list-item>
      </text:list>
      <text:list xml:id="list105244114461056" text:continue-list="list3419726888" text:style-name="WWNum67">
        <text:list-item>
          <text:p text:style-name="P246" loext:marker-style-name="T5"><text:span text:style-name="T6">Clique em </text:span><text:span text:style-name="T8">"Save"</text:span><text:span text:style-name="T6">.</text:span></text:p>
        </text:list-item>
      </text:list>
      <text:list xml:id="list105243993709283" text:continue-list="list1829827296" text:style-name="WWNum68">
        <text:list-item>
          <text:p text:style-name="P247" loext:marker-style-name="T5"><text:span text:style-name="T6">Vá para </text:span><text:span text:style-name="T8">"Configuration"</text:span><text:span text:style-name="T6"> &gt; </text:span><text:span text:style-name="T8">"General configuration"</text:span><text:span text:style-name="T6"> &gt; </text:span><text:span text:style-name="T8">"Edit"</text:span><text:span text:style-name="T6">.</text:span></text:p>
        </text:list-item>
      </text:list>
      <text:list xml:id="list105244603660942" text:continue-list="list3538746293" text:style-name="WWNum69">
        <text:list-item>
          <text:p text:style-name="P248" loext:marker-style-name="T5"><text:span text:style-name="T6">Aumente o </text:span><text:span text:style-name="T8">Timeout</text:span><text:span text:style-name="T6"> para 1 minuto (ou mais, dependendo do tamanho/complexidade dos arquivos): </text:span></text:p>
        </text:list-item>
      </text:list>
      <text:p text:style-name="P44" loext:marker-style-name="T9"/>
      <text:list xml:id="list105244234748857" text:continue-list="list759619597" text:style-name="WWNum70">
        <text:list-item>
          <text:p text:style-name="P249" loext:marker-style-name="T5"><text:span text:style-name="T6">Clique em </text:span><text:span text:style-name="T8">"Save"</text:span><text:span text:style-name="T6">.</text:span></text:p>
        </text:list-item>
      </text:list>
      <text:p text:style-name="P22" loext:marker-style-name="T9"/>
      <text:h text:style-name="P23" text:outline-level="3" loext:marker-style-name="T11"><text:span text:style-name="T12">Passo Complementar: Adicionar Permissão Inicial de SQS à Role da Lambda</text:span></text:h>
      <text:p text:style-name="P12" loext:marker-style-name="T9"><text:span text:style-name="T6">Antes de adicionarmos o trigger SQS à nossa função Lambda validacao-s3-arquivos-lambda-seu-nome, precisamos garantir que sua IAM Role (lambda-s3-validation-role-seu-nome) tenha as permissões mínimas para interagir com a fila s3-arquivos-json-queue-seu-nome. Sem isso, a criação do trigger falhará.</text:span></text:p>
      <text:list xml:id="list105242926042753" text:continue-list="list4021252257" text:style-name="WWNum71">
        <text:list-item>
          <text:p text:style-name="P250" loext:marker-style-name="T5"><text:span text:style-name="T6">Acesse o serviço </text:span><text:span text:style-name="T8">IAM</text:span><text:span text:style-name="T6"> no Console AWS.</text:span></text:p>
        </text:list-item>
      </text:list>
      <text:list xml:id="list105244216215279" text:continue-list="list1642562417" text:style-name="WWNum72">
        <text:list-item>
          <text:p text:style-name="P251" loext:marker-style-name="T5"><text:span text:style-name="T6">No menu à esquerda, clique em </text:span><text:span text:style-name="T8">"Roles"</text:span><text:span text:style-name="T6"> e encontre a role </text:span><text:span text:style-name="T8">lambda-s3-validation-role-seu-nome</text:span><text:span text:style-name="T6"> (criada no Passo 2.1). Clique nela.</text:span></text:p>
        </text:list-item>
      </text:list>
      <text:list xml:id="list105242509694970" text:continue-list="list4175987830" text:style-name="WWNum73">
        <text:list-item>
          <text:p text:style-name="P252" loext:marker-style-name="T5"><text:span text:style-name="T6">Na aba </text:span><text:span text:style-name="T8">"Permissions"</text:span><text:span text:style-name="T6">, sob "Permissions policies", clique em </text:span><text:span text:style-name="T8">"Add permissions"</text:span><text:span text:style-name="T6"> e selecione </text:span><text:span text:style-name="T8">"Create inline policy"</text:span><text:span text:style-name="T6">.</text:span></text:p>
        </text:list-item>
      </text:list>
      <text:list xml:id="list105244026880764" text:continue-list="list3271659539" text:style-name="WWNum74">
        <text:list-item>
          <text:p text:style-name="P253" loext:marker-style-name="T5"><text:span text:style-name="T6">Selecione a aba </text:span><text:span text:style-name="T8">JSON</text:span><text:span text:style-name="T6">.</text:span></text:p>
        </text:list-item>
      </text:list>
      <text:list xml:id="list105242887436278" text:continue-list="list1231644984" text:style-name="WWNum75">
        <text:list-item>
          <text:p text:style-name="P254" loext:marker-style-name="T5"><text:span text:style-name="T6">Apague o esbouço existente.</text:span></text:p>
        </text:list-item>
      </text:list>
      <text:list xml:id="list105243694708432" text:continue-list="list1414132596" text:style-name="WWNum76">
        <text:list-item>
          <text:p text:style-name="P255" loext:marker-style-name="T5"><text:span text:style-name="T6">Cole o seguinte JSON, substituindo:</text:span></text:p>
        </text:list-item>
      </text:list>
      <text:p text:style-name="P155" loext:marker-style-name="T9"/>
      <text:p text:style-name="P46" loext:marker-style-name="T9"><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oft-page-break/><text:span text:style-name="T16">     </text:span><text:span text:style-name="T17">"Action"</text:span><text:span text:style-name="T16">: [</text:span></text:p>
      <text:p text:style-name="P47" loext:marker-style-name="T9"><text:span text:style-name="T16">       </text:span><text:span text:style-name="T17">"sqs</text:span><text:span text:style-name="T16">:</text:span><text:span text:style-name="T17">ReceiveMessage"</text:span><text:span text:style-name="T16">,</text:span></text:p>
      <text:p text:style-name="P47" loext:marker-style-name="T9"><text:span text:style-name="T16">       </text:span><text:span text:style-name="T17">"sqs</text:span><text:span text:style-name="T16">:</text:span><text:span text:style-name="T17">DeleteMessage"</text:span><text:span text:style-name="T16">,</text:span></text:p>
      <text:p text:style-name="P47" loext:marker-style-name="T9"><text:span text:style-name="T16">       </text:span><text:span text:style-name="T17">"sqs</text:span><text:span text:style-name="T16">:</text:span><text:span text:style-name="T17">GetQueueAttributes"</text:span></text:p>
      <text:p text:style-name="P47" loext:marker-style-name="T9"><text:span text:style-name="T16">     ],</text:span></text:p>
      <text:p text:style-name="P47" loext:marker-style-name="T9"><text:span text:style-name="T16">     </text:span><text:span text:style-name="T17">"Resource"</text:span><text:span text:style-name="T16">: </text:span><text:span text:style-name="T17">"COLE AQUI O ARN DA SUA FILA SQS s3</text:span><text:span text:style-name="T16">-</text:span><text:span text:style-name="T17">arquivos</text:span><text:span text:style-name="T16">-</text:span><text:span text:style-name="T17">json</text:span><text:span text:style-name="T16">-</text:span><text:span text:style-name="T17">queue</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155" loext:marker-style-name="T9"/>
      <text:list xml:id="list105243564549906" text:continue-list="list1208632452" text:style-name="WWNum77">
        <text:list-item>
          <text:p text:style-name="P256" loext:marker-style-name="T5"><text:span text:style-name="T41">COLE AQUI O ARN DA SUA FILA SQS s3-arquivos-json-queue-seu-nome </text:span><text:span text:style-name="T6">Pelo ARN da sua Fila SQS s3-arquivos-json-queue-seu-nome.</text:span></text:p>
        </text:list-item>
      </text:list>
      <text:p text:style-name="P118" loext:marker-style-name="T9"/>
      <text:list xml:id="list105244154781147" text:continue-list="list1656563594" text:style-name="WWNum78">
        <text:list-item>
          <text:p text:style-name="P257" loext:marker-style-name="T5"><text:span text:style-name="T8">Next</text:span></text:p>
        </text:list-item>
      </text:list>
      <text:list xml:id="list105243378568340" text:continue-list="list2604046456" text:style-name="WWNum79">
        <text:list-item>
          <text:p text:style-name="P258" loext:marker-style-name="T5"><text:span text:style-name="T8">Name:</text:span><text:span text:style-name="T6"> SQSReadFromArquivosJsonQueueTrigger-seu-nome (um nome que indique que é para o trigger).</text:span></text:p>
        </text:list-item>
      </text:list>
      <text:list xml:id="list105242748391961" text:continue-list="list2910356286" text:style-name="WWNum80">
        <text:list-item>
          <text:p text:style-name="P259" loext:marker-style-name="T5"><text:span text:style-name="T8">Clique em</text:span><text:span text:style-name="T6"> "Create policy".</text:span></text:p>
        </text:list-item>
      </text:list>
      <text:p text:style-name="P260" loext:marker-style-name="T9"><text:span text:style-name="T8">Com esta permissão em vigor, podemos prosseguir para adicionar o trigger.</text:span></text:p>
      <text:p text:style-name="P22" loext:marker-style-name="T9"/>
      <text:h text:style-name="P228" text:outline-level="3" loext:marker-style-name="T11"><text:span text:style-name="T12">Adicionar o Trigger SQS à Lambda</text:span></text:h>
      <text:list xml:id="list105243895279289" text:continue-list="list1013659792" text:style-name="WWNum81">
        <text:list-item>
          <text:p text:style-name="P261" loext:marker-style-name="T5"><text:span text:style-name="T6">Busque pelo serviço do </text:span><text:span text:style-name="T8">AWS Lambda</text:span><text:span text:style-name="T6"> na barra de pesquisa.</text:span></text:p>
        </text:list-item>
      </text:list>
      <text:list xml:id="list105242580107337" text:continue-list="list1778840170" text:style-name="WWNum82">
        <text:list-item>
          <text:p text:style-name="P262" loext:marker-style-name="T5"><text:span text:style-name="T6">Acesse o serviço </text:span><text:span text:style-name="T8">AWS Lambda</text:span><text:span text:style-name="T6">.</text:span></text:p>
        </text:list-item>
      </text:list>
      <text:list xml:id="list105244558235766" text:continue-list="list1129151658" text:style-name="WWNum83">
        <text:list-item>
          <text:p text:style-name="P263" loext:marker-style-name="T5"><text:span text:style-name="T8">Selecione a Função Lambda</text:span><text:span text:style-name="T6"> “validacao-s3-arquivos-lambda-seu-nome”.</text:span></text:p>
        </text:list-item>
      </text:list>
      <text:list xml:id="list105244562456723" text:continue-list="list2889757078" text:style-name="WWNum84">
        <text:list-item>
          <text:p text:style-name="P264" loext:marker-style-name="T5"><text:span text:style-name="T6">Role para baixo.</text:span></text:p>
        </text:list-item>
        <text:list-item>
          <text:p text:style-name="P265" loext:marker-style-name="T5"><text:span text:style-name="T6">Vá para </text:span><text:span text:style-name="T8">"Configuration"</text:span><text:span text:style-name="T6"> &gt; </text:span><text:span text:style-name="T8">"Triggers"</text:span><text:span text:style-name="T6"> &gt; </text:span><text:span text:style-name="T8">"Add trigger"</text:span><text:span text:style-name="T6">.</text:span></text:p>
        </text:list-item>
      </text:list>
      <text:list xml:id="list105242838632700" text:continue-list="list2994001046" text:style-name="WWNum85">
        <text:list-item>
          <text:p text:style-name="P266" loext:marker-style-name="T5"><text:span text:style-name="T6">Fonte: </text:span><text:span text:style-name="T8">SQS</text:span><text:span text:style-name="T6">.</text:span></text:p>
        </text:list-item>
        <text:list-item>
          <text:p text:style-name="P267" loext:marker-style-name="T5"><text:span text:style-name="T6">SQS queue: s3-arquivos-json-queue-seu-nome.</text:span></text:p>
        </text:list-item>
        <text:list-item>
          <text:p text:style-name="P268" loext:marker-style-name="T5"><text:span text:style-name="T6">Batch size: 1.</text:span></text:p>
        </text:list-item>
        <text:list-item>
          <text:p text:style-name="P269" loext:marker-style-name="T5"><text:span text:style-name="T6">Clique em </text:span><text:span text:style-name="T8">"Add"</text:span><text:span text:style-name="T6">.</text:span></text:p>
        </text:list-item>
      </text:list>
      <text:list xml:id="list105244209671348" text:continue-list="list1450407847" text:style-name="WWNum86">
        <text:list-item>
          <text:p text:style-name="P270" loext:marker-style-name="T5"><text:span text:style-name="T14">Ao tentar salvar, pode aparecer o erro: </text:span><text:span text:style-name="T13">"Ocorreu um erro ao criar o trigger: Queue visibility timeout: 30 seconds is less than Function timeout: 60 seconds". Isso acontece porque, na fila SQS "s3-arquivos-json-queue-seu-nome", o </text:span><text:span text:style-name="T14">tempo de visibilidade</text:span><text:span text:style-name="T13"> da mensagem está configurado como </text:span><text:span text:style-name="T14">30 segundos</text:span><text:span text:style-name="T13">, enquanto a função Lambda tem timeout de </text:span><text:span text:style-name="T14">60 segundos</text:span><text:span text:style-name="T13">. Com essa configuração, se a Lambda ainda estiver processando a mensagem após 30 segundos, </text:span><text:soft-page-break/><text:span text:style-name="T13">outro cliente poderá tentar processá-la novamente, causando </text:span><text:span text:style-name="T14">duplicidade</text:span><text:span text:style-name="T13">.</text:span></text:p>
        </text:list-item>
      </text:list>
      <text:list xml:id="list105242535947630" text:continue-list="list2106845274" text:style-name="WWNum87">
        <text:list-item>
          <text:p text:style-name="P271" loext:marker-style-name="T5"><text:span text:style-name="T13">Acesse o SQS e selecione sua fila “validacao-s3-arquivos-lambda-seu-nome".</text:span></text:p>
        </text:list-item>
        <text:list-item>
          <text:p text:style-name="P272" loext:marker-style-name="T5"><text:span text:style-name="T13">Clique em Editar</text:span></text:p>
        </text:list-item>
        <text:list-item>
          <text:p text:style-name="P273" loext:marker-style-name="T5"><text:span text:style-name="T13">Em Tempo limite de visibilidade, altere o valor para 60 segundos.</text:span></text:p>
        </text:list-item>
        <text:list-item>
          <text:p text:style-name="P274" loext:marker-style-name="T5"><text:span text:style-name="T13">Volte ao Lambda, atualize a página e verifique se o gatilho do SQS aparece automaticamente. Em caso negativo, refaça a etapa cinco. </text:span></text:p>
        </text:list-item>
      </text:list>
      <text:p text:style-name="P22" loext:marker-style-name="T9"/>
      <text:p text:style-name="P10" loext:marker-style-name="T9"><draw:custom-shape text:anchor-type="as-char" draw:z-index="14" draw:name="AutoShape 10" draw:style-name="gr2" draw:text-style-name="P31" svg:width="0.847cm" svg:height="0.847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loext:marker-style-name="T9"><draw:custom-shape text:anchor-type="as-char" draw:z-index="15" draw:name="AutoShape 11"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figuração do "Data Lake" (Amazon S3) e Notificações</text:span></text:h>
      <text:p text:style-name="P22" loext:marker-style-name="T9"/>
      <text:h text:style-name="P228" text:outline-level="3" loext:marker-style-name="T11"><text:span text:style-name="T12">Criar o Bucket S3 (datalake-arquivos-seu-nome)</text:span></text:h>
      <text:list xml:id="list105242764099896" text:continue-list="list3194321094" text:style-name="WWNum88">
        <text:list-item>
          <text:p text:style-name="P275" loext:marker-style-name="T5"><text:span text:style-name="T6">Busque pelo serviço do </text:span><text:span text:style-name="T8">Amazon S3</text:span><text:span text:style-name="T6"> na barra de pesquisa.</text:span></text:p>
        </text:list-item>
      </text:list>
      <text:list xml:id="list105243266992240" text:continue-list="list3773693743" text:style-name="WWNum89">
        <text:list-item>
          <text:p text:style-name="P276" loext:marker-style-name="T5"><text:span text:style-name="T6">Acesse o serviço </text:span><text:span text:style-name="T8">Amazon S3</text:span><text:span text:style-name="T6">.</text:span></text:p>
        </text:list-item>
      </text:list>
      <text:list xml:id="list105244462510720" text:continue-list="list3670147085" text:style-name="WWNum90">
        <text:list-item>
          <text:p text:style-name="P277" loext:marker-style-name="T5"><text:span text:style-name="T6">Clique em </text:span><text:span text:style-name="T8">"Create function"</text:span><text:span text:style-name="T6"> </text:span></text:p>
        </text:list-item>
      </text:list>
      <text:list xml:id="list105243329961135" text:continue-list="list2432165749" text:style-name="WWNum91">
        <text:list-item>
          <text:p text:style-name="P278" loext:marker-style-name="T5"><text:span text:style-name="T8">Bucket name:</text:span><text:span text:style-name="T6"> datalake-arquivos-seu-nome (deve ser globalmente único).</text:span></text:p>
        </text:list-item>
      </text:list>
      <text:list xml:id="list2788627441" text:style-name="WWNum92">
        <text:list-item>
          <text:p text:style-name="P279" loext:marker-style-name="T5"><text:span text:style-name="T6">Mantenha </text:span><text:span text:style-name="T8">"Block all public access"</text:span><text:span text:style-name="T6"> marcado.</text:span></text:p>
        </text:list-item>
      </text:list>
      <text:list xml:id="list1948895347" text:style-name="WWNum93">
        <text:list-item>
          <text:p text:style-name="P280" loext:marker-style-name="T5"><text:span text:style-name="T6">Clique em </text:span><text:span text:style-name="T8">"Create bucket"</text:span><text:span text:style-name="T6">.</text:span></text:p>
        </text:list-item>
      </text:list>
      <text:list xml:id="list3020802404" text:style-name="WWNum94">
        <text:list-item>
          <text:p text:style-name="P281" loext:marker-style-name="T5"><text:span text:style-name="T8">Anote</text:span><text:span text:style-name="T6"> o </text:span><text:span text:style-name="T8">ARN</text:span><text:span text:style-name="T6"> e o </text:span><text:span text:style-name="T8">nome do Bucket</text:span><text:span text:style-name="T6">.</text:span></text:p>
        </text:list-item>
      </text:list>
      <text:p text:style-name="P22" loext:marker-style-name="T9"/>
      <text:h text:style-name="P23" text:outline-level="3" loext:marker-style-name="T11"><text:span text:style-name="T12">Configurar Notificação de Eventos do S3 para SQS</text:span></text:h>
      <text:p text:style-name="P10" loext:marker-style-name="T9"><text:span text:style-name="T40">Atenção para um possível erro aqui!</text:span></text:p>
      <text:p text:style-name="P10" loext:marker-style-name="T9"><text:span text:style-name="T6">Caso você se depare com este erro </text:span><text:span text:style-name="T8">"Unable to validate the following destination configurations"</text:span><text:span text:style-name="T6"> ao tentar configurar a notificação de eventos do S3 para SQS geralmente indica um problema de permissão</text:span><text:span text:style-name="T8"> do serviço S3 para a fila SQS</text:span><text:span text:style-name="T6">.</text:span></text:p>
      <text:p text:style-name="P10" loext:marker-style-name="T9"><text:span text:style-name="T6">Quando você configura o S3 para enviar eventos para uma fila SQS, o S3 precisa de permissão para executar a ação sqs:SendMessage </text:span><text:span text:style-name="T28">nessa fila específica</text:span><text:span text:style-name="T6">. Normalmente, o console do S3 tenta adicionar automaticamente uma política à fila SQS para permitir isso. No entanto, às vezes esse processo automático pode falhar ou encontrar problemas.</text:span></text:p>
      <text:p text:style-name="P22" loext:marker-style-name="T9"/>
      <text:p text:style-name="P12" loext:marker-style-name="T9"><text:span text:style-name="T8">Causas Comuns e Soluções:</text:span></text:p>
      <text:list xml:id="list2719485332" text:style-name="WWNum95">
        <text:list-item>
          <text:p text:style-name="P282" loext:marker-style-name="T5"><text:span text:style-name="T8">Política da Fila SQS Restritiva (Principal Causa):</text:span></text:p>
        </text:list-item>
      </text:list>
      <text:list xml:id="list75430860" text:style-name="WWNum96">
        <text:list-item>
          <text:p text:style-name="P283" loext:marker-style-name="T5"><text:soft-page-break/><text:span text:style-name="T6">Se a sua fila SQS s3-arquivos-json-queue-seu-nome já tiver uma política de acesso (resource-based policy) que seja muito restritiva, ela pode impedir que o console do S3 (ou o serviço S3) adicione a permissão necessária.</text:span></text:p>
        </text:list-item>
        <text:list-item>
          <text:p text:style-name="P284" loext:marker-style-name="T5"><text:span text:style-name="T8">Solução:</text:span><text:span text:style-name="T6"> Verifique a política da sua fila SQS.</text:span></text:p>
        </text:list-item>
      </text:list>
      <text:list xml:id="list35541563" text:style-name="WWNum97">
        <text:list-item>
          <text:p text:style-name="P285" loext:marker-style-name="T5"><text:span text:style-name="T6">Vá para o serviço </text:span><text:span text:style-name="T8">SQS</text:span><text:span text:style-name="T6">.</text:span></text:p>
        </text:list-item>
        <text:list-item>
          <text:p text:style-name="P285" loext:marker-style-name="T5"><text:span text:style-name="T6">Selecione a fila s3-arquivos-json-queue-seu-nome.</text:span></text:p>
        </text:list-item>
        <text:list-item>
          <text:p text:style-name="P285" loext:marker-style-name="T5"><text:span text:style-name="T6">Clique na aba </text:span><text:span text:style-name="T8">"Queue policies"</text:span><text:span text:style-name="T6"> e na seção </text:span><text:span text:style-name="T8">"Access policy"</text:span><text:span text:style-name="T6">, clique em </text:span><text:span text:style-name="T8">"Edit"</text:span><text:span text:style-name="T6">.</text:span></text:p>
        </text:list-item>
        <text:list-item>
          <text:p text:style-name="P285" loext:marker-style-name="T5"><text:span text:style-name="T6">Desça até </text:span><text:span text:style-name="T8">Access policy.</text:span></text:p>
        </text:list-item>
        <text:list-item>
          <text:p text:style-name="P286" loext:marker-style-name="T5"><text:span text:style-name="T8">Ação Recomendada:</text:span><text:span text:style-name="T6"> Remova a política existente e cole a política abaixo, modificando as seguintes informações:</text:span></text:p>
        </text:list-item>
      </text:list>
      <text:p text:style-name="P155" loext:marker-style-name="T9"/>
      <text:p text:style-name="P58" loext:marker-style-name="T9"><text:span text:style-name="T42">{</text:span></text:p>
      <text:p text:style-name="P287" loext:marker-style-name="T9"><text:span text:style-name="T42">  </text:span><text:span text:style-name="T43">"Version"</text:span><text:span text:style-name="T42">: </text:span><text:span text:style-name="T43">"2012</text:span><text:span text:style-name="T42">-</text:span><text:span text:style-name="T43">10</text:span><text:span text:style-name="T42">-</text:span><text:span text:style-name="T43">17"</text:span><text:span text:style-name="T42">,</text:span></text:p>
      <text:p text:style-name="P287" loext:marker-style-name="T9"><text:span text:style-name="T42">  </text:span><text:span text:style-name="T43">"Id"</text:span><text:span text:style-name="T42">: </text:span><text:span text:style-name="T43">"PolicyForS3ToSQS"</text:span><text:span text:style-name="T42">,</text:span></text:p>
      <text:p text:style-name="P287" loext:marker-style-name="T9"><text:span text:style-name="T42">  </text:span><text:span text:style-name="T43">"Statement"</text:span><text:span text:style-name="T42">: [</text:span></text:p>
      <text:p text:style-name="P287" loext:marker-style-name="T9"><text:span text:style-name="T42">    {</text:span></text:p>
      <text:p text:style-name="P287" loext:marker-style-name="T9"><text:span text:style-name="T42">      </text:span><text:span text:style-name="T43">"Sid"</text:span><text:span text:style-name="T42">: </text:span><text:span text:style-name="T43">"AllowS3ToSendMessage"</text:span><text:span text:style-name="T42">,</text:span></text:p>
      <text:p text:style-name="P287" loext:marker-style-name="T9"><text:span text:style-name="T42">      </text:span><text:span text:style-name="T43">"Effect"</text:span><text:span text:style-name="T42">: </text:span><text:span text:style-name="T43">"Allow"</text:span><text:span text:style-name="T42">,</text:span></text:p>
      <text:p text:style-name="P287" loext:marker-style-name="T9"><text:span text:style-name="T42">      </text:span><text:span text:style-name="T43">"Principal"</text:span><text:span text:style-name="T42">: {</text:span></text:p>
      <text:p text:style-name="P287" loext:marker-style-name="T9"><text:span text:style-name="T42">        </text:span><text:span text:style-name="T43">"Service"</text:span><text:span text:style-name="T42">: </text:span><text:span text:style-name="T43">"s3</text:span><text:span text:style-name="T42">.</text:span><text:span text:style-name="T43">amazonaws</text:span><text:span text:style-name="T42">.</text:span><text:span text:style-name="T43">com"</text:span></text:p>
      <text:p text:style-name="P287" loext:marker-style-name="T9"><text:span text:style-name="T42">      },</text:span></text:p>
      <text:p text:style-name="P287" loext:marker-style-name="T9"><text:span text:style-name="T42">      </text:span><text:span text:style-name="T43">"Action"</text:span><text:span text:style-name="T42">: </text:span><text:span text:style-name="T43">"SQS</text:span><text:span text:style-name="T42">:</text:span><text:span text:style-name="T43">SendMessage"</text:span><text:span text:style-name="T42">,</text:span></text:p>
      <text:p text:style-name="P287" loext:marker-style-name="T9"><text:span text:style-name="T42">      </text:span><text:span text:style-name="T43">"Resource"</text:span><text:span text:style-name="T42">: </text:span><text:span text:style-name="T43">"COLE AQUI O ARN DA SUA FILA s3</text:span><text:span text:style-name="T42">-</text:span><text:span text:style-name="T43">arquivos</text:span><text:span text:style-name="T42">-</text:span><text:span text:style-name="T43">json</text:span><text:span text:style-name="T42">-</text:span><text:span text:style-name="T43">queue</text:span><text:span text:style-name="T42">-</text:span><text:span text:style-name="T43">seu</text:span><text:span text:style-name="T42">-</text:span><text:span text:style-name="T43">nome"</text:span><text:span text:style-name="T42">,</text:span></text:p>
      <text:p text:style-name="P287" loext:marker-style-name="T9"><text:span text:style-name="T42">      </text:span><text:span text:style-name="T43">"Condition"</text:span><text:span text:style-name="T42">: {</text:span></text:p>
      <text:p text:style-name="P287" loext:marker-style-name="T9"><text:span text:style-name="T42">        </text:span><text:span text:style-name="T43">"ArnLike"</text:span><text:span text:style-name="T42">: {</text:span></text:p>
      <text:p text:style-name="P287" loext:marker-style-name="T9"><text:span text:style-name="T42">          </text:span><text:span text:style-name="T43">"aws</text:span><text:span text:style-name="T42">:</text:span><text:span text:style-name="T43">SourceArn"</text:span><text:span text:style-name="T42">: </text:span><text:span text:style-name="T43">"COLE AQUI O ARN DO SEU BUCKET datalake</text:span><text:span text:style-name="T42">-</text:span><text:span text:style-name="T43">arquivos</text:span><text:span text:style-name="T42">-</text:span><text:span text:style-name="T43">seu</text:span><text:span text:style-name="T42">-</text:span><text:span text:style-name="T43">nome"</text:span></text:p>
      <text:p text:style-name="P287" loext:marker-style-name="T9"><text:span text:style-name="T42">        },</text:span></text:p>
      <text:p text:style-name="P287" loext:marker-style-name="T9"><text:span text:style-name="T42">        </text:span><text:span text:style-name="T43">"StringEquals"</text:span><text:span text:style-name="T42">: {</text:span></text:p>
      <text:p text:style-name="P287" loext:marker-style-name="T9"><text:span text:style-name="T42">          </text:span><text:span text:style-name="T43">"aws</text:span><text:span text:style-name="T42">:</text:span><text:span text:style-name="T43">SourceAccount"</text:span><text:span text:style-name="T42">: </text:span><text:span text:style-name="T43">"COLE AQUI O ID DA SUA CONTA"</text:span></text:p>
      <text:p text:style-name="P287" loext:marker-style-name="T9"><text:span text:style-name="T42">        }</text:span></text:p>
      <text:p text:style-name="P287" loext:marker-style-name="T9"><text:span text:style-name="T42">      }</text:span></text:p>
      <text:p text:style-name="P287" loext:marker-style-name="T9"><text:span text:style-name="T42">    }</text:span></text:p>
      <text:p text:style-name="P287" loext:marker-style-name="T9"><text:span text:style-name="T42">  ]</text:span></text:p>
      <text:p text:style-name="P288" loext:marker-style-name="T9"><text:span text:style-name="T42">}</text:span></text:p>
      <text:p text:style-name="P155" loext:marker-style-name="T9"/>
      <text:list xml:id="list805517697" text:style-name="WWNum98">
        <text:list-item>
          <text:p text:style-name="P289" loext:marker-style-name="T5"><text:span text:style-name="T6">Clique em </text:span><text:span text:style-name="T8">Save</text:span><text:span text:style-name="T6">.</text:span></text:p>
        </text:list-item>
      </text:list>
      <text:p text:style-name="P290" loext:marker-style-name="T9"><text:span text:style-name="T6">Volte ao passo </text:span><text:span text:style-name="T14">Configurar Notificação de Eventos do S3 para SQS</text:span><text:span text:style-name="T6">. Desta vez, você conseguirá finalizar o processo.</text:span></text:p>
      <text:list xml:id="list313476641" text:style-name="WWNum99">
        <text:list-item>
          <text:p text:style-name="P291" loext:marker-style-name="T5"><text:soft-page-break/><text:span text:style-name="T6">Navegue até seu bucket &gt; </text:span><text:span text:style-name="T8">"Properties"</text:span><text:span text:style-name="T6"> &gt; </text:span><text:span text:style-name="T8">"Event notifications"</text:span><text:span text:style-name="T6"> &gt; </text:span><text:span text:style-name="T8">"Create event notification"</text:span><text:span text:style-name="T6">.</text:span></text:p>
        </text:list-item>
      </text:list>
      <text:list xml:id="list183203884" text:style-name="WWNum100">
        <text:list-item>
          <text:p text:style-name="P292" loext:marker-style-name="T5"><text:span text:style-name="T8">Event name:</text:span><text:span text:style-name="T6"> s3-json-upload-to-sqs-seu-nome.</text:span></text:p>
        </text:list-item>
      </text:list>
      <text:list xml:id="list3978536298" text:style-name="WWNum101">
        <text:list-item>
          <text:p text:style-name="P293" loext:marker-style-name="T5"><text:span text:style-name="T8">Suffix:</text:span><text:span text:style-name="T6"> .json.</text:span></text:p>
        </text:list-item>
      </text:list>
      <text:list xml:id="list2163374437" text:style-name="WWNum102">
        <text:list-item>
          <text:p text:style-name="P294" loext:marker-style-name="T5"><text:span text:style-name="T8">Event types:</text:span><text:span text:style-name="T6"> </text:span><text:span text:style-name="T8">"All object create events"</text:span><text:span text:style-name="T6">.</text:span></text:p>
        </text:list-item>
      </text:list>
      <text:list xml:id="list801278802" text:style-name="WWNum103">
        <text:list-item>
          <text:p text:style-name="P295" loext:marker-style-name="T5"><text:span text:style-name="T8">Destination:</text:span></text:p>
        </text:list-item>
      </text:list>
      <text:list xml:id="list4041555091" text:style-name="WWNum104">
        <text:list-item>
          <text:p text:style-name="P296" loext:marker-style-name="T5"><text:span text:style-name="T8">"SQS queue"</text:span><text:span text:style-name="T6">.</text:span></text:p>
        </text:list-item>
        <text:list-item>
          <text:p text:style-name="P297" loext:marker-style-name="T5"><text:span text:style-name="T6">SQS queue: s3-arquivos-json-queue-seu-nome.</text:span></text:p>
        </text:list-item>
      </text:list>
      <text:list xml:id="list2255332851" text:style-name="WWNum105">
        <text:list-item>
          <text:p text:style-name="P298" loext:marker-style-name="T5"><text:span text:style-name="T6">Clique em </text:span><text:span text:style-name="T8">"Save changes"</text:span><text:span text:style-name="T6">.</text:span></text:p>
        </text:list-item>
      </text:list>
      <text:p text:style-name="P105" loext:marker-style-name="T9"/>
      <text:h text:style-name="P9" text:outline-level="2" loext:marker-style-name="T3"><text:span text:style-name="T4">Atualizar Permissões da Role da Lambda de Validação S3</text:span></text:h>
      <text:p text:style-name="P132" loext:marker-style-name="T9"><text:span text:style-name="T6">Conceder à lambda-s3-validation-role-seu-nome as permissões específicas.</text:span></text:p>
      <text:list xml:id="list720395882" text:style-name="WWNum106">
        <text:list-item>
          <text:p text:style-name="P299" loext:marker-style-name="T5"><text:span text:style-name="T6">Volte ao </text:span><text:span text:style-name="T8">IAM</text:span><text:span text:style-name="T6"> &gt; </text:span><text:span text:style-name="T8">"Roles"</text:span><text:span text:style-name="T6"> &gt; lambda-s3-validation-role-seu-nome.</text:span></text:p>
        </text:list-item>
      </text:list>
      <text:list xml:id="list748081965" text:style-name="WWNum107">
        <text:list-item>
          <text:p text:style-name="P300" loext:marker-style-name="T5"><text:span text:style-name="T6">Na aba </text:span><text:span text:style-name="T8">"Permissions"</text:span><text:span text:style-name="T6"> &gt; </text:span><text:span text:style-name="T8">"Add permissions"</text:span><text:span text:style-name="T6"> &gt; </text:span><text:span text:style-name="T8">"Create inline policy"</text:span><text:span text:style-name="T6">.</text:span></text:p>
        </text:list-item>
      </text:list>
      <text:list xml:id="list1128155409" text:style-name="WWNum108">
        <text:list-item>
          <text:p text:style-name="P301" loext:marker-style-name="T5"><text:span text:style-name="T6">Selecione a aba </text:span><text:span text:style-name="T8">JSON</text:span><text:span text:style-name="T6">.</text:span></text:p>
        </text:list-item>
      </text:list>
      <text:p text:style-name="P155" loext:marker-style-name="T9"/>
      <text:p text:style-name="P46" loext:marker-style-name="T9"><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span text:style-name="T17">"s3</text:span><text:span text:style-name="T16">:</text:span><text:span text:style-name="T17">GetObject"</text:span><text:span text:style-name="T16">,</text:span></text:p>
      <text:p text:style-name="P47" loext:marker-style-name="T9"><text:span text:style-name="T16">     </text:span><text:span text:style-name="T17">"Resource"</text:span><text:span text:style-name="T16">: </text:span><text:span text:style-name="T17">"arn</text:span><text:span text:style-name="T16">:</text:span><text:span text:style-name="T17">aws</text:span><text:span text:style-name="T16">:</text:span><text:span text:style-name="T17">s3</text:span><text:span text:style-name="T16">:::</text:span><text:span text:style-name="T17">datalake</text:span><text:span text:style-name="T16">-</text:span><text:span text:style-name="T17">arquivos</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span text:style-name="T17">"dynamodb</text:span><text:span text:style-name="T16">:</text:span><text:span text:style-name="T17">PutItem"</text:span><text:span text:style-name="T16">,</text:span></text:p>
      <text:p text:style-name="P47" loext:marker-style-name="T9"><text:span text:style-name="T16">     </text:span><text:span text:style-name="T17">"Resource"</text:span><text:span text:style-name="T16">: </text:span><text:span text:style-name="T17">"COLE AQUI O ARN DA SUA TABELA controle</text:span><text:span text:style-name="T16">-</text:span><text:span text:style-name="T17">arquivos</text:span><text:span text:style-name="T16">-</text:span><text:span text:style-name="T17">historico</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span text:style-name="T17">"sns</text:span><text:span text:style-name="T16">:</text:span><text:span text:style-name="T17">Publish"</text:span><text:span text:style-name="T16">,</text:span></text:p>
      <text:p text:style-name="P47" loext:marker-style-name="T9"><text:span text:style-name="T16">     </text:span><text:span text:style-name="T17">"Resource"</text:span><text:span text:style-name="T16">: </text:span><text:span text:style-name="T17">"COLE AQUI O ARN DO SEU SNS notificacao</text:span><text:span text:style-name="T16">-</text:span><text:span text:style-name="T17">erro</text:span><text:span text:style-name="T16">-</text:span><text:span text:style-name="T17">arquivos</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span text:style-name="T17">"sqs</text:span><text:span text:style-name="T16">:</text:span><text:span text:style-name="T17">SendMessage"</text:span><text:span text:style-name="T16">,</text:span></text:p>
      <text:p text:style-name="P47" loext:marker-style-name="T9"><text:span text:style-name="T16">     </text:span><text:span text:style-name="T17">"Resource"</text:span><text:span text:style-name="T16">: </text:span><text:span text:style-name="T17">"COLE AQUI O ARN DA SUA FILA pedidos</text:span><text:span text:style-name="T16">-</text:span><text:span text:style-name="T17">fifo</text:span><text:span text:style-name="T16">-</text:span><text:span text:style-name="T17">queue</text:span><text:span text:style-name="T16">-</text:span><text:span text:style-name="T17">seu</text:span><text:span text:style-name="T16">-</text:span><text:span text:style-name="T17">nome</text:span><text:span text:style-name="T16">.</text:span><text:span text:style-name="T17">fifo"</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155" loext:marker-style-name="T9"><text:soft-page-break/></text:p>
      <text:list xml:id="list2521693894" text:style-name="WWNum109">
        <text:list-item>
          <text:p text:style-name="P302" loext:marker-style-name="T5"><text:span text:style-name="T6">Cole o seguinte JSON (substitua REGION, ACCOUNT_ID e nomes dos recursos):</text:span></text:p>
        </text:list-item>
      </text:list>
      <text:list xml:id="list965452847" text:style-name="WWNum110">
        <text:list-item>
          <text:p text:style-name="P303" loext:marker-style-name="T5"><text:span text:style-name="T8">Next.</text:span></text:p>
        </text:list-item>
      </text:list>
      <text:list xml:id="list3382943975" text:style-name="WWNum111">
        <text:list-item>
          <text:p text:style-name="P304" loext:marker-style-name="T5"><text:span text:style-name="T6">Em </text:span><text:span text:style-name="T8">"Review policy"</text:span><text:span text:style-name="T6"> &gt; </text:span><text:span text:style-name="T8">Name:</text:span><text:span text:style-name="T6"> S3ReadSQSProcessDynamoSNSSQSFiFOPermissions-seu-nome.</text:span></text:p>
        </text:list-item>
      </text:list>
      <text:list xml:id="list1487135142" text:style-name="WWNum112">
        <text:list-item>
          <text:p text:style-name="P305" loext:marker-style-name="T5"><text:span text:style-name="T6">Clique em </text:span><text:span text:style-name="T8">"Create policy"</text:span><text:span text:style-name="T6">.</text:span></text:p>
        </text:list-item>
      </text:list>
      <text:p text:style-name="P10" loext:marker-style-name="T9"><draw:custom-shape text:anchor-type="as-char" draw:z-index="16" draw:name="AutoShape 12"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Teste do Fluxo de Ingestão de Arquivos S3 e Integração</text:span></text:h>
      <text:p text:style-name="P22" loext:marker-style-name="T9"/>
      <text:h text:style-name="P228" text:outline-level="3" loext:marker-style-name="T11"><text:span text:style-name="T12">Preparar Arquivos de Teste</text:span></text:h>
      <text:list xml:id="list1825992827" text:style-name="WWNum113">
        <text:list-item>
          <text:p text:style-name="P306" loext:marker-style-name="T5"><text:span text:style-name="T8">Copie e cole em bloco de notas o JSON:</text:span></text:p>
        </text:list-item>
      </text:list>
      <text:p text:style-name="P155" loext:marker-style-name="T9"/>
      <text:p text:style-name="P46" loext:marker-style-name="T9"><text:span text:style-name="T16">{</text:span></text:p>
      <text:p text:style-name="P47" loext:marker-style-name="T9"><text:span text:style-name="T16">   </text:span><text:span text:style-name="T17">"metadata_arquivo"</text:span><text:span text:style-name="T16">: {</text:span></text:p>
      <text:p text:style-name="P47" loext:marker-style-name="T9"><text:span text:style-name="T16">       </text:span><text:span text:style-name="T17">"data_geracao"</text:span><text:span text:style-name="T16">: </text:span><text:span text:style-name="T17">"2024</text:span><text:span text:style-name="T16">-</text:span><text:span text:style-name="T17">03</text:span><text:span text:style-name="T16">-</text:span><text:span text:style-name="T17">15"</text:span><text:span text:style-name="T16">,</text:span></text:p>
      <text:p text:style-name="P47" loext:marker-style-name="T9"><text:span text:style-name="T16">       </text:span><text:span text:style-name="T17">"origem_lote"</text:span><text:span text:style-name="T16">: </text:span><text:span text:style-name="T17">"sistema_X"</text:span></text:p>
      <text:p text:style-name="P47" loext:marker-style-name="T9"><text:span text:style-name="T16">   },</text:span></text:p>
      <text:p text:style-name="P47" loext:marker-style-name="T9"><text:span text:style-name="T16">   </text:span><text:span text:style-name="T17">"lista_pedidos"</text:span><text:span text:style-name="T16">: [</text:span></text:p>
      <text:p text:style-name="P47" loext:marker-style-name="T9"><text:span text:style-name="T16">       {</text:span></text:p>
      <text:p text:style-name="P47" loext:marker-style-name="T9"><text:span text:style-name="T16">           </text:span><text:span text:style-name="T17">"id_pedido_arquivo"</text:span><text:span text:style-name="T16">: </text:span><text:span text:style-name="T17">"S3P001</text:span><text:span text:style-name="T16">-</text:span><text:span text:style-name="T17">seu</text:span><text:span text:style-name="T16">-</text:span><text:span text:style-name="T17">nome"</text:span><text:span text:style-name="T16">,</text:span></text:p>
      <text:p text:style-name="P47" loext:marker-style-name="T9"><text:span text:style-name="T16">           </text:span><text:span text:style-name="T17">"id_cliente_arquivo"</text:span><text:span text:style-name="T16">: </text:span><text:span text:style-name="T17">"S3C001"</text:span><text:span text:style-name="T16">,</text:span></text:p>
      <text:p text:style-name="P47" loext:marker-style-name="T9"><text:span text:style-name="T16">           </text:span><text:span text:style-name="T17">"itens_pedido_arquivo"</text:span><text:span text:style-name="T16">: [</text:span></text:p>
      <text:p text:style-name="P47" loext:marker-style-name="T9"><text:span text:style-name="T16">               {</text:span><text:span text:style-name="T17">"sku"</text:span><text:span text:style-name="T16">: </text:span><text:span text:style-name="T17">"PROD</text:span><text:span text:style-name="T16">-</text:span><text:span text:style-name="T17">A"</text:span><text:span text:style-name="T16">, </text:span><text:span text:style-name="T17">"qtd"</text:span><text:span text:style-name="T16">: </text:span><text:span text:style-name="T22">2</text:span><text:span text:style-name="T16">},</text:span></text:p>
      <text:p text:style-name="P47" loext:marker-style-name="T9"><text:span text:style-name="T16">               {</text:span><text:span text:style-name="T17">"sku"</text:span><text:span text:style-name="T16">: </text:span><text:span text:style-name="T17">"PROD</text:span><text:span text:style-name="T16">-</text:span><text:span text:style-name="T17">B"</text:span><text:span text:style-name="T16">, </text:span><text:span text:style-name="T17">"qtd"</text:span><text:span text:style-name="T16">: </text:span><text:span text:style-name="T22">1</text:span><text:span text:style-name="T16">}</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7" loext:marker-style-name="T9"><text:span text:style-name="T16">           </text:span><text:span text:style-name="T17">"id_pedido_arquivo"</text:span><text:span text:style-name="T16">: </text:span><text:span text:style-name="T17">"S3P002</text:span><text:span text:style-name="T16">-</text:span><text:span text:style-name="T17">seu</text:span><text:span text:style-name="T16">-</text:span><text:span text:style-name="T17">nome"</text:span><text:span text:style-name="T16">,</text:span></text:p>
      <text:p text:style-name="P47" loext:marker-style-name="T9"><text:span text:style-name="T16">           </text:span><text:span text:style-name="T17">"id_cliente_arquivo"</text:span><text:span text:style-name="T16">: </text:span><text:span text:style-name="T17">"S3C002"</text:span><text:span text:style-name="T16">,</text:span></text:p>
      <text:p text:style-name="P47" loext:marker-style-name="T9"><text:span text:style-name="T16">           </text:span><text:span text:style-name="T17">"itens_pedido_arquivo"</text:span><text:span text:style-name="T16">: [</text:span></text:p>
      <text:p text:style-name="P47" loext:marker-style-name="T9"><text:span text:style-name="T16">               {</text:span><text:span text:style-name="T17">"sku"</text:span><text:span text:style-name="T16">: </text:span><text:span text:style-name="T17">"PROD</text:span><text:span text:style-name="T16">-</text:span><text:span text:style-name="T17">C"</text:span><text:span text:style-name="T16">, </text:span><text:span text:style-name="T17">"qtd"</text:span><text:span text:style-name="T16">: </text:span><text:span text:style-name="T22">5</text:span><text:span text:style-name="T16">}</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7" loext:marker-style-name="T9"><text:span text:style-name="T16">           </text:span><text:span text:style-name="T17">"id_pedido_arquivo_invalido"</text:span><text:span text:style-name="T16">: </text:span><text:span text:style-name="T17">"S3P003</text:span><text:span text:style-name="T16">-</text:span><text:span text:style-name="T17">falta</text:span><text:span text:style-name="T16">-</text:span><text:span text:style-name="T17">cliente"</text:span><text:span text:style-name="T16">,</text:span></text:p>
      <text:p text:style-name="P47" loext:marker-style-name="T9"><text:span text:style-name="T16">           </text:span><text:span text:style-name="T17">"itens_pedido_arquivo"</text:span><text:span text:style-name="T16">: [</text:span></text:p>
      <text:p text:style-name="P47" loext:marker-style-name="T9"><text:span text:style-name="T16">               {</text:span><text:span text:style-name="T17">"sku"</text:span><text:span text:style-name="T16">: </text:span><text:span text:style-name="T17">"PROD</text:span><text:span text:style-name="T16">-</text:span><text:span text:style-name="T17">D"</text:span><text:span text:style-name="T16">, </text:span><text:span text:style-name="T17">"qtd"</text:span><text:span text:style-name="T16">: </text:span><text:span text:style-name="T22">1</text:span><text:span text:style-name="T16">}</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155" loext:marker-style-name="T9"/>
      <text:list xml:id="list143567122" text:style-name="WWNum114">
        <text:list-item>
          <text:p text:style-name="P307" loext:marker-style-name="T5"><text:span text:style-name="T8">Abra e edite o arquivo colocando o seu nome: </text:span></text:p>
        </text:list-item>
      </text:list>
      <text:list xml:id="list2588969292" text:style-name="WWNum115">
        <text:list-item>
          <text:p text:style-name="P308" loext:marker-style-name="T5"><text:soft-page-break/><text:span text:style-name="T14">S3P001-</text:span><text:span text:style-name="T40">seu-nome</text:span></text:p>
        </text:list-item>
        <text:list-item>
          <text:p text:style-name="P308" loext:marker-style-name="T5"><text:span text:style-name="T14">S3P002-</text:span><text:span text:style-name="T40">seu-nome</text:span></text:p>
        </text:list-item>
        <text:list-item>
          <text:p text:style-name="P309" loext:marker-style-name="T5"><text:span text:style-name="T6">Salve com o nome</text:span><text:span text:style-name="T44"> </text:span><text:span text:style-name="T45">arquivo_com_pedidos.json</text:span><text:span text:style-name="T6"> </text:span></text:p>
        </text:list-item>
      </text:list>
      <text:list xml:id="list1018140597" text:style-name="WWNum116">
        <text:list-item>
          <text:p text:style-name="P310" loext:marker-style-name="T5"><text:span text:style-name="T8">Copie o JSON abaixo e salve com o nome:</text:span><text:span text:style-name="T45"> arquivo_schema_invalido.json</text:span></text:p>
        </text:list-item>
      </text:list>
      <text:p text:style-name="P155" loext:marker-style-name="T9"/>
      <text:p text:style-name="P46" loext:marker-style-name="T9"><text:span text:style-name="T16">{</text:span></text:p>
      <text:p text:style-name="P47" loext:marker-style-name="T9"><text:span text:style-name="T16"> </text:span><text:span text:style-name="T17">"alguma_outra_chave"</text:span><text:span text:style-name="T16">: </text:span><text:span text:style-name="T17">"sem_lista_pedidos"</text:span></text:p>
      <text:p text:style-name="P48" loext:marker-style-name="T9"><text:span text:style-name="T16">}</text:span></text:p>
      <text:p text:style-name="P105" loext:marker-style-name="T9"/>
      <text:h text:style-name="P194" text:outline-level="2" loext:marker-style-name="T3"><text:span text:style-name="T4">Testar com arquivo_com_pedidos.json</text:span></text:h>
      <text:list xml:id="list1393759107" text:style-name="WWNum117">
        <text:list-item>
          <text:p text:style-name="P311" loext:marker-style-name="T5"><text:span text:style-name="T6">Faça upload de arquivo_com_pedidos.json para o bucket S3.</text:span></text:p>
        </text:list-item>
      </text:list>
      <text:list xml:id="list460712394" text:style-name="WWNum118">
        <text:list-item>
          <text:p text:style-name="P312" loext:marker-style-name="T5"><text:span text:style-name="T8">Verificações:</text:span></text:p>
        </text:list-item>
      </text:list>
      <text:list xml:id="list3532718944" text:style-name="WWNum119">
        <text:list-item>
          <text:p text:style-name="P313" loext:marker-style-name="T5"><text:span text:style-name="T8">s3-arquivos-json-queue-seu-nome:</text:span><text:span text:style-name="T6"> Mensagem deve passar rapidamente.</text:span></text:p>
        </text:list-item>
        <text:list-item>
          <text:p text:style-name="P314" loext:marker-style-name="T5"><text:span text:style-name="T8">Logs da validacao-s3-arquivos-lambda-seu-nome:</text:span></text:p>
        </text:list-item>
        <text:list-item>
          <text:p text:style-name="P315" loext:marker-style-name="T5"><text:span text:style-name="T6">Verifique o processamento do arquivo.</text:span></text:p>
        </text:list-item>
      </text:list>
      <text:list xml:id="list637123797" text:style-name="WWNum120">
        <text:list-item>
          <text:p text:style-name="P316" loext:marker-style-name="T5"><text:span text:style-name="T6">Verifique as mensagens "Pedido ... enviado para SQS FIFO Pedidos." para S3P001 e S3P002.</text:span></text:p>
        </text:list-item>
        <text:list-item>
          <text:p text:style-name="P317" loext:marker-style-name="T5"><text:span text:style-name="T6">Verifique a mensagem de erro para o pedido inválido S3P003.</text:span></text:p>
        </text:list-item>
      </text:list>
      <text:list xml:id="list1591311987" text:style-name="WWNum121">
        <text:list-item>
          <text:p text:style-name="P318" loext:marker-style-name="T5"><text:span text:style-name="T8">DynamoDB (controle-arquivos-historico-seu-nome):</text:span><text:span text:style-name="T6"> Deve haver um item para arquivo_com_pedidos.json com statusValidacao: "ARQUIVO_VALIDADO".</text:span></text:p>
        </text:list-item>
        <text:list-item>
          <text:p text:style-name="P319" loext:marker-style-name="T5"><text:span text:style-name="T8">pedidos-fifo-queue-seu-nome.fifo (Fila da Aula 1):</text:span></text:p>
        </text:list-item>
      </text:list>
      <text:list xml:id="list2389444987" text:style-name="WWNum122">
        <text:list-item>
          <text:p text:style-name="P320" loext:marker-style-name="T5"><text:span text:style-name="T6">Vá para esta fila no console SQS &gt; "Send and receive messages" &gt; "Poll for messages".</text:span></text:p>
        </text:list-item>
        <text:list-item>
          <text:p text:style-name="P320" loext:marker-style-name="T5"><text:span text:style-name="T6">Você deverá ver </text:span><text:span text:style-name="T8">duas novas mensagens</text:span><text:span text:style-name="T6">, correspondentes a S3P001 e S3P002. Examine seus corpos.</text:span></text:p>
        </text:list-item>
        <text:list-item>
          <text:p text:style-name="P320" loext:marker-style-name="T5"><text:span text:style-name="T40">Importante: </text:span><text:span text:style-name="T6">Se essas mensagens não estiverem mais visíveis, isso indica que já foram processadas pela função validacao-pedidos-lambda-seu-nome (Lambda da Aula 1), que publica eventos no EventBridge. Verifique também os logs dessa função no CloudWatch para confirmar o processamento dos pedidos originados do S3.</text:span></text:p>
        </text:list-item>
        <text:list-item>
          <text:p text:style-name="P321" loext:marker-style-name="T5"><text:span text:style-name="T8">Logs da validacao-pedidos-lambda-seu-nome:</text:span><text:span text:style-name="T6"> Verifique os logs no CloudWatch para esta Lambda. Você deve ver:</text:span></text:p>
        </text:list-item>
      </text:list>
      <text:list xml:id="list4250686144" text:style-name="WWNum123">
        <text:list-item>
          <text:p text:style-name="P322" loext:marker-style-name="T5"><text:soft-page-break/><text:span text:style-name="T6">"Evento SQS recebido".</text:span></text:p>
        </text:list-item>
        <text:list-item>
          <text:p text:style-name="P322" loext:marker-style-name="T5"><text:span text:style-name="T6">"Processando pedido do SQS".</text:span></text:p>
        </text:list-item>
        <text:list-item>
          <text:p text:style-name="P322" loext:marker-style-name="T5"><text:span text:style-name="T6">"Pedido X validado com sucesso".</text:span></text:p>
        </text:list-item>
        <text:list-item>
          <text:p text:style-name="P323" loext:marker-style-name="T5"><text:span text:style-name="T6">"Evento publicado no EventBridge".</text:span></text:p>
        </text:list-item>
      </text:list>
      <text:list xml:id="list3663549130" text:style-name="WWNum124">
        <text:list-item>
          <text:p text:style-name="P324" loext:marker-style-name="T5"><text:span text:style-name="T8">SNS/E-mail:</text:span><text:span text:style-name="T6"> Nenhuma notificação de erro de </text:span><text:span text:style-name="T28">arquivo</text:span><text:span text:style-name="T6"> deve ser enviada.</text:span></text:p>
        </text:list-item>
      </text:list>
      <text:p text:style-name="P22" loext:marker-style-name="T9"/>
      <text:h text:style-name="P194" text:outline-level="3" loext:marker-style-name="T11"><text:span text:style-name="T12">Testar com arquivo_schema_invalido.json</text:span></text:h>
      <text:list xml:id="list328101012" text:style-name="WWNum125">
        <text:list-item>
          <text:p text:style-name="P325" loext:marker-style-name="T5"><text:span text:style-name="T6">Faça upload de arquivo_schema_invalido.json para o bucket S3.</text:span></text:p>
        </text:list-item>
      </text:list>
      <text:list xml:id="list2010195694" text:style-name="WWNum126">
        <text:list-item>
          <text:p text:style-name="P326" loext:marker-style-name="T5"><text:span text:style-name="T8">Verificações:</text:span></text:p>
        </text:list-item>
      </text:list>
      <text:list xml:id="list3306111870" text:style-name="WWNum127">
        <text:list-item>
          <text:p text:style-name="P327" loext:marker-style-name="T5"><text:span text:style-name="T8">Logs da validacao-s3-arquivos-lambda-seu-nome:</text:span><text:span text:style-name="T6"> Verifique o erro de schema do arquivo.</text:span></text:p>
        </text:list-item>
      </text:list>
      <text:list xml:id="list2163148684" text:style-name="WWNum128">
        <text:list-item>
          <text:p text:style-name="P328" loext:marker-style-name="T5"><text:span text:style-name="T14">OBS:</text:span><text:span text:style-name="T13"> A partir de agora, você já sabe onde encontrar essas informações. Isso faz parte do seu crescimento como profissional. É importante estar atento e aprender a identificar, com poucas palavras, onde buscar o que precisa. Eu confio no seu potencial, mostre do que é capaz e vamos juntos nessa jornada.</text:span></text:p>
        </text:list-item>
      </text:list>
      <text:list xml:id="list117337262" text:style-name="WWNum129">
        <text:list-item>
          <text:p text:style-name="P329" loext:marker-style-name="T5"><text:span text:style-name="T8">DynamoDB:</text:span><text:span text:style-name="T6"> Item para arquivo_schema_invalido.json com statusValidacao: "ERRO_VALIDACAO_ARQUIVO". </text:span><text:span text:style-name="T8">Caminho:</text:span><text:span text:style-name="T6"> DynamoDB &gt; Explore items &gt; controle-arquivos-historico-seu-nome</text:span></text:p>
        </text:list-item>
      </text:list>
      <text:p text:style-name="P118" loext:marker-style-name="T9"/>
      <text:list xml:id="list2197335895" text:style-name="WWNum130">
        <text:list-item>
          <text:p text:style-name="P330" loext:marker-style-name="T5"><text:span text:style-name="T8">SNS/E-mail:</text:span><text:span text:style-name="T6"> Você deve receber uma notificação de erro de </text:span><text:span text:style-name="T28">arquivo</text:span><text:span text:style-name="T6">.</text:span></text:p>
        </text:list-item>
        <text:list-item>
          <text:p text:style-name="P331" loext:marker-style-name="T5"><text:span text:style-name="T8">pedidos-fifo-queue-seu-nome.fifo:</text:span><text:span text:style-name="T6"> Nenhuma nova mensagem de pedido deve ser enviada para esta fila.</text:span></text:p>
        </text:list-item>
      </text:list>
      <text:p text:style-name="P10" loext:marker-style-name="T9"><draw:custom-shape text:anchor-type="as-char" draw:z-index="17" draw:name="AutoShape 2"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clusão da Aula 2</text:span></text:h>
      <text:p text:style-name="P12" loext:marker-style-name="T9"><text:span text:style-name="T6">Parabéns! Você não apenas implementou um pipeline de ingestão de arquivos, mas também o </text:span><text:span text:style-name="T8">integrou com sucesso ao fluxo principal de processamento de pedidos</text:span><text:span text:style-name="T6">. Isso demonstra um padrão poderoso para lidar com múltiplas fontes de dados. Você aprendeu a:</text:span></text:p>
      <text:list xml:id="list2269919274" text:style-name="WWNum131">
        <text:list-item>
          <text:p text:style-name="P332" loext:marker-style-name="T5"><text:span text:style-name="T6">Configurar S3 para disparar eventos para SQS.</text:span></text:p>
        </text:list-item>
        <text:list-item>
          <text:p text:style-name="P332" loext:marker-style-name="T5"><text:span text:style-name="T6">Desenvolver uma Lambda para processar arquivos, validar seu conteúdo, </text:span><text:span text:style-name="T8">extrair dados relevantes (pedidos), transformá-los e enviá-los para outra fila SQS (FIFO)</text:span><text:span text:style-name="T6">.</text:span></text:p>
        </text:list-item>
        <text:list-item>
          <text:p text:style-name="P332" loext:marker-style-name="T5"><text:span text:style-name="T6">Rastrear o processamento de </text:span><text:span text:style-name="T28">arquivos</text:span><text:span text:style-name="T6"> em DynamoDB e notificar erros de </text:span><text:span text:style-name="T28">arquivo</text:span><text:span text:style-name="T6"> via SNS.</text:span></text:p>
        </text:list-item>
        <text:list-item>
          <text:p text:style-name="P333" loext:marker-style-name="T5"><text:span text:style-name="T6">Gerenciar permissões IAM para interações complexas entre serviços.</text:span></text:p>
        </text:list-item>
      </text:list>
      <text:p text:style-name="P10" loext:marker-style-name="T9"><text:soft-page-break/><text:span text:style-name="T6">Na próxima aula, focaremos no processamento central dos pedidos que agora chegam ao EventBridge (originados tanto da API quanto do S3) e em sua persistência.</text:span></text:p>
      <text:p text:style-name="P10" loext:marker-style-name="T9"><text:span text:style-name="T6">Prepare-se para a Aula 3!</text:span></text:p>
      <text:p text:style-name="P2"/>
      <text:p text:style-name="P1" loext:marker-style-name="T32"><text:span text:style-name="T32">SEMANA DO DESENVOLVEDOR – DIA 3</text:span></text:p>
      <text:h text:style-name="P334" text:outline-level="1" loext:marker-style-name="T46"><text:span text:style-name="T46">Processamento Central de Pedidos e Persistência</text:span></text:h>
      <text:h text:style-name="P335" text:outline-level="1" loext:marker-style-name="T47"/>
      <text:h text:style-name="P335" text:outline-level="1" loext:marker-style-name="T47"/>
      <text:h text:style-name="P9" text:outline-level="2" loext:marker-style-name="T48"><text:span text:style-name="T49">Visão Geral e Objetivos da Aula </text:span></text:h>
      <text:p text:style-name="P10" loext:marker-style-name="T9"><text:span text:style-name="T6">Nas aulas anteriores, estabelecemos dois canais de entrada para pedidos (API e S3) que, após validação, resultam na publicação de um evento NovoPedidoValidado no nosso Custom event bus no Amazon EventBridge. </text:span></text:p>
      <text:p text:style-name="P22" loext:marker-style-name="T9"/>
      <text:p text:style-name="P10" loext:marker-style-name="T9"><text:span text:style-name="T6">Nesta terceira aula, vamos construir a lógica que consome esses eventos. Configuraremos uma regra no EventBridge para capturar os eventos de NovoPedidoValidado. Essa regra direcionará os eventos para uma nova fila SQS Standard, que servirá como um buffer para o processamento principal. Uma nova função Lambda será acionada por esta fila, simulará a lógica de "processamento do pedido" (ex: verificação de inventário, cálculo de frete, etc. - que simplificaremos) e, finalmente, persistirá os detalhes e o status do pedido processado em uma nova tabela principal do Amazon DynamoDB. </text:span></text:p>
      <text:p text:style-name="P22" loext:marker-style-name="T9"/>
      <text:h text:style-name="P9" text:outline-level="3" loext:marker-style-name="T11"><text:span text:style-name="T12">Arquitetura completa</text:span></text:h>
      <text:p text:style-name="P2"><draw:frame draw:style-name="fr1" draw:name="Imagem 1 Copia 2" text:anchor-type="as-char" svg:width="15cm" svg:height="9.364cm" draw:z-index="18"><draw:image xlink:href="Pictures/1000000100000304000001E23B5F5543.png" xlink:type="simple" xlink:show="embed" xlink:actuate="onLoad" draw:mime-type="image/png"/></draw:frame></text:p>
      <text:h text:style-name="P9" text:outline-level="3" loext:marker-style-name="T11"><text:span text:style-name="T12">Arquitetura construida no dia 03</text:span></text:h>
      <text:p text:style-name="P2"><text:soft-page-break/><draw:frame draw:style-name="fr1" draw:name="Figura2 Copia 2" text:anchor-type="as-char" svg:width="15cm" svg:height="9.19cm" draw:z-index="19"><draw:image xlink:href="Pictures/100000010000027600000182EB3B4202.png" xlink:type="simple" xlink:show="embed" xlink:actuate="onLoad" draw:mime-type="image/png"/></draw:frame></text:p>
      <text:p text:style-name="P2"/>
      <text:p text:style-name="P12" loext:marker-style-name="T9"><text:span text:style-name="T14">Ao final desta aula, você terá:</text:span></text:p>
      <text:list xml:id="list105243722577693" text:continue-list="list105243144246537" text:style-name="WWNum1">
        <text:list-item>
          <text:p text:style-name="P189" loext:marker-style-name="T5"><text:span text:style-name="T13">Uma regra no EventBridge para rotear eventos de novos pedidos validados. </text:span></text:p>
        </text:list-item>
        <text:list-item>
          <text:p text:style-name="P189" loext:marker-style-name="T5"><text:span text:style-name="T13">Uma fila SQS Standard para desacoplar o processamento principal dos pedidos. </text:span></text:p>
        </text:list-item>
        <text:list-item>
          <text:p text:style-name="P189" loext:marker-style-name="T5"><text:span text:style-name="T13">Uma função Lambda para executar a lógica de processamento central do pedido. </text:span></text:p>
        </text:list-item>
        <text:list-item>
          <text:p text:style-name="P189" loext:marker-style-name="T5"><text:span text:style-name="T13">Uma tabela DynamoDB principal para armazenar o estado e os detalhes dos pedidos processados. </text:span></text:p>
        </text:list-item>
        <text:list-item>
          <text:p text:style-name="P190" loext:marker-style-name="T5"><text:span text:style-name="T13">A conexão efetiva entre a validação do pedido e sua persistência final. </text:span></text:p>
        </text:list-item>
      </text:list>
      <text:p text:style-name="P22" loext:marker-style-name="T9"/>
      <text:p text:style-name="P12" loext:marker-style-name="T9"><text:span text:style-name="T14">Recursos a Serem Criados Nesta Aula:</text:span></text:p>
      <text:list xml:id="list105244511695227" text:continue-list="list105242364641037" text:style-name="WWNum2">
        <text:list-item>
          <text:p text:style-name="P191" loext:marker-style-name="T5"><text:span text:style-name="T13">IAM Role: lambda-processa-pedidos-role-seu-nome </text:span></text:p>
        </text:list-item>
        <text:list-item>
          <text:p text:style-name="P191" loext:marker-style-name="T5"><text:span text:style-name="T13">Amazon SQS DLQ (Standard): pedidos-pendentes-dlq-seu-nome </text:span></text:p>
        </text:list-item>
        <text:list-item>
          <text:p text:style-name="P191" loext:marker-style-name="T5"><text:span text:style-name="T13">Amazon SQS Queue (Standard): pedidos-pendentes-queue-seu-nome</text:span></text:p>
        </text:list-item>
        <text:list-item>
          <text:p text:style-name="P191" loext:marker-style-name="T5"><text:span text:style-name="T13">AWS Lambda Function: processa-pedidos-lambda-seu-nome</text:span></text:p>
        </text:list-item>
        <text:list-item>
          <text:p text:style-name="P191" loext:marker-style-name="T5"><text:span text:style-name="T13">Amazon DynamoDB Table: pedidos-db-seu-nome (Tabela principal de pedidos) </text:span></text:p>
        </text:list-item>
        <text:list-item>
          <text:p text:style-name="P192" loext:marker-style-name="T5"><text:span text:style-name="T13">Amazon EventBridge Rule: novo-pedido-validado-rule-seu-nome</text:span></text:p>
        </text:list-item>
      </text:list>
      <text:p text:style-name="P10" loext:marker-style-name="T9"><text:span text:style-name="T14">Lembrete Importante</text:span><text:span text:style-name="T13">: Substitua seu-nome em todos os nomes de recursos. Trabalhe consistentemente na mesma região AWS. </text:span></text:p>
      <text:p text:style-name="P22" loext:marker-style-name="T9"/>
      <text:h text:style-name="P5" text:outline-level="3" loext:marker-style-name="T11"><text:span text:style-name="T12">Atenção</text:span></text:h>
      <text:p text:style-name="P193" loext:marker-style-name="T33"><text:soft-page-break/><text:span text:style-name="T34">A interface do Console de Gerenciamento da AWS pode sofrer pequenas alterações visuais ao longo do tempo, mas os conceitos e a localização geral dos serviços  permanecem consistentes. As instruções neste resumo seguem a estrutura geral das funcionalidades.</text:span></text:p>
      <text:p text:style-name="P22" loext:marker-style-name="T9"/>
      <text:h text:style-name="P5" text:outline-level="2" loext:marker-style-name="T3"><text:span text:style-name="T4">Início</text:span></text:h>
      <text:list xml:id="list105243312670358" text:continue-list="list105244330290581" text:style-name="WWNum3">
        <text:list-item>
          <text:p text:style-name="P6" loext:marker-style-name="T5"><text:span text:style-name="T6">Acesse o </text:span><text:a xlink:type="simple" xlink:href="https://console.aws.amazon.com/" office:target-frame-name="_blank" xlink:show="new" text:style-name="ListLabel_20_865" text:visited-style-name="ListLabel_20_865"><text:span text:style-name="T7">console de gerenciamento da AWS</text:span></text:a><text:span text:style-name="T6"> com a conta fornecida pela Escola da Nuvem. Caso apresente a mensagem de erro “</text:span><text:span text:style-name="T8">The credential in your login link were invalid. Please contact your administrator</text:span><text:span text:style-name="T6">.” abaixo, clique no texto em azul onde consta a informação “</text:span><text:span text:style-name="T8">To logout, click here</text:span><text:span text:style-name="T6">”. </text:span></text:p>
        </text:list-item>
        <text:list-item>
          <text:p text:style-name="P7" loext:marker-style-name="T5"><text:span text:style-name="T6">Após efetuar login, irá mostrar o console de gerenciamento da AWS. Sempre confira, no canto superior direito do console, qual a conta está logada, para evitar acessar com a conta incorreta e evitar gastos desnecessários.  </text:span></text:p>
        </text:list-item>
      </text:list>
      <text:p text:style-name="P8" loext:marker-style-name="T9"/>
      <text:h text:style-name="P9" text:outline-level="2" loext:marker-style-name="T3"><text:span text:style-name="T4">Acesso controlado no console AWS</text:span></text:h>
      <text:p text:style-name="P10" loext:marker-style-name="T9"><text:span text:style-name="T6">Os recursos liberados serão limitados para permitir apenas o necessário no laboratório. Mensagens de erro serão comuns de aparecer, caso tente acessar algum recurso não liberado na sua conta ou mesmo ao abrir algum serviço com limitações. Porém sempre siga à risca os passos propostos neste e em outros laboratórios. </text:span></text:p>
      <text:p text:style-name="P10" loext:marker-style-name="T9"><text:span text:style-name="T10">    </text:span></text:p>
      <text:h text:style-name="P9" text:outline-level="2" loext:marker-style-name="T3"><text:span text:style-name="T4">IAM Role Configuração de Permissões (IAM Roles)</text:span></text:h>
      <text:p text:style-name="P10" loext:marker-style-name="T9"><text:span text:style-name="T13">Criaremos uma IAM Role para a Lambda que realizará o processamento central dos pedidos. </text:span></text:p>
      <text:p text:style-name="P22" loext:marker-style-name="T9"/>
      <text:h text:style-name="P194" text:outline-level="3" loext:marker-style-name="T11"><text:span text:style-name="T12">Criar Role para a Lambda de Processamento de Pedidos (lambda-processa-pedidos-role-seu-nome)</text:span></text:h>
      <text:list xml:id="list105243331149373" text:continue-list="list105242978578698" text:style-name="WWNum4">
        <text:list-item>
          <text:p text:style-name="P13" loext:marker-style-name="T5"><text:span text:style-name="T6">Acesse o serviço </text:span><text:span text:style-name="T8">IAM</text:span><text:span text:style-name="T6"> no Console AWS.</text:span></text:p>
        </text:list-item>
      </text:list>
      <text:list xml:id="list105243556057823" text:continue-list="list105244179289028" text:style-name="WWNum5">
        <text:list-item>
          <text:p text:style-name="P195" loext:marker-style-name="T5"><text:span text:style-name="T6">No menu à esquerda, clique em </text:span><text:span text:style-name="T8">"Roles"</text:span><text:span text:style-name="T6"> e depois em </text:span><text:span text:style-name="T8">"Create role"</text:span><text:span text:style-name="T6">.</text:span></text:p>
        </text:list-item>
      </text:list>
      <text:list xml:id="list105243292279112" text:continue-list="list105243824998497" text:style-name="WWNum6">
        <text:list-item>
          <text:p text:style-name="P17" loext:marker-style-name="T5"><text:span text:style-name="T8">Trusted entity type:</text:span><text:span text:style-name="T6"> Selecione </text:span><text:span text:style-name="T8">"AWS service"</text:span><text:span text:style-name="T6">.</text:span></text:p>
        </text:list-item>
      </text:list>
      <text:list xml:id="list105242648418463" text:continue-list="list105242913486159" text:style-name="WWNum7">
        <text:list-item>
          <text:p text:style-name="P196" loext:marker-style-name="T5"><text:span text:style-name="T8">Use case:</text:span><text:span text:style-name="T6"> Selecione </text:span><text:span text:style-name="T8">"Lambda"</text:span><text:span text:style-name="T6"> e clique em </text:span><text:span text:style-name="T8">"Next"</text:span><text:span text:style-name="T6">.</text:span></text:p>
        </text:list-item>
      </text:list>
      <text:list xml:id="list105243671351037" text:continue-list="list105242965681886" text:style-name="WWNum8">
        <text:list-item>
          <text:p text:style-name="P20" loext:marker-style-name="T5"><text:span text:style-name="T6">Na página </text:span><text:span text:style-name="T8">"Add permissions"</text:span><text:span text:style-name="T6">:</text:span></text:p>
        </text:list-item>
      </text:list>
      <text:list xml:id="list105243211986159" text:continue-list="list105243738050371" text:style-name="WWNum9">
        <text:list-item>
          <text:p text:style-name="P21" loext:marker-style-name="T5"><text:span text:style-name="T6">Procure pela política AWSLambdaBasicExecutionRole e marque-a.</text:span></text:p>
        </text:list-item>
        <text:list-item>
          <text:p text:style-name="P197" loext:marker-style-name="T5"><text:span text:style-name="T6">Clique em </text:span><text:span text:style-name="T8">"Next"</text:span><text:span text:style-name="T6">.</text:span></text:p>
        </text:list-item>
      </text:list>
      <text:list xml:id="list105243282927303" text:continue-list="list105242957719350" text:style-name="WWNum10">
        <text:list-item>
          <text:p text:style-name="P24" loext:marker-style-name="T5"><text:span text:style-name="T8">Role details</text:span><text:span text:style-name="T6">:</text:span></text:p>
        </text:list-item>
      </text:list>
      <text:list xml:id="list105242627427223" text:continue-list="list105242778644761" text:style-name="WWNum11">
        <text:list-item>
          <text:p text:style-name="P26" loext:marker-style-name="T5"><text:soft-page-break/><text:span text:style-name="T8">Role name:</text:span><text:span text:style-name="T6"> lambda-processa-pedidos-role-seu-nome</text:span></text:p>
        </text:list-item>
        <text:list-item>
          <text:p text:style-name="P27" loext:marker-style-name="T5"><text:span text:style-name="T8">Description:</text:span><text:span text:style-name="T6"> (Opcional) Ex: "Role para Lambda de processamento central de pedidos".</text:span></text:p>
        </text:list-item>
      </text:list>
      <text:list xml:id="list105244542092755" text:continue-list="list105243073776411" text:style-name="WWNum12">
        <text:list-item>
          <text:p text:style-name="P28" loext:marker-style-name="T5"><text:span text:style-name="T6">Clique em </text:span><text:span text:style-name="T8">"Create role"</text:span><text:span text:style-name="T6">.</text:span></text:p>
        </text:list-item>
      </text:list>
      <text:list xml:id="list105242607773510" text:continue-list="list105243622956533" text:style-name="WWNum13">
        <text:list-item>
          <text:p text:style-name="P30" loext:marker-style-name="T5"><text:span text:style-name="T8">Nota:</text:span><text:span text:style-name="T6"> Após criar a SQS e a DynamoDB, voltaremos para adicionar as permissões específicas.</text:span></text:p>
        </text:list-item>
      </text:list>
      <text:p text:style-name="P10" loext:marker-style-name="T9"><draw:custom-shape text:anchor-type="as-char" draw:z-index="20" draw:name="AutoShape 9"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figuração do Enfileiramento de Pedidos Pendentes (Amazon SQS Standard)</text:span></text:h>
      <text:p text:style-name="P10" loext:marker-style-name="T9"><text:span text:style-name="T6">Esta fila SQS receberá os eventos de NovoPedidoValidado do EventBridge e desacoplará a Lambda de processamento.</text:span></text:p>
      <text:p text:style-name="P22" loext:marker-style-name="T9"/>
      <text:h text:style-name="P194" text:outline-level="3" loext:marker-style-name="T11"><text:span text:style-name="T12">Criar a Fila de Mensagens Mortas (DLQ) (pedidos-pendentes-dlq-seu-nome)</text:span></text:h>
      <text:list xml:id="list105244407208222" text:continue-list="list105244481856648" text:style-name="WWNum14">
        <text:list-item>
          <text:p text:style-name="P32" loext:marker-style-name="T5"><text:span text:style-name="T6">Acesse o serviço </text:span><text:span text:style-name="T8">Amazon SQS</text:span><text:span text:style-name="T6">.</text:span></text:p>
        </text:list-item>
      </text:list>
      <text:list xml:id="list105244651768669" text:continue-list="list105244414603084" text:style-name="WWNum15">
        <text:list-item>
          <text:p text:style-name="P35" loext:marker-style-name="T5"><text:span text:style-name="T6">Clique em </text:span><text:span text:style-name="T8">"Create queue"</text:span><text:span text:style-name="T6">.</text:span></text:p>
        </text:list-item>
      </text:list>
      <text:list xml:id="list105244488345300" text:continue-list="list105242736531321" text:style-name="WWNum16">
        <text:list-item>
          <text:p text:style-name="P198" loext:marker-style-name="T5"><text:span text:style-name="T8">Type:</text:span><text:span text:style-name="T6"> Selecione </text:span><text:span text:style-name="T8">"Standard"</text:span><text:span text:style-name="T6">.</text:span></text:p>
        </text:list-item>
      </text:list>
      <text:list xml:id="list105242961996134" text:continue-list="list105244472800870" text:style-name="WWNum17">
        <text:list-item>
          <text:p text:style-name="P40" loext:marker-style-name="T5"><text:span text:style-name="T8">Name:</text:span><text:span text:style-name="T6"> pedidos-pendentes-dlq-seu-nome.</text:span></text:p>
        </text:list-item>
      </text:list>
      <text:list xml:id="list105244030316599" text:continue-list="list105243732901898" text:style-name="WWNum18">
        <text:list-item>
          <text:p text:style-name="P42" loext:marker-style-name="T5"><text:span text:style-name="T8">Visibility timeout:</text:span><text:span text:style-name="T6"> Mantenha o padrão de 30 segundos (ou ajuste se o timeout da Lambda de processamento for maior, mas para este exemplo, 30s é suficiente para o timeout da Lambda que definiremos).</text:span></text:p>
        </text:list-item>
      </text:list>
      <text:list xml:id="list105242922681987" text:continue-list="list105243482828199" text:style-name="WWNum19">
        <text:list-item>
          <text:p text:style-name="P199" loext:marker-style-name="T5"><text:span text:style-name="T6">Clique em </text:span><text:span text:style-name="T8">"Create queue"</text:span><text:span text:style-name="T6">.</text:span></text:p>
        </text:list-item>
      </text:list>
      <text:list xml:id="list105243051368636" text:continue-list="list105243047903222" text:style-name="WWNum20">
        <text:list-item>
          <text:p text:style-name="P200" loext:marker-style-name="T5"><text:span text:style-name="T8">Anote o ARN</text:span><text:span text:style-name="T6"> desta DLQ.</text:span></text:p>
        </text:list-item>
      </text:list>
      <text:p text:style-name="P22" loext:marker-style-name="T9"/>
      <text:h text:style-name="P194" text:outline-level="3" loext:marker-style-name="T11"><text:span text:style-name="T12">Criar a Fila Principal de Pedidos Pendentes (pedidos-pendentes-queue-seu-nome)</text:span></text:h>
      <text:list xml:id="list105243728574180" text:continue-list="list105243097089877" text:style-name="WWNum21">
        <text:list-item>
          <text:p text:style-name="P201" loext:marker-style-name="T5"><text:span text:style-name="T6">Ainda no </text:span><text:span text:style-name="T8">SQS &gt; Queues</text:span><text:span text:style-name="T6">, clique em </text:span><text:span text:style-name="T8">"Create queue"</text:span><text:span text:style-name="T6">.</text:span></text:p>
        </text:list-item>
      </text:list>
      <text:list xml:id="list105244158676483" text:continue-list="list105242768920834" text:style-name="WWNum22">
        <text:list-item>
          <text:p text:style-name="P202" loext:marker-style-name="T5"><text:span text:style-name="T8">Type:</text:span><text:span text:style-name="T6"> Selecione </text:span><text:span text:style-name="T8">"Standard"</text:span><text:span text:style-name="T6">.</text:span></text:p>
        </text:list-item>
      </text:list>
      <text:list xml:id="list105243650974918" text:continue-list="list105243058384211" text:style-name="WWNum23">
        <text:list-item>
          <text:p text:style-name="P203" loext:marker-style-name="T5"><text:span text:style-name="T8">Name:</text:span><text:span text:style-name="T6"> pedidos-pendentes-queue-seu-nome.</text:span></text:p>
        </text:list-item>
      </text:list>
      <text:list xml:id="list105244364118243" text:continue-list="list105243894740804" text:style-name="WWNum24">
        <text:list-item>
          <text:p text:style-name="P204" loext:marker-style-name="T5"><text:span text:style-name="T8">Visibility timeout:</text:span><text:span text:style-name="T6"> Altere para 70 </text:span><text:span text:style-name="T8">Seconds</text:span><text:span text:style-name="T6">. (Assumindo que o timeout da Lambda processa-pedidos-lambda-seu-nome será configurado para 60 segundos, como fizemos na Aula 2).</text:span></text:p>
        </text:list-item>
      </text:list>
      <text:list xml:id="list105243159082632" text:continue-list="list105243611075804" text:style-name="WWNum25">
        <text:list-item>
          <text:p text:style-name="P336" loext:marker-style-name="T5"><text:span text:style-name="T6">Na seção </text:span><text:span text:style-name="T8">"Dead-letter queue (DLQ)"</text:span><text:span text:style-name="T6">:</text:span></text:p>
        </text:list-item>
      </text:list>
      <text:list xml:id="list105244463135002" text:continue-list="list105243745799960" text:style-name="WWNum26">
        <text:list-item>
          <text:p text:style-name="P337" loext:marker-style-name="T5"><text:span text:style-name="T6">Marque </text:span><text:span text:style-name="T8">"Enabled"</text:span><text:span text:style-name="T6">.</text:span></text:p>
        </text:list-item>
        <text:list-item>
          <text:p text:style-name="P338" loext:marker-style-name="T5"><text:span text:style-name="T6">Em </text:span><text:span text:style-name="T8">Choose queue, </text:span><text:span text:style-name="T6">selecione o ARN da fila que você criou no passo anterior</text:span><text:span text:style-name="T8">: pedidos-pendentes-dlq-seu-nome</text:span><text:span text:style-name="T6">.</text:span></text:p>
        </text:list-item>
        <text:list-item>
          <text:p text:style-name="P339" loext:marker-style-name="T5"><text:span text:style-name="T8">Maximum receives:</text:span><text:span text:style-name="T6"> Defina como 3.</text:span></text:p>
        </text:list-item>
      </text:list>
      <text:list xml:id="list105244030902539" text:continue-list="list105244138739114" text:style-name="WWNum27">
        <text:list-item>
          <text:p text:style-name="P340" loext:marker-style-name="T5"><text:span text:style-name="T6">Clique em </text:span><text:span text:style-name="T8">"Create queue"</text:span><text:span text:style-name="T6">.</text:span></text:p>
        </text:list-item>
      </text:list>
      <text:list xml:id="list105243370600576" text:continue-list="list105243712851557" text:style-name="WWNum28">
        <text:list-item>
          <text:p text:style-name="P210" loext:marker-style-name="T5"><text:span text:style-name="T8">Anote o ARN e a URL</text:span><text:span text:style-name="T6"> desta fila principal.</text:span></text:p>
        </text:list-item>
      </text:list>
      <text:p text:style-name="P10" loext:marker-style-name="T9"><draw:custom-shape text:anchor-type="as-char" draw:z-index="21" draw:name="AutoShape 15"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oft-page-break/><text:span text:style-name="T26">Configuração do Banco de Dados Principal de Pedidos (Amazon DynamoDB)</text:span></text:h>
      <text:p text:style-name="P10" loext:marker-style-name="T9"><text:span text:style-name="T6">Esta tabela DynamoDB armazenará as informações finais dos pedidos processados.</text:span></text:p>
      <text:p text:style-name="P22" loext:marker-style-name="T9"/>
      <text:h text:style-name="P194" text:outline-level="3" loext:marker-style-name="T11"><text:span text:style-name="T24">Criar a Tabela DynamoDB Principal (pedidos-db-seu-nome)</text:span></text:h>
      <text:list xml:id="list105243805659904" text:continue-list="list105243086221473" text:style-name="WWNum29">
        <text:list-item>
          <text:p text:style-name="P211" loext:marker-style-name="T5"><text:span text:style-name="T6">Acesse o serviço </text:span><text:span text:style-name="T8">Amazon DynamoDB &gt; Tables</text:span><text:span text:style-name="T6">.</text:span></text:p>
        </text:list-item>
      </text:list>
      <text:list xml:id="list105243917506775" text:continue-list="list105242587631798" text:style-name="WWNum30">
        <text:list-item>
          <text:p text:style-name="P80" loext:marker-style-name="T5"><text:span text:style-name="T6">Clique em </text:span><text:span text:style-name="T8">"Create table"</text:span><text:span text:style-name="T6">.</text:span></text:p>
        </text:list-item>
      </text:list>
      <text:list xml:id="list105243318082008" text:continue-list="list105243068442456" text:style-name="WWNum31">
        <text:list-item>
          <text:p text:style-name="P212" loext:marker-style-name="T5"><text:span text:style-name="T8">Table details:</text:span></text:p>
        </text:list-item>
      </text:list>
      <text:list xml:id="list105244602761465" text:continue-list="list105243793765292" text:style-name="WWNum32">
        <text:list-item>
          <text:p text:style-name="P341" loext:marker-style-name="T5"><text:span text:style-name="T8">Table name:</text:span><text:span text:style-name="T6"> pedidos-db-seu-nome</text:span></text:p>
        </text:list-item>
        <text:list-item>
          <text:p text:style-name="P84" loext:marker-style-name="T5"><text:span text:style-name="T8">Partition key:</text:span><text:span text:style-name="T6"> pedidoId.</text:span></text:p>
        </text:list-item>
        <text:list-item>
          <text:p text:style-name="P342" loext:marker-style-name="T5"><text:span text:style-name="T8">Partition key type:</text:span><text:span text:style-name="T6"> "String".</text:span></text:p>
        </text:list-item>
      </text:list>
      <text:list xml:id="list105242822016372" text:continue-list="list105242582012830" text:style-name="WWNum33">
        <text:list-item>
          <text:p text:style-name="P87" loext:marker-style-name="T5"><text:span text:style-name="T6">Mantenha as demais configurações padrão (</text:span><text:span text:style-name="T8">Table settings &gt; Default settings</text:span><text:span text:style-name="T6">).</text:span></text:p>
        </text:list-item>
      </text:list>
      <text:list xml:id="list105243854062090" text:continue-list="list105244442405281" text:style-name="WWNum34">
        <text:list-item>
          <text:p text:style-name="P88" loext:marker-style-name="T5"><text:span text:style-name="T6">Clique em </text:span><text:span text:style-name="T8">"Create table"</text:span><text:span text:style-name="T6">. A criação pode levar alguns instantes.</text:span></text:p>
        </text:list-item>
      </text:list>
      <text:list xml:id="list105243124205619" text:continue-list="list105244076133759" text:style-name="WWNum35">
        <text:list-item>
          <text:p text:style-name="P214" loext:marker-style-name="T5"><text:span text:style-name="T6">Selecione a tabela recém-criada e</text:span><text:span text:style-name="T8"> anote o ARN</text:span><text:span text:style-name="T6"> desta tabela DynamoDB.</text:span></text:p>
        </text:list-item>
      </text:list>
      <text:p text:style-name="P10" loext:marker-style-name="T9"><draw:custom-shape text:anchor-type="as-char" draw:z-index="22" draw:name="AutoShape 16"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26">Atualizar Permissões da Role da Lambda de Processamento de Pedidos</text:span></text:h>
      <text:p text:style-name="P12" loext:marker-style-name="T9"><text:span text:style-name="T6">Agora que a SQS e a DynamoDB estão criadas, vamos conceder à lambda-processa-pedidos-role-seu-nome as permissões necessárias.</text:span></text:p>
      <text:list xml:id="list105244101157913" text:continue-list="list105243067673723" text:style-name="WWNum36">
        <text:list-item>
          <text:p text:style-name="P93" loext:marker-style-name="T5"><text:span text:style-name="T6">Volte ao serviço </text:span><text:span text:style-name="T8">IAM</text:span><text:span text:style-name="T6">.</text:span></text:p>
        </text:list-item>
      </text:list>
      <text:list xml:id="list105243348626866" text:continue-list="list105243370052903" text:style-name="WWNum37">
        <text:list-item>
          <text:p text:style-name="P94" loext:marker-style-name="T5"><text:span text:style-name="T6">Clique em </text:span><text:span text:style-name="T8">"Roles"</text:span><text:span text:style-name="T6"> e encontre a role lambda-processa-pedidos-role-seu-nome. Clique nela.</text:span></text:p>
        </text:list-item>
      </text:list>
      <text:list xml:id="list105243300051568" text:continue-list="list105244040800944" text:style-name="WWNum38">
        <text:list-item>
          <text:p text:style-name="P95" loext:marker-style-name="T5"><text:span text:style-name="T6">Na aba </text:span><text:span text:style-name="T8">"Permissions"</text:span><text:span text:style-name="T6">, clique em </text:span><text:span text:style-name="T8">"Add permissions"</text:span><text:span text:style-name="T6"> e selecione </text:span><text:span text:style-name="T8">"Create inline policy"</text:span><text:span text:style-name="T6">.</text:span></text:p>
        </text:list-item>
      </text:list>
      <text:list xml:id="list105244179393947" text:continue-list="list105244144352333" text:style-name="WWNum39">
        <text:list-item>
          <text:p text:style-name="P215" loext:marker-style-name="T5"><text:span text:style-name="T6">Selecione a aba </text:span><text:span text:style-name="T8">JSON</text:span><text:span text:style-name="T6">.</text:span></text:p>
        </text:list-item>
      </text:list>
      <text:list xml:id="list105243613543052" text:continue-list="list105242737686483" text:style-name="WWNum40">
        <text:list-item>
          <text:p text:style-name="P101" loext:marker-style-name="T5"><text:span text:style-name="T6">Remova a política existente e cole a política abaixo, modificando as seguintes informações:</text:span></text:p>
        </text:list-item>
      </text:list>
      <text:p text:style-name="P44" loext:marker-style-name="T9"/>
      <text:p text:style-name="P343" loext:marker-style-name="T9"><text:span text:style-name="T16">{</text:span></text:p>
      <text:p text:style-name="P344" loext:marker-style-name="T9"><text:span text:style-name="T16"> </text:span><text:span text:style-name="T17">"Version"</text:span><text:span text:style-name="T16">: </text:span><text:span text:style-name="T17">"2012-10-17"</text:span><text:span text:style-name="T16">,</text:span></text:p>
      <text:p text:style-name="P344" loext:marker-style-name="T9"><text:span text:style-name="T16"> </text:span><text:span text:style-name="T17">"Statement"</text:span><text:span text:style-name="T16">: [</text:span></text:p>
      <text:p text:style-name="P344" loext:marker-style-name="T9"><text:span text:style-name="T16">   {</text:span></text:p>
      <text:p text:style-name="P344" loext:marker-style-name="T9"><text:span text:style-name="T16">     </text:span><text:span text:style-name="T17">"Effect"</text:span><text:span text:style-name="T16">: </text:span><text:span text:style-name="T17">"Allow"</text:span><text:span text:style-name="T16">,</text:span></text:p>
      <text:p text:style-name="P344" loext:marker-style-name="T9"><text:span text:style-name="T16">     </text:span><text:span text:style-name="T17">"Action"</text:span><text:span text:style-name="T16">: [</text:span></text:p>
      <text:p text:style-name="P344" loext:marker-style-name="T9"><text:span text:style-name="T16">       </text:span><text:span text:style-name="T17">"sqs:ReceiveMessage"</text:span><text:span text:style-name="T16">,</text:span></text:p>
      <text:p text:style-name="P344" loext:marker-style-name="T9"><text:span text:style-name="T16">       </text:span><text:span text:style-name="T17">"sqs:DeleteMessage"</text:span><text:span text:style-name="T16">,</text:span></text:p>
      <text:p text:style-name="P344" loext:marker-style-name="T9"><text:span text:style-name="T16">       </text:span><text:span text:style-name="T17">"sqs:GetQueueAttributes"</text:span></text:p>
      <text:p text:style-name="P344" loext:marker-style-name="T9"><text:span text:style-name="T16">     ],</text:span></text:p>
      <text:p text:style-name="P344" loext:marker-style-name="T9"><text:soft-page-break/><text:span text:style-name="T16">     </text:span><text:span text:style-name="T17">"Resource"</text:span><text:span text:style-name="T16">: </text:span><text:span text:style-name="T17">"COLE AQUI O ARN DA SUA FILA pedidos-pendentes-queue-seu-nome"</text:span></text:p>
      <text:p text:style-name="P344" loext:marker-style-name="T9"><text:span text:style-name="T16">   },</text:span></text:p>
      <text:p text:style-name="P344" loext:marker-style-name="T9"><text:span text:style-name="T16">   {</text:span></text:p>
      <text:p text:style-name="P344" loext:marker-style-name="T9"><text:span text:style-name="T16">     </text:span><text:span text:style-name="T17">"Effect"</text:span><text:span text:style-name="T16">: </text:span><text:span text:style-name="T17">"Allow"</text:span><text:span text:style-name="T16">,</text:span></text:p>
      <text:p text:style-name="P344" loext:marker-style-name="T9"><text:span text:style-name="T16">     </text:span><text:span text:style-name="T17">"Action"</text:span><text:span text:style-name="T16">: [</text:span></text:p>
      <text:p text:style-name="P344" loext:marker-style-name="T9"><text:span text:style-name="T16">       </text:span><text:span text:style-name="T17">"dynamodb:PutItem"</text:span><text:span text:style-name="T16">,</text:span></text:p>
      <text:p text:style-name="P344" loext:marker-style-name="T9"><text:span text:style-name="T16">       </text:span><text:span text:style-name="T17">"dynamodb:UpdateItem"</text:span><text:span text:style-name="T16">,</text:span></text:p>
      <text:p text:style-name="P344" loext:marker-style-name="T9"><text:span text:style-name="T16">       </text:span><text:span text:style-name="T17">"dynamodb:GetItem"</text:span></text:p>
      <text:p text:style-name="P344" loext:marker-style-name="T9"><text:span text:style-name="T16">     ],</text:span></text:p>
      <text:p text:style-name="P344" loext:marker-style-name="T9"><text:span text:style-name="T16">     </text:span><text:span text:style-name="T17">"Resource"</text:span><text:span text:style-name="T16">: </text:span><text:span text:style-name="T17">"COLE AQUI O ARN DA SUA TABELA pedidos-db-seu-nome"</text:span></text:p>
      <text:p text:style-name="P344" loext:marker-style-name="T9"><text:span text:style-name="T16">   }</text:span></text:p>
      <text:p text:style-name="P344" loext:marker-style-name="T9"><text:span text:style-name="T16"> ]</text:span></text:p>
      <text:p text:style-name="P345" loext:marker-style-name="T9"><text:span text:style-name="T16">}</text:span></text:p>
      <text:p text:style-name="P143" loext:marker-style-name="T9"/>
      <text:list xml:id="list105244181411851" text:continue-list="list105244299007720" text:style-name="WWNum41">
        <text:list-item>
          <text:p text:style-name="P107" loext:marker-style-name="T5"><text:span text:style-name="T6">Clique em </text:span><text:span text:style-name="T8">"Next"</text:span><text:span text:style-name="T6">.</text:span></text:p>
        </text:list-item>
      </text:list>
      <text:list xml:id="list105243320827252" text:continue-list="list105243286599520" text:style-name="WWNum42">
        <text:list-item>
          <text:p text:style-name="P216" loext:marker-style-name="T5"><text:span text:style-name="T6">Em </text:span><text:span text:style-name="T8">"Review and create"</text:span><text:span text:style-name="T6">:</text:span></text:p>
        </text:list-item>
      </text:list>
      <text:list xml:id="list105243033533847" text:continue-list="list105242483060866" text:style-name="WWNum43">
        <text:list-item>
          <text:p text:style-name="P346" loext:marker-style-name="T5"><text:span text:style-name="T8">Policy name:</text:span><text:span text:style-name="T6"> SQSReadDynamoWritePedidosDB-seu-nome.</text:span></text:p>
        </text:list-item>
        <text:list-item>
          <text:p text:style-name="P347" loext:marker-style-name="T5"><text:span text:style-name="T6">Clique em </text:span><text:span text:style-name="T8">"Create policy"</text:span><text:span text:style-name="T6">.</text:span></text:p>
        </text:list-item>
      </text:list>
      <text:p text:style-name="P10" loext:marker-style-name="T9"><draw:custom-shape text:anchor-type="as-char" draw:z-index="23" draw:name="AutoShape 18"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Implementação da Lógica de Processamento de Pedidos (AWS Lambda)</text:span></text:h>
      <text:p text:style-name="P10" loext:marker-style-name="T9"><text:span text:style-name="T6">Esta função Lambda será acionada por mensagens da fila pedidos-pendentes-queue-seu-nome e persistirá os dados no DynamoDB.</text:span></text:p>
      <text:p text:style-name="P22" loext:marker-style-name="T9"/>
      <text:h text:style-name="P194" text:outline-level="3" loext:marker-style-name="T11"><text:span text:style-name="T12">Criar a Função Lambda (processa-pedidos-lambda-seu-nome)</text:span></text:h>
      <text:list xml:id="list105243354436732" text:continue-list="list105244389721613" text:style-name="WWNum44">
        <text:list-item>
          <text:p text:style-name="P218" loext:marker-style-name="T5"><text:span text:style-name="T6">Acesse o serviço </text:span><text:span text:style-name="T8">AWS Lambda</text:span><text:span text:style-name="T6">.</text:span></text:p>
        </text:list-item>
      </text:list>
      <text:list xml:id="list105243431518766" text:continue-list="list105244003753176" text:style-name="WWNum45">
        <text:list-item>
          <text:p text:style-name="P111" loext:marker-style-name="T5"><text:span text:style-name="T6">Clique em </text:span><text:span text:style-name="T8">"Create function"</text:span><text:span text:style-name="T6"> &gt; </text:span><text:span text:style-name="T8">"Author from scratch"</text:span><text:span text:style-name="T6">.</text:span></text:p>
        </text:list-item>
      </text:list>
      <text:list xml:id="list105244200579469" text:continue-list="list105243183168713" text:style-name="WWNum46">
        <text:list-item>
          <text:p text:style-name="P112" loext:marker-style-name="T5"><text:span text:style-name="T8">Function name:</text:span><text:span text:style-name="T6"> processa-pedidos-lambda-seu-nome.</text:span></text:p>
        </text:list-item>
      </text:list>
      <text:list xml:id="list105244497564986" text:continue-list="list105242921678356" text:style-name="WWNum47">
        <text:list-item>
          <text:p text:style-name="P113" loext:marker-style-name="T5"><text:span text:style-name="T8">Runtime:</text:span><text:span text:style-name="T6"> Python 3.12.</text:span></text:p>
        </text:list-item>
      </text:list>
      <text:list xml:id="list105242715651806" text:continue-list="list105242620648513" text:style-name="WWNum48">
        <text:list-item>
          <text:p text:style-name="P219" loext:marker-style-name="T5"><text:span text:style-name="T6">Use a role </text:span><text:span text:style-name="T8">lambda-processa-pedidos-role-seu-nome</text:span><text:span text:style-name="T6">.</text:span></text:p>
        </text:list-item>
      </text:list>
      <text:list xml:id="list105242649642742" text:continue-list="list105244094384352" text:style-name="WWNum49">
        <text:list-item>
          <text:p text:style-name="P119" loext:marker-style-name="T5"><text:span text:style-name="T6">Clique em </text:span><text:span text:style-name="T8">"Create function"</text:span><text:span text:style-name="T6">.</text:span></text:p>
        </text:list-item>
      </text:list>
      <text:p text:style-name="P22" loext:marker-style-name="T9"/>
      <text:h text:style-name="P194" text:outline-level="3" loext:marker-style-name="T11"><text:span text:style-name="T12">Configurar o Código, Variáveis de Ambiente e Trigger SQS</text:span></text:h>
      <text:list xml:id="list105244365028156" text:continue-list="list105243923877164" text:style-name="WWNum50">
        <text:list-item>
          <text:p text:style-name="P220" loext:marker-style-name="T5"><text:span text:style-name="T6">Na página da função, rola para baixo, até a aba </text:span><text:span text:style-name="T8">"Code"</text:span><text:span text:style-name="T6">, substitua lambda_function.py pelo código Python que você encontra abaixo.</text:span></text:p>
        </text:list-item>
      </text:list>
      <text:p text:style-name="P155" loext:marker-style-name="T9"/>
      <text:p text:style-name="P46" loext:marker-style-name="T9"><text:span text:style-name="T35">import</text:span><text:span text:style-name="T36"> json</text:span></text:p>
      <text:p text:style-name="P47" loext:marker-style-name="T9"><text:span text:style-name="T35">import</text:span><text:span text:style-name="T36"> os</text:span></text:p>
      <text:p text:style-name="P47" loext:marker-style-name="T9"><text:span text:style-name="T35">import</text:span><text:span text:style-name="T36"> boto3</text:span></text:p>
      <text:p text:style-name="P47" loext:marker-style-name="T9"><text:span text:style-name="T35">from</text:span><text:span text:style-name="T36"> datetime </text:span><text:span text:style-name="T35">import</text:span><text:span text:style-name="T36"> datetime</text:span></text:p>
      <text:p text:style-name="P156" loext:marker-style-name="T9"/>
      <text:p text:style-name="P47" loext:marker-style-name="T9"><text:span text:style-name="T36">DYNAMODB_TABLE_NAME = os.environ[</text:span><text:span text:style-name="T38">'DYNAMODB_TABLE_NAME'</text:span><text:span text:style-name="T36">]</text:span></text:p>
      <text:p text:style-name="P47" loext:marker-style-name="T9"><text:soft-page-break/><text:span text:style-name="T36">dynamodb = boto3.resource(</text:span><text:span text:style-name="T38">'dynamodb'</text:span><text:span text:style-name="T36">)</text:span></text:p>
      <text:p text:style-name="P47" loext:marker-style-name="T9"><text:span text:style-name="T36">table = dynamodb.Table(DYNAMODB_TABLE_NAME)</text:span></text:p>
      <text:p text:style-name="P156" loext:marker-style-name="T9"/>
      <text:p text:style-name="P47" loext:marker-style-name="T9"><text:span text:style-name="T35">def</text:span><text:span text:style-name="T36"> lambda_handler(</text:span><text:span text:style-name="T35">event</text:span><text:span text:style-name="T36">, context):</text:span></text:p>
      <text:p text:style-name="P47" loext:marker-style-name="T9"><text:span text:style-name="T36">   </text:span><text:span text:style-name="T35">print</text:span><text:span text:style-name="T36">(f</text:span><text:span text:style-name="T38">"Evento SQS </text:span><text:span text:style-name="T36">(</text:span><text:span text:style-name="T38">pedidos pendentes</text:span><text:span text:style-name="T36">)</text:span><text:span text:style-name="T38"> recebido</text:span><text:span text:style-name="T36">:</text:span><text:span text:style-name="T38"> </text:span><text:span text:style-name="T36">{</text:span><text:span text:style-name="T38">event</text:span><text:span text:style-name="T36">}</text:span><text:span text:style-name="T38">"</text:span><text:span text:style-name="T36">)</text:span></text:p>
      <text:p text:style-name="P47" loext:marker-style-name="T9"><text:span text:style-name="T36">   </text:span><text:span text:style-name="T35">for</text:span><text:span text:style-name="T36"> record </text:span><text:span text:style-name="T35">in</text:span><text:span text:style-name="T36"> event[</text:span><text:span text:style-name="T38">'Records'</text:span><text:span text:style-name="T36">]:</text:span></text:p>
      <text:p text:style-name="P47" loext:marker-style-name="T9"><text:span text:style-name="T36">       </text:span><text:span text:style-name="T35">try</text:span><text:span text:style-name="T36">:</text:span></text:p>
      <text:p text:style-name="P47" loext:marker-style-name="T9"><text:span text:style-name="T36">           </text:span><text:span text:style-name="T37"># Parsear a estrutura completa do evento EventBridge</text:span></text:p>
      <text:p text:style-name="P47" loext:marker-style-name="T9"><text:span text:style-name="T36">           eventbridge_event = json.loads(record[</text:span><text:span text:style-name="T38">'body'</text:span><text:span text:style-name="T36">])</text:span></text:p>
      <text:p text:style-name="P47" loext:marker-style-name="T9"><text:span text:style-name="T36">           </text:span><text:span text:style-name="T35">print</text:span><text:span text:style-name="T36">(f</text:span><text:span text:style-name="T38">"Evento EventBridge recebido via SQS</text:span><text:span text:style-name="T36">:</text:span><text:span text:style-name="T38"> </text:span><text:span text:style-name="T36">{</text:span><text:span text:style-name="T38">eventbridge_event</text:span><text:span text:style-name="T36">}</text:span><text:span text:style-name="T38">"</text:span><text:span text:style-name="T36">)</text:span></text:p>
      <text:p text:style-name="P156" loext:marker-style-name="T9"/>
      <text:p text:style-name="P47" loext:marker-style-name="T9"><text:span text:style-name="T36">           </text:span><text:span text:style-name="T37"># Extrair o payload real do pedido do campo 'detail'</text:span></text:p>
      <text:p text:style-name="P47" loext:marker-style-name="T9"><text:span text:style-name="T36">           </text:span><text:span text:style-name="T35">if</text:span><text:span text:style-name="T36"> </text:span><text:span text:style-name="T38">'detail'</text:span><text:span text:style-name="T36"> </text:span><text:span text:style-name="T35">not</text:span><text:span text:style-name="T36"> </text:span><text:span text:style-name="T35">in</text:span><text:span text:style-name="T36"> eventbridge_event:</text:span></text:p>
      <text:p text:style-name="P47" loext:marker-style-name="T9"><text:span text:style-name="T36">               </text:span><text:span text:style-name="T35">print</text:span><text:span text:style-name="T36">(f</text:span><text:span text:style-name="T38">"Erro</text:span><text:span text:style-name="T36">:</text:span><text:span text:style-name="T38"> Campo 'detail' não encontrado no evento</text:span><text:span text:style-name="T36">:</text:span><text:span text:style-name="T38"> </text:span><text:span text:style-name="T36">{</text:span><text:span text:style-name="T38">eventbridge_event</text:span><text:span text:style-name="T36">}</text:span><text:span text:style-name="T38">"</text:span><text:span text:style-name="T36">)</text:span></text:p>
      <text:p text:style-name="P47" loext:marker-style-name="T9"><text:span text:style-name="T36">               </text:span><text:span text:style-name="T35">continue</text:span><text:span text:style-name="T36">  </text:span><text:span text:style-name="T37"># Pular este registro</text:span></text:p>
      <text:p text:style-name="P156" loext:marker-style-name="T9"/>
      <text:p text:style-name="P47" loext:marker-style-name="T9"><text:span text:style-name="T36">           pedido_data = eventbridge_event[</text:span><text:span text:style-name="T38">'detail'</text:span><text:span text:style-name="T36">]</text:span></text:p>
      <text:p text:style-name="P47" loext:marker-style-name="T9"><text:span text:style-name="T36">           </text:span><text:span text:style-name="T35">print</text:span><text:span text:style-name="T36">(f</text:span><text:span text:style-name="T38">"Processando detalhes do pedido</text:span><text:span text:style-name="T36">:</text:span><text:span text:style-name="T38"> </text:span><text:span text:style-name="T36">{</text:span><text:span text:style-name="T38">pedido_data</text:span><text:span text:style-name="T36">}</text:span><text:span text:style-name="T38">"</text:span><text:span text:style-name="T36">)</text:span></text:p>
      <text:p text:style-name="P156" loext:marker-style-name="T9"/>
      <text:p text:style-name="P47" loext:marker-style-name="T9"><text:span text:style-name="T36">           pedido_id = pedido_data.</text:span><text:span text:style-name="T35">get</text:span><text:span text:style-name="T36">(</text:span><text:span text:style-name="T38">'pedidoId'</text:span><text:span text:style-name="T36">)</text:span></text:p>
      <text:p text:style-name="P47" loext:marker-style-name="T9"><text:span text:style-name="T36">           </text:span><text:span text:style-name="T35">if</text:span><text:span text:style-name="T36"> </text:span><text:span text:style-name="T35">not</text:span><text:span text:style-name="T36"> pedido_id:</text:span></text:p>
      <text:p text:style-name="P47" loext:marker-style-name="T9"><text:span text:style-name="T36">               </text:span><text:span text:style-name="T35">print</text:span><text:span text:style-name="T36">(f</text:span><text:span text:style-name="T38">"Erro</text:span><text:span text:style-name="T36">:</text:span><text:span text:style-name="T38"> pedidoId não encontrado nos detalhes </text:span><text:span text:style-name="T36">(</text:span><text:span text:style-name="T38">'detail'</text:span><text:span text:style-name="T36">)</text:span><text:span text:style-name="T38"> do evento</text:span><text:span text:style-name="T36">:</text:span><text:span text:style-name="T38"> </text:span><text:span text:style-name="T36">{</text:span><text:span text:style-name="T38">pedido_data</text:span><text:span text:style-name="T36">}</text:span><text:span text:style-name="T38">"</text:span><text:span text:style-name="T36">)</text:span></text:p>
      <text:p text:style-name="P47" loext:marker-style-name="T9"><text:span text:style-name="T36">               </text:span><text:span text:style-name="T35">continue</text:span></text:p>
      <text:p text:style-name="P156" loext:marker-style-name="T9"/>
      <text:p text:style-name="P47" loext:marker-style-name="T9"><text:span text:style-name="T36">           </text:span><text:span text:style-name="T37"># Simular lógica de processamento</text:span></text:p>
      <text:p text:style-name="P47" loext:marker-style-name="T9"><text:span text:style-name="T36">           status_processamento = </text:span><text:span text:style-name="T38">"PEDIDO_PROCESSADO"</text:span></text:p>
      <text:p text:style-name="P47" loext:marker-style-name="T9"><text:span text:style-name="T36">           </text:span><text:span text:style-name="T35">print</text:span><text:span text:style-name="T36">(f</text:span><text:span text:style-name="T38">"Lógica de processamento para pedido </text:span><text:span text:style-name="T36">{</text:span><text:span text:style-name="T38">pedido_id</text:span><text:span text:style-name="T36">}</text:span><text:span text:style-name="T38"> concluída </text:span><text:span text:style-name="T36">(</text:span><text:span text:style-name="T38">simulada</text:span><text:span text:style-name="T36">).</text:span><text:span text:style-name="T38">"</text:span><text:span text:style-name="T36">)</text:span></text:p>
      <text:p text:style-name="P156" loext:marker-style-name="T9"/>
      <text:p text:style-name="P47" loext:marker-style-name="T9"><text:span text:style-name="T36">           </text:span><text:span text:style-name="T37"># Salvar/Atualizar no DynamoDB</text:span></text:p>
      <text:p text:style-name="P47" loext:marker-style-name="T9"><text:span text:style-name="T36">           item_to_put = {</text:span></text:p>
      <text:p text:style-name="P47" loext:marker-style-name="T9"><text:span text:style-name="T36">               </text:span><text:span text:style-name="T38">'pedidoId'</text:span><text:span text:style-name="T36">: str(pedido_id),</text:span></text:p>
      <text:p text:style-name="P47" loext:marker-style-name="T9"><text:span text:style-name="T36">               </text:span><text:span text:style-name="T38">'clienteId'</text:span><text:span text:style-name="T36">: str(pedido_data.</text:span><text:span text:style-name="T35">get</text:span><text:span text:style-name="T36">(</text:span><text:span text:style-name="T38">'clienteId'</text:span><text:span text:style-name="T36">)),</text:span></text:p>
      <text:p text:style-name="P47" loext:marker-style-name="T9"><text:span text:style-name="T36">               </text:span><text:span text:style-name="T38">'itens'</text:span><text:span text:style-name="T36">: pedido_data.</text:span><text:span text:style-name="T35">get</text:span><text:span text:style-name="T36">(</text:span><text:span text:style-name="T38">'itens'</text:span><text:span text:style-name="T36">, []),</text:span></text:p>
      <text:p text:style-name="P47" loext:marker-style-name="T9"><text:span text:style-name="T36">               </text:span><text:span text:style-name="T38">'statusPedido'</text:span><text:span text:style-name="T36">: status_processamento,</text:span></text:p>
      <text:p text:style-name="P47" loext:marker-style-name="T9"><text:span text:style-name="T36">               </text:span><text:span text:style-name="T38">'origem'</text:span><text:span text:style-name="T36">: pedido_data.</text:span><text:span text:style-name="T35">get</text:span><text:span text:style-name="T36">(</text:span><text:span text:style-name="T38">'origem'</text:span><text:span text:style-name="T36">, </text:span><text:span text:style-name="T38">'API'</text:span><text:span text:style-name="T36">),</text:span></text:p>
      <text:p text:style-name="P47" loext:marker-style-name="T9"><text:span text:style-name="T36">               </text:span><text:span text:style-name="T38">'nomeArquivoOriginal'</text:span><text:span text:style-name="T36">: pedido_data.</text:span><text:span text:style-name="T35">get</text:span><text:span text:style-name="T36">(</text:span><text:span text:style-name="T38">'nomeArquivoOriginal'</text:span><text:span text:style-name="T36">),</text:span></text:p>
      <text:p text:style-name="P47" loext:marker-style-name="T9"><text:span text:style-name="T36">               </text:span><text:span text:style-name="T38">'timestampCriacaoEvento'</text:span><text:span text:style-name="T36">: eventbridge_event.</text:span><text:span text:style-name="T35">get</text:span><text:span text:style-name="T36">(</text:span></text:p>
      <text:p text:style-name="P47" loext:marker-style-name="T9"><text:span text:style-name="T36">                   </text:span><text:span text:style-name="T38">'time'</text:span><text:span text:style-name="T36">,</text:span></text:p>
      <text:p text:style-name="P47" loext:marker-style-name="T9"><text:span text:style-name="T36">                   pedido_data.</text:span><text:span text:style-name="T35">get</text:span><text:span text:style-name="T36">(</text:span><text:span text:style-name="T38">'timestamp'</text:span><text:span text:style-name="T36">, datetime.utcnow().isoformat() + </text:span><text:span text:style-name="T38">"Z"</text:span><text:span text:style-name="T36">)</text:span></text:p>
      <text:p text:style-name="P47" loext:marker-style-name="T9"><text:span text:style-name="T36">               ),  </text:span><text:span text:style-name="T37"># Pegar timestamp do evento EB ou do detail</text:span></text:p>
      <text:p text:style-name="P47" loext:marker-style-name="T9"><text:span text:style-name="T36">               </text:span><text:span text:style-name="T38">'timestampProcessamento'</text:span><text:span text:style-name="T36">: datetime.utcnow().isoformat() + </text:span><text:span text:style-name="T38">"Z"</text:span></text:p>
      <text:p text:style-name="P47" loext:marker-style-name="T9"><text:span text:style-name="T36">           }</text:span></text:p>
      <text:p text:style-name="P156" loext:marker-style-name="T9"/>
      <text:p text:style-name="P47" loext:marker-style-name="T9"><text:span text:style-name="T36">           </text:span><text:span text:style-name="T37"># Remover chaves com valor None</text:span></text:p>
      <text:p text:style-name="P47" loext:marker-style-name="T9"><text:span text:style-name="T36">           item_final = {k: v </text:span><text:span text:style-name="T35">for</text:span><text:span text:style-name="T36"> k, v </text:span><text:span text:style-name="T35">in</text:span><text:span text:style-name="T36"> item_to_put.items() </text:span><text:span text:style-name="T35">if</text:span><text:span text:style-name="T36"> v </text:span><text:span text:style-name="T35">is</text:span><text:span text:style-name="T36"> </text:span><text:span text:style-name="T35">not</text:span><text:span text:style-name="T36"> None}</text:span></text:p>
      <text:p text:style-name="P47" loext:marker-style-name="T9"><text:span text:style-name="T36">           table.put_item(Item=item_final)</text:span></text:p>
      <text:p text:style-name="P47" loext:marker-style-name="T9"><text:span text:style-name="T36">           </text:span><text:span text:style-name="T35">print</text:span><text:span text:style-name="T36">(f</text:span><text:span text:style-name="T38">"Pedido </text:span><text:span text:style-name="T36">{</text:span><text:span text:style-name="T38">pedido_id</text:span><text:span text:style-name="T36">}</text:span><text:span text:style-name="T38"> salvo/atualizado no DynamoDB com status </text:span><text:span text:style-name="T36">{</text:span><text:span text:style-name="T38">status_processamento</text:span><text:span text:style-name="T36">}.</text:span><text:span text:style-name="T38">"</text:span><text:span text:style-name="T36">)</text:span></text:p>
      <text:p text:style-name="P156" loext:marker-style-name="T9"/>
      <text:p text:style-name="P47" loext:marker-style-name="T9"><text:span text:style-name="T36">       </text:span><text:span text:style-name="T35">except</text:span><text:span text:style-name="T36"> json.JSONDecodeError </text:span><text:span text:style-name="T35">as</text:span><text:span text:style-name="T36"> je:</text:span></text:p>
      <text:p text:style-name="P47" loext:marker-style-name="T9"><text:span text:style-name="T36">           </text:span><text:span text:style-name="T35">print</text:span><text:span text:style-name="T36">(f</text:span><text:span text:style-name="T38">"Erro de JSON ao processar registro </text:span><text:span text:style-name="T36">{</text:span><text:span text:style-name="T38">record</text:span><text:span text:style-name="T36">[</text:span><text:span text:style-name="T38">'messageId'</text:span><text:span text:style-name="T36">]}:</text:span><text:span text:style-name="T38"> </text:span><text:span text:style-name="T36">{</text:span><text:span text:style-name="T38">str</text:span><text:span text:style-name="T36">(</text:span><text:span text:style-name="T38">je</text:span><text:span text:style-name="T36">)}</text:span><text:span text:style-name="T38">"</text:span><text:span text:style-name="T36">)</text:span></text:p>
      <text:p text:style-name="P47" loext:marker-style-name="T9"><text:span text:style-name="T36">           </text:span><text:span text:style-name="T35">raise</text:span><text:span text:style-name="T36"> je</text:span></text:p>
      <text:p text:style-name="P47" loext:marker-style-name="T9"><text:soft-page-break/><text:span text:style-name="T36">       </text:span><text:span text:style-name="T35">except</text:span><text:span text:style-name="T36"> Exception </text:span><text:span text:style-name="T35">as</text:span><text:span text:style-name="T36"> e:</text:span></text:p>
      <text:p text:style-name="P47" loext:marker-style-name="T9"><text:span text:style-name="T36">           pedido_id_para_log = </text:span><text:span text:style-name="T38">'N/A'</text:span></text:p>
      <text:p text:style-name="P47" loext:marker-style-name="T9"><text:span text:style-name="T36">           </text:span><text:span text:style-name="T35">if</text:span><text:span text:style-name="T36"> </text:span><text:span text:style-name="T38">'pedido_data'</text:span><text:span text:style-name="T36"> </text:span><text:span text:style-name="T35">in</text:span><text:span text:style-name="T36"> locals() </text:span><text:span text:style-name="T35">and</text:span><text:span text:style-name="T36"> isinstance(pedido_data, dict):</text:span></text:p>
      <text:p text:style-name="P47" loext:marker-style-name="T9"><text:span text:style-name="T36">               pedido_id_para_log = pedido_data.</text:span><text:span text:style-name="T35">get</text:span><text:span text:style-name="T36">(</text:span><text:span text:style-name="T38">'pedidoId'</text:span><text:span text:style-name="T36">, </text:span><text:span text:style-name="T38">'N/A'</text:span><text:span text:style-name="T36">)</text:span></text:p>
      <text:p text:style-name="P47" loext:marker-style-name="T9"><text:span text:style-name="T36">           </text:span><text:span text:style-name="T35">print</text:span><text:span text:style-name="T36">(f</text:span><text:span text:style-name="T38">"Erro geral ao processar registro </text:span><text:span text:style-name="T36">{</text:span><text:span text:style-name="T38">record</text:span><text:span text:style-name="T36">[</text:span><text:span text:style-name="T38">'messageId'</text:span><text:span text:style-name="T36">]}</text:span><text:span text:style-name="T38"> </text:span><text:span text:style-name="T36">(</text:span><text:span text:style-name="T38">pedidoId</text:span><text:span text:style-name="T36">:</text:span><text:span text:style-name="T38"> </text:span><text:span text:style-name="T36">{</text:span><text:span text:style-name="T38">pedido_id_para_log</text:span><text:span text:style-name="T36">}):</text:span><text:span text:style-name="T38"> </text:span><text:span text:style-name="T36">{</text:span><text:span text:style-name="T38">str</text:span><text:span text:style-name="T36">(</text:span><text:span text:style-name="T38">e</text:span><text:span text:style-name="T36">)}</text:span><text:span text:style-name="T38">"</text:span><text:span text:style-name="T36">)</text:span></text:p>
      <text:p text:style-name="P47" loext:marker-style-name="T9"><text:span text:style-name="T36">           </text:span><text:span text:style-name="T35">raise</text:span><text:span text:style-name="T36"> e</text:span></text:p>
      <text:p text:style-name="P48" loext:marker-style-name="T9"><text:span text:style-name="T36">   </text:span><text:span text:style-name="T35">return</text:span><text:span text:style-name="T36"> {</text:span><text:span text:style-name="T38">'statusCode'</text:span><text:span text:style-name="T36">: </text:span><text:span text:style-name="T39">200</text:span><text:span text:style-name="T36">, </text:span><text:span text:style-name="T38">'body'</text:span><text:span text:style-name="T36">: </text:span><text:span text:style-name="T38">'Processamento de pedidos pendentes concluído'</text:span><text:span text:style-name="T36">}</text:span></text:p>
      <text:p text:style-name="P155" loext:marker-style-name="T9"/>
      <text:list xml:id="list105244168137196" text:continue-list="list105243279304425" text:style-name="WWNum51">
        <text:list-item>
          <text:p text:style-name="P221" loext:marker-style-name="T5"><text:span text:style-name="T6">Clique em </text:span><text:span text:style-name="T8">"Deploy"</text:span><text:span text:style-name="T6">.</text:span></text:p>
        </text:list-item>
      </text:list>
      <text:list xml:id="list105243253286128" text:continue-list="list105243675752644" text:style-name="WWNum52">
        <text:list-item>
          <text:p text:style-name="P222" loext:marker-style-name="T5"><text:span text:style-name="T6">Vá para a aba </text:span><text:span text:style-name="T8">"Configuration"</text:span><text:span text:style-name="T6"> &gt; </text:span><text:span text:style-name="T8">"Environment variables"</text:span><text:span text:style-name="T6"> &gt; </text:span><text:span text:style-name="T8">"Edit"</text:span><text:span text:style-name="T6">.</text:span></text:p>
        </text:list-item>
      </text:list>
      <text:list xml:id="list105243151900360" text:continue-list="list105243630386990" text:style-name="WWNum53">
        <text:list-item>
          <text:p text:style-name="P223" loext:marker-style-name="T5"><text:span text:style-name="T6">Adicione a variável:</text:span></text:p>
        </text:list-item>
      </text:list>
      <text:list xml:id="list105243364361370" text:continue-list="list105244059485521" text:style-name="WWNum54">
        <text:list-item>
          <text:p text:style-name="P348" loext:marker-style-name="T5"><text:span text:style-name="T8">Key:</text:span><text:span text:style-name="T6"> DYNAMODB_TABLE_NAME</text:span></text:p>
        </text:list-item>
        <text:list-item>
          <text:p text:style-name="P349" loext:marker-style-name="T5"><text:span text:style-name="T8">Value:</text:span><text:span text:style-name="T6"> pedidos-db-seu-nome</text:span></text:p>
        </text:list-item>
      </text:list>
      <text:list xml:id="list105243927043545" text:continue-list="list105242960529456" text:style-name="WWNum55">
        <text:list-item>
          <text:p text:style-name="P225" loext:marker-style-name="T5"><text:span text:style-name="T6">Clique em </text:span><text:span text:style-name="T8">"Save"</text:span><text:span text:style-name="T6">.</text:span></text:p>
        </text:list-item>
      </text:list>
      <text:list xml:id="list105243164812670" text:continue-list="list105243235276516" text:style-name="WWNum56">
        <text:list-item>
          <text:p text:style-name="P226" loext:marker-style-name="T5"><text:span text:style-name="T6">Ainda na aba </text:span><text:span text:style-name="T8">"Configuration"</text:span><text:span text:style-name="T6">, selecione </text:span><text:span text:style-name="T8">"General configuration"</text:span><text:span text:style-name="T6"> &gt; </text:span><text:span text:style-name="T8">"Edit"</text:span><text:span text:style-name="T6">.</text:span></text:p>
        </text:list-item>
      </text:list>
      <text:list xml:id="list105243960604929" text:continue-list="list105243832657263" text:style-name="WWNum57">
        <text:list-item>
          <text:p text:style-name="P350" loext:marker-style-name="T5"><text:span text:style-name="T6">Aumente o </text:span><text:span text:style-name="T8">Timeout</text:span><text:span text:style-name="T6"> para 60 segundos.</text:span></text:p>
        </text:list-item>
        <text:list-item>
          <text:p text:style-name="P351" loext:marker-style-name="T5"><text:span text:style-name="T6">Clique em </text:span><text:span text:style-name="T8">"Save"</text:span><text:span text:style-name="T6">.</text:span></text:p>
        </text:list-item>
      </text:list>
      <text:list xml:id="list105243177694329" text:continue-list="list105244499329081" text:style-name="WWNum58">
        <text:list-item>
          <text:p text:style-name="P229" loext:marker-style-name="T5"><text:span text:style-name="T6">Vá para </text:span><text:span text:style-name="T8">"Configuration"</text:span><text:span text:style-name="T6"> &gt; </text:span><text:span text:style-name="T8">"Triggers"</text:span><text:span text:style-name="T6"> &gt; </text:span><text:span text:style-name="T8">"Add trigger"</text:span><text:span text:style-name="T6">.</text:span></text:p>
        </text:list-item>
      </text:list>
      <text:list xml:id="list105243226332599" text:continue-list="list105244592799350" text:style-name="WWNum59">
        <text:list-item>
          <text:p text:style-name="P352" loext:marker-style-name="T5"><text:span text:style-name="T6">Fonte: </text:span><text:span text:style-name="T8">SQS</text:span><text:span text:style-name="T6">.</text:span></text:p>
        </text:list-item>
        <text:list-item>
          <text:p text:style-name="P353" loext:marker-style-name="T5"><text:span text:style-name="T6">SQS queue: pedidos-pendentes-queue-seu-nome.</text:span></text:p>
        </text:list-item>
        <text:list-item>
          <text:p text:style-name="P354" loext:marker-style-name="T5"><text:span text:style-name="T6">Batch size: 1.</text:span></text:p>
        </text:list-item>
        <text:list-item>
          <text:p text:style-name="P355" loext:marker-style-name="T5"><text:span text:style-name="T6">Clique em </text:span><text:span text:style-name="T8">"Add"</text:span><text:span text:style-name="T6">.</text:span></text:p>
        </text:list-item>
      </text:list>
      <text:p text:style-name="P10" loext:marker-style-name="T9"><draw:custom-shape text:anchor-type="as-char" draw:z-index="24" draw:name="AutoShape 19"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figuração da Regra no Amazon EventBridge</text:span></text:h>
      <text:p text:style-name="P10" loext:marker-style-name="T9"><text:span text:style-name="T6">Criaremos uma regra no Custom event bus (criado na Aula 1) para capturar os eventos NovoPedidoValidado e direcioná-los para a fila pedidos-pendentes-queue-seu-nome.</text:span></text:p>
      <text:p text:style-name="P22" loext:marker-style-name="T9"/>
      <text:h text:style-name="P194" text:outline-level="3" loext:marker-style-name="T11"><text:span text:style-name="T12">Criar a Regra (novo-pedido-validado-rule-seu-nome)</text:span></text:h>
      <text:list xml:id="list105243428944569" text:continue-list="list105243874092100" text:style-name="WWNum60">
        <text:list-item>
          <text:p text:style-name="P233" loext:marker-style-name="T5"><text:span text:style-name="T6">Acesse o serviço </text:span><text:span text:style-name="T8">Amazon EventBridge</text:span><text:span text:style-name="T6">.</text:span></text:p>
        </text:list-item>
      </text:list>
      <text:list xml:id="list105243655169522" text:continue-list="list105244537196719" text:style-name="WWNum61">
        <text:list-item>
          <text:p text:style-name="P234" loext:marker-style-name="T5"><text:span text:style-name="T6">No menu à esquerda, clique em </text:span><text:span text:style-name="T8">"Rules"</text:span><text:span text:style-name="T6">.</text:span></text:p>
        </text:list-item>
      </text:list>
      <text:list xml:id="list105243374426638" text:continue-list="list105243478278450" text:style-name="WWNum62">
        <text:list-item>
          <text:p text:style-name="P356" loext:marker-style-name="T5"><text:span text:style-name="T6">Na lista suspensa "Event bus", selecione seu barramento de eventos customizado: pedidos-event-bus-seu-nome.</text:span></text:p>
        </text:list-item>
      </text:list>
      <text:list xml:id="list105243465658772" text:continue-list="list105243191736687" text:style-name="WWNum63">
        <text:list-item>
          <text:p text:style-name="P240" loext:marker-style-name="T5"><text:span text:style-name="T6">Clique em </text:span><text:span text:style-name="T8">"Create rule"</text:span><text:span text:style-name="T6">.</text:span></text:p>
        </text:list-item>
      </text:list>
      <text:list xml:id="list105243696575821" text:continue-list="list105243696464876" text:style-name="WWNum64">
        <text:list-item>
          <text:p text:style-name="P357" loext:marker-style-name="T5"><text:span text:style-name="T8">Define rule detail:</text:span></text:p>
        </text:list-item>
      </text:list>
      <text:list xml:id="list105242713494507" text:continue-list="list105243204129748" text:style-name="WWNum65">
        <text:list-item>
          <text:p text:style-name="P358" loext:marker-style-name="T5"><text:span text:style-name="T8">Name:</text:span><text:span text:style-name="T6"> novo-pedido-validado-rule-seu-nome</text:span></text:p>
        </text:list-item>
        <text:list-item>
          <text:p text:style-name="P359" loext:marker-style-name="T5"><text:span text:style-name="T8">Description:</text:span><text:span text:style-name="T6"> (Opcional) Ex: "Regra para rotear novos pedidos validados para processamento".</text:span></text:p>
        </text:list-item>
        <text:list-item>
          <text:p text:style-name="P360" loext:marker-style-name="T5"><text:soft-page-break/><text:span text:style-name="T8">Event bus:</text:span><text:span text:style-name="T6"> Deve estar pedidos-event-bus-seu-nome.</text:span></text:p>
        </text:list-item>
        <text:list-item>
          <text:p text:style-name="P359" loext:marker-style-name="T5"><text:span text:style-name="T8">Rule type:</text:span><text:span text:style-name="T6"> Selecione </text:span><text:span text:style-name="T8">"Rule with an event pattern"</text:span><text:span text:style-name="T6">.</text:span></text:p>
        </text:list-item>
        <text:list-item>
          <text:p text:style-name="P361" loext:marker-style-name="T5"><text:span text:style-name="T6">Clique em </text:span><text:span text:style-name="T8">"Next"</text:span><text:span text:style-name="T6">.</text:span></text:p>
        </text:list-item>
      </text:list>
      <text:list xml:id="list105244788039933" text:continue-list="list105243489211174" text:style-name="WWNum66">
        <text:list-item>
          <text:p text:style-name="P362" loext:marker-style-name="T5"><text:span text:style-name="T8">Build event pattern:</text:span></text:p>
        </text:list-item>
      </text:list>
      <text:list xml:id="list105242786074173" text:continue-list="list105244114461056" text:style-name="WWNum67">
        <text:list-item>
          <text:p text:style-name="P363" loext:marker-style-name="T5"><text:span text:style-name="T8">Event source:</text:span><text:span text:style-name="T6"> Selecione </text:span><text:span text:style-name="T8">"AWS events or EventBridge partner events"</text:span><text:span text:style-name="T6">.</text:span></text:p>
        </text:list-item>
        <text:list-item>
          <text:p text:style-name="P364" loext:marker-style-name="T5"><text:span text:style-name="T6">Role para baixo até </text:span><text:span text:style-name="T8">"Event pattern"</text:span><text:span text:style-name="T6">.</text:span></text:p>
        </text:list-item>
        <text:list-item>
          <text:p text:style-name="P365" loext:marker-style-name="T5"><text:span text:style-name="T8">Creation method:</text:span><text:span text:style-name="T6"> Selecione </text:span><text:span text:style-name="T8">"Custom patterns (JSON editor)"</text:span><text:span text:style-name="T6">.</text:span></text:p>
        </text:list-item>
        <text:list-item>
          <text:p text:style-name="P366" loext:marker-style-name="T5"><text:span text:style-name="T6">No editor JSON, cole o seguinte padrão de evento. Certifique-se de que o valor de "source" corresponda exatamente ao que a Lambda validacao-pedidos-lambda-seu-nome (da Aula 1) está publicando:</text:span></text:p>
        </text:list-item>
      </text:list>
      <text:p text:style-name="P155" loext:marker-style-name="T9"/>
      <text:p text:style-name="P58" loext:marker-style-name="T9"><text:span text:style-name="T16">{</text:span></text:p>
      <text:p text:style-name="P287" loext:marker-style-name="T9"><text:span text:style-name="T16"> </text:span><text:span text:style-name="T17">"source"</text:span><text:span text:style-name="T16">: [</text:span><text:span text:style-name="T17">"lab</text:span><text:span text:style-name="T16">.</text:span><text:span text:style-name="T17">aula1</text:span><text:span text:style-name="T16">.</text:span><text:span text:style-name="T17">pedidos</text:span><text:span text:style-name="T16">.</text:span><text:span text:style-name="T17">validacao"</text:span><text:span text:style-name="T16">],</text:span></text:p>
      <text:p text:style-name="P287" loext:marker-style-name="T9"><text:span text:style-name="T16"> </text:span><text:span text:style-name="T17">"detail</text:span><text:span text:style-name="T16">-</text:span><text:span text:style-name="T17">type"</text:span><text:span text:style-name="T16">: [</text:span><text:span text:style-name="T17">"NovoPedidoValidado"</text:span><text:span text:style-name="T16">]</text:span></text:p>
      <text:p text:style-name="P367" loext:marker-style-name="T9"><text:span text:style-name="T16">}</text:span></text:p>
      <text:p text:style-name="P155" loext:marker-style-name="T9"/>
      <text:list xml:id="list105242828931260" text:continue-list="list105243993709283" text:style-name="WWNum68">
        <text:list-item>
          <text:p text:style-name="P368" loext:marker-style-name="T5"><text:span text:style-name="T6">Clique em </text:span><text:span text:style-name="T8">"Next"</text:span><text:span text:style-name="T6">.</text:span></text:p>
        </text:list-item>
      </text:list>
      <text:p text:style-name="P369" loext:marker-style-name="T9"><text:span text:style-name="T40">Observação:</text:span><text:span text:style-name="T45"> </text:span><text:span text:style-name="T6">Esses valores vêm do código da sua função Lambda que publica o evento no EventBridge (a Lambda de “validação de pedidos” da Aula 1). Na chamada ao SDK da AWS (Events.putEvents), você define explicitamente:</text:span></text:p>
      <text:list xml:id="list105243071070171" text:continue-list="list105244603660942" text:style-name="WWNum69">
        <text:list-item>
          <text:p text:style-name="P370" loext:marker-style-name="T5"><text:span text:style-name="T8">source</text:span><text:span text:style-name="T6">: a string que identifica de onde o evento veio (por isso “lab.aula1.pedidos.validacao”).</text:span></text:p>
        </text:list-item>
        <text:list-item>
          <text:p text:style-name="P370" loext:marker-style-name="T5"><text:span text:style-name="T8">detail-type</text:span><text:span text:style-name="T6">: o tipo de detalhe do evento, para categorizar (“NovoPedidoValidado”).</text:span></text:p>
        </text:list-item>
      </text:list>
      <text:p text:style-name="P369" loext:marker-style-name="T9"><text:span text:style-name="T6">Ou seja, quando você escreveu o código Python da Lambda, algo como:</text:span></text:p>
      <text:p text:style-name="P143" loext:marker-style-name="T9"/>
      <text:p text:style-name="P46" loext:marker-style-name="T9"><text:span text:style-name="T16">client.put_events(</text:span></text:p>
      <text:p text:style-name="P47" loext:marker-style-name="T9"><text:span text:style-name="T16">   Entries=[</text:span></text:p>
      <text:p text:style-name="P47" loext:marker-style-name="T9"><text:span text:style-name="T16">       {</text:span></text:p>
      <text:p text:style-name="P47" loext:marker-style-name="T9"><text:span text:style-name="T16">           </text:span><text:span text:style-name="T17">'Source'</text:span><text:span text:style-name="T16">: </text:span><text:span text:style-name="T17">'lab</text:span><text:span text:style-name="T16">.</text:span><text:span text:style-name="T17">aula1</text:span><text:span text:style-name="T16">.</text:span><text:span text:style-name="T17">pedidos</text:span><text:span text:style-name="T16">.</text:span><text:span text:style-name="T17">validacao'</text:span><text:span text:style-name="T16">,</text:span></text:p>
      <text:p text:style-name="P47" loext:marker-style-name="T9"><text:span text:style-name="T16">           </text:span><text:span text:style-name="T17">'DetailType'</text:span><text:span text:style-name="T16">: </text:span><text:span text:style-name="T17">'NovoPedidoValidado'</text:span><text:span text:style-name="T16">,</text:span></text:p>
      <text:p text:style-name="P47" loext:marker-style-name="T9"><text:span text:style-name="T16">           </text:span><text:span text:style-name="T17">'Detail'</text:span><text:span text:style-name="T16">: json.dumps({...}),</text:span></text:p>
      <text:p text:style-name="P47" loext:marker-style-name="T9"><text:span text:style-name="T16">           </text:span><text:span text:style-name="T17">'EventBusName'</text:span><text:span text:style-name="T16">: os.environ[</text:span><text:span text:style-name="T17">'EVENT_BUS_NAME'</text:span><text:span text:style-name="T16">]</text:span></text:p>
      <text:p text:style-name="P47" loext:marker-style-name="T9"><text:span text:style-name="T16">       }</text:span></text:p>
      <text:p text:style-name="P47" loext:marker-style-name="T9"><text:span text:style-name="T16">   ]</text:span></text:p>
      <text:p text:style-name="P48" loext:marker-style-name="T9"><text:soft-page-break/><text:span text:style-name="T16">)</text:span></text:p>
      <text:p text:style-name="P143" loext:marker-style-name="T9"/>
      <text:p text:style-name="P238" loext:marker-style-name="T9"><text:span text:style-name="T6">Foi ali que nós “criamos” esses valores. É exatamente por isso que, ao montar a regra no EventBridge, é fundamental usar o mesmo </text:span><text:span text:style-name="T8">source</text:span><text:span text:style-name="T6"> e </text:span><text:span text:style-name="T8">detailtype</text:span><text:span text:style-name="T6"> que sua Lambda está enviando. Se você mudar para outro nome sem alterar o código de publicação, não haverá correspondência e nenhum evento será capturado.</text:span></text:p>
      <text:list xml:id="list105243273098997" text:continue-list="list105244234748857" text:style-name="WWNum70">
        <text:list-item>
          <text:p text:style-name="P371" loext:marker-style-name="T5"><text:span text:style-name="T8">Select target(s):</text:span></text:p>
        </text:list-item>
      </text:list>
      <text:list xml:id="list105243929686081" text:continue-list="list105242926042753" text:style-name="WWNum71">
        <text:list-item>
          <text:p text:style-name="P372" loext:marker-style-name="T5"><text:span text:style-name="T8">Target types:</text:span><text:span text:style-name="T6"> Selecione </text:span><text:span text:style-name="T8">"AWS service"</text:span><text:span text:style-name="T6">.</text:span></text:p>
        </text:list-item>
        <text:list-item>
          <text:p text:style-name="P373" loext:marker-style-name="T5"><text:span text:style-name="T8">Select a target:</text:span><text:span text:style-name="T6"> Escolha </text:span><text:span text:style-name="T8">"SQS queue"</text:span><text:span text:style-name="T6"> na lista suspensa.</text:span></text:p>
        </text:list-item>
        <text:list-item>
          <text:p text:style-name="P374" loext:marker-style-name="T5"><text:span text:style-name="T8">Queue:</text:span><text:span text:style-name="T6"> Selecione sua fila pedidos-pendentes-queue-seu-nome na lista.</text:span></text:p>
        </text:list-item>
        <text:list-item>
          <text:p text:style-name="P373" loext:marker-style-name="T5"><text:span text:style-name="T6">(Deixe "Additional settings" padrão).</text:span></text:p>
        </text:list-item>
        <text:list-item>
          <text:p text:style-name="P375" loext:marker-style-name="T5"><text:span text:style-name="T6">Clique em </text:span><text:span text:style-name="T8">"Next"</text:span><text:span text:style-name="T6">.</text:span></text:p>
        </text:list-item>
      </text:list>
      <text:list xml:id="list105242923347289" text:continue-list="list105244216215279" text:style-name="WWNum72">
        <text:list-item>
          <text:p text:style-name="P251" loext:marker-style-name="T5"><text:span text:style-name="T8">Configure tags - optional:</text:span><text:span text:style-name="T6"> Pode pular esta etapa clicando em </text:span><text:span text:style-name="T8">"Next"</text:span><text:span text:style-name="T6">.</text:span></text:p>
        </text:list-item>
      </text:list>
      <text:list xml:id="list105244130484898" text:continue-list="list105242509694970" text:style-name="WWNum73">
        <text:list-item>
          <text:p text:style-name="P252" loext:marker-style-name="T5"><text:span text:style-name="T8">Review and create:</text:span><text:span text:style-name="T6"> Revise as configurações e clique em </text:span><text:span text:style-name="T8">"Create rule"</text:span><text:span text:style-name="T6">.</text:span></text:p>
        </text:list-item>
      </text:list>
      <text:p text:style-name="P10" loext:marker-style-name="T9"><draw:custom-shape text:anchor-type="as-char" draw:z-index="25" draw:name="AutoShape 20"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Teste do Fluxo Completo (API/S3 -&gt; EventBridge -&gt; SQS -&gt; Lambda -&gt; DynamoDB)</text:span></text:h>
      <text:p text:style-name="P10" loext:marker-style-name="T9"><text:span text:style-name="T6">Agora vamos testar todo o pipeline, desde a entrada do pedido (via API ou via arquivo S3, já que ambos agora alimentam o mesmo EventBridge) até sua persistência final.</text:span></text:p>
      <text:p text:style-name="P22" loext:marker-style-name="T9"/>
      <text:h text:style-name="P23" text:outline-level="3" loext:marker-style-name="T11"><text:span text:style-name="T12">Enviar um Novo Pedido via API (Fluxo da Aula 1)</text:span></text:h>
      <text:p text:style-name="P22" loext:marker-style-name="T9"/>
      <text:p text:style-name="P10" loext:marker-style-name="T9"><text:span text:style-name="T8">Prepare a Requisição </text:span></text:p>
      <text:p text:style-name="P10" loext:marker-style-name="T9"><text:span text:style-name="T6">Você enviará uma requisição POST para a URL da sua API com um payload em formato JSON. Utilize o comando que você encontrará abaixo e altere os </text:span><text:span text:style-name="T8">valores abaixo:</text:span></text:p>
      <text:p text:style-name="P143" loext:marker-style-name="T9"/>
      <text:p text:style-name="P343" loext:marker-style-name="T9"><text:span text:style-name="T16">curl -X POST &lt;INVOKE_URL&gt;/pedidos \</text:span></text:p>
      <text:p text:style-name="P344" loext:marker-style-name="T9"><text:span text:style-name="T16"> -H </text:span><text:span text:style-name="T17">"Content</text:span><text:span text:style-name="T16">-</text:span><text:span text:style-name="T17">Type</text:span><text:span text:style-name="T16">:</text:span><text:span text:style-name="T17"> application/json"</text:span><text:span text:style-name="T16"> \</text:span></text:p>
      <text:p text:style-name="P344" loext:marker-style-name="T9"><text:span text:style-name="T16"> -d '{</text:span></text:p>
      <text:p text:style-name="P344" loext:marker-style-name="T9"><text:span text:style-name="T16">   </text:span><text:span text:style-name="T17">"pedidoId"</text:span><text:span text:style-name="T16">: </text:span><text:span text:style-name="T17">"apiP001</text:span><text:span text:style-name="T16">-</text:span><text:span text:style-name="T17">seu</text:span><text:span text:style-name="T16">-</text:span><text:span text:style-name="T17">nome"</text:span><text:span text:style-name="T16">,</text:span></text:p>
      <text:p text:style-name="P344" loext:marker-style-name="T9"><text:span text:style-name="T16">   </text:span><text:span text:style-name="T17">"clienteId"</text:span><text:span text:style-name="T16">: </text:span><text:span text:style-name="T17">"clienteXYZ</text:span><text:span text:style-name="T16">-</text:span><text:span text:style-name="T17">seu</text:span><text:span text:style-name="T16">-</text:span><text:span text:style-name="T17">nome"</text:span><text:span text:style-name="T16">,</text:span></text:p>
      <text:p text:style-name="P344" loext:marker-style-name="T9"><text:span text:style-name="T16">   </text:span><text:span text:style-name="T17">"itens"</text:span><text:span text:style-name="T16">: [</text:span></text:p>
      <text:p text:style-name="P344" loext:marker-style-name="T9"><text:span text:style-name="T16">     {</text:span></text:p>
      <text:p text:style-name="P344" loext:marker-style-name="T9"><text:span text:style-name="T16">       </text:span><text:span text:style-name="T17">"Item"</text:span><text:span text:style-name="T16">: </text:span><text:span text:style-name="T17">"Produto X API"</text:span><text:span text:style-name="T16">,</text:span></text:p>
      <text:p text:style-name="P344" loext:marker-style-name="T9"><text:span text:style-name="T16">       </text:span><text:span text:style-name="T17">"qtd"</text:span><text:span text:style-name="T16">: </text:span><text:span text:style-name="T22">1</text:span></text:p>
      <text:p text:style-name="P344" loext:marker-style-name="T9"><text:span text:style-name="T16">     }</text:span></text:p>
      <text:p text:style-name="P344" loext:marker-style-name="T9"><text:span text:style-name="T16">   ]</text:span></text:p>
      <text:p text:style-name="P345" loext:marker-style-name="T9"><text:soft-page-break/><text:span text:style-name="T16"> }'</text:span></text:p>
      <text:p text:style-name="P143" loext:marker-style-name="T9"/>
      <text:list xml:id="list105244009253738" text:continue-list="list105244026880764" text:style-name="WWNum74">
        <text:list-item>
          <text:p text:style-name="P376" loext:marker-style-name="T5"><text:span text:style-name="T8">&lt;INVOKE_URL&gt;</text:span><text:span text:style-name="T6">: </text:span><text:span text:style-name="T8">URL de Invocação (Invoke URL) da sua API </text:span><text:span text:style-name="T6">que você anotou anteriormente. </text:span><text:span text:style-name="T8">Caminho:</text:span><text:span text:style-name="T6"> </text:span></text:p>
        </text:list-item>
      </text:list>
      <text:list xml:id="list105243692627155" text:continue-list="list105242887436278" text:style-name="WWNum75">
        <text:list-item>
          <text:p text:style-name="P377" loext:marker-style-name="T5"><text:span text:style-name="T6">API Gateway &gt; APIs &gt; pedidos-api-seu-nome &gt; Stages</text:span></text:p>
        </text:list-item>
      </text:list>
      <text:list xml:id="list105243302965524" text:continue-list="list105243694708432" text:style-name="WWNum76">
        <text:list-item>
          <text:p text:style-name="P378" loext:marker-style-name="T5"><text:span text:style-name="T8">pedidoId </text:span><text:span text:style-name="T6">e </text:span><text:span text:style-name="T8">clienteId</text:span><text:span text:style-name="T6">: personalize com os dados: </text:span></text:p>
        </text:list-item>
      </text:list>
      <text:list xml:id="list105243637880518" text:continue-list="list105243564549906" text:style-name="WWNum77">
        <text:list-item>
          <text:p text:style-name="P379" loext:marker-style-name="T5"><text:span text:style-name="T6">"</text:span><text:span text:style-name="T8">pedidoId</text:span><text:span text:style-name="T6">": "apiP001-seu-nome"</text:span></text:p>
        </text:list-item>
        <text:list-item>
          <text:p text:style-name="P380" loext:marker-style-name="T5"><text:span text:style-name="T6">"</text:span><text:span text:style-name="T8">clienteId</text:span><text:span text:style-name="T6">": "clienteAPI-XYZ-seu-nome"</text:span></text:p>
        </text:list-item>
        <text:list-item>
          <text:p text:style-name="P381" loext:marker-style-name="T5"><text:span text:style-name="T6">"</text:span><text:span text:style-name="T8">itens</text:span><text:span text:style-name="T6">": [{"item": "Produto X API", "qtd": 1}]</text:span></text:p>
        </text:list-item>
      </text:list>
      <text:list xml:id="list105243438538745" text:continue-list="list105244154781147" text:style-name="WWNum78">
        <text:list-item>
          <text:p text:style-name="P382" loext:marker-style-name="T5"><text:span text:style-name="T8">Exemplo com URL fictício de como deverá ficar: </text:span></text:p>
        </text:list-item>
      </text:list>
      <text:p text:style-name="P10" loext:marker-style-name="T9"><text:span text:style-name="T6"> </text:span></text:p>
      <text:p text:style-name="P383" loext:marker-style-name="T9"><draw:custom-shape text:anchor-type="as-char" draw:z-index="26" draw:name="AutoShape 21" draw:style-name="gr3" draw:text-style-name="P31" svg:width="14.976cm" svg:height="4.287cm"><svg:desc>Interface gráfica do usuário, Texto, AplicativoO conteúdo gerado por IA pode estar incorreto.</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loext:marker-style-name="T9"/>
      <text:p text:style-name="P12" loext:marker-style-name="T9"><text:span text:style-name="T8">8.2. Fazer Upload de um Arquivo com Pedidos no S3 (Fluxo da Aula 2)</text:span></text:p>
      <text:list xml:id="list105243631415523" text:continue-list="list105243378568340" text:style-name="WWNum79">
        <text:list-item>
          <text:p text:style-name="P258" loext:marker-style-name="T5"><text:span text:style-name="T6">Copie o seguinte conteúdo:</text:span></text:p>
        </text:list-item>
      </text:list>
      <text:p text:style-name="P143" loext:marker-style-name="T9"/>
      <text:p text:style-name="P46" loext:marker-style-name="T9"><text:span text:style-name="T16">{</text:span></text:p>
      <text:p text:style-name="P47" loext:marker-style-name="T9"><text:span text:style-name="T16"> </text:span><text:span text:style-name="T17">"metadata_arquivo"</text:span><text:span text:style-name="T16">: {</text:span></text:p>
      <text:p text:style-name="P47" loext:marker-style-name="T9"><text:span text:style-name="T16">   </text:span><text:span text:style-name="T17">"data_geracao"</text:span><text:span text:style-name="T16">: </text:span><text:span text:style-name="T17">"2024</text:span><text:span text:style-name="T16">-</text:span><text:span text:style-name="T17">03</text:span><text:span text:style-name="T16">-</text:span><text:span text:style-name="T17">16"</text:span></text:p>
      <text:p text:style-name="P47" loext:marker-style-name="T9"><text:span text:style-name="T16"> },</text:span></text:p>
      <text:p text:style-name="P47" loext:marker-style-name="T9"><text:span text:style-name="T16"> </text:span><text:span text:style-name="T17">"lista_pedidos"</text:span><text:span text:style-name="T16">: [</text:span></text:p>
      <text:p text:style-name="P47" loext:marker-style-name="T9"><text:span text:style-name="T16">   {</text:span></text:p>
      <text:p text:style-name="P47" loext:marker-style-name="T9"><text:span text:style-name="T16">     </text:span><text:span text:style-name="T17">"id_pedido_arquivo"</text:span><text:span text:style-name="T16">: </text:span><text:span text:style-name="T17">"s3P003</text:span><text:span text:style-name="T16">-</text:span><text:span text:style-name="T17">seu</text:span><text:span text:style-name="T16">-</text:span><text:span text:style-name="T17">nome"</text:span><text:span text:style-name="T16">,</text:span></text:p>
      <text:p text:style-name="P47" loext:marker-style-name="T9"><text:span text:style-name="T16">     </text:span><text:span text:style-name="T17">"id_cliente_arquivo"</text:span><text:span text:style-name="T16">: </text:span><text:span text:style-name="T17">"clienteS3</text:span><text:span text:style-name="T16">-</text:span><text:span text:style-name="T17">ABC"</text:span><text:span text:style-name="T16">,</text:span></text:p>
      <text:p text:style-name="P47" loext:marker-style-name="T9"><text:span text:style-name="T16">     </text:span><text:span text:style-name="T17">"itens_pedido_arquivo"</text:span><text:span text:style-name="T16">: [</text:span></text:p>
      <text:p text:style-name="P47" loext:marker-style-name="T9"><text:span text:style-name="T16">       {</text:span></text:p>
      <text:p text:style-name="P47" loext:marker-style-name="T9"><text:span text:style-name="T16">         </text:span><text:span text:style-name="T17">"sku"</text:span><text:span text:style-name="T16">: </text:span><text:span text:style-name="T17">"PROD</text:span><text:span text:style-name="T16">-</text:span><text:span text:style-name="T17">S3</text:span><text:span text:style-name="T16">-</text:span><text:span text:style-name="T17">001"</text:span><text:span text:style-name="T16">,</text:span></text:p>
      <text:p text:style-name="P47" loext:marker-style-name="T9"><text:span text:style-name="T16">         </text:span><text:span text:style-name="T17">"qtd"</text:span><text:span text:style-name="T16">: </text:span><text:span text:style-name="T22">10</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143" loext:marker-style-name="T9"/>
      <text:list xml:id="list105243222250666" text:continue-list="list105242748391961" text:style-name="WWNum80">
        <text:list-item>
          <text:p text:style-name="P259" loext:marker-style-name="T5"><text:soft-page-break/><text:span text:style-name="T6">No seu editor de texto e modifique-o colocando o seu nome em: "s3P003</text:span><text:span text:style-name="T8">-seu-nome</text:span><text:span text:style-name="T6">".</text:span></text:p>
        </text:list-item>
      </text:list>
      <text:list xml:id="list105243422332957" text:continue-list="list105243895279289" text:style-name="WWNum81">
        <text:list-item>
          <text:p text:style-name="P261" loext:marker-style-name="T5"><text:span text:style-name="T8">Salve.</text:span></text:p>
        </text:list-item>
      </text:list>
      <text:list xml:id="list105243201374819" text:continue-list="list105242580107337" text:style-name="WWNum82">
        <text:list-item>
          <text:p text:style-name="P262" loext:marker-style-name="T5"><text:span text:style-name="T6">Faça o upload deste arquivo para o seu bucket S3 datalake-arquivos-seu-nome.</text:span></text:p>
        </text:list-item>
      </text:list>
      <text:p text:style-name="P22" loext:marker-style-name="T9"/>
      <text:h text:style-name="P23" text:outline-level="3" loext:marker-style-name="T11"><text:span text:style-name="T12">Verificar o Processamento e Persistência</text:span></text:h>
      <text:p text:style-name="P12" loext:marker-style-name="T9"><text:span text:style-name="T6">Aguarde alguns momentos para que os pedidos passem por todo o fluxo.</text:span></text:p>
      <text:list xml:id="list105244296780899" text:continue-list="list105244558235766" text:style-name="WWNum83">
        <text:list-item>
          <text:p text:style-name="P263" loext:marker-style-name="T5"><text:span text:style-name="T8">Logs da validacao-pedidos-lambda-seu-nome (Lambda da Aula 1):</text:span></text:p>
        </text:list-item>
      </text:list>
      <text:list xml:id="list105243774715985" text:continue-list="list105244562456723" text:style-name="WWNum84">
        <text:list-item>
          <text:p text:style-name="P384" loext:marker-style-name="T5"><text:span text:style-name="T6">Verifique no </text:span><text:span text:style-name="T8">CloudWatch</text:span><text:span text:style-name="T6">. Você deverá ver logs para o pedido </text:span><text:span text:style-name="T8">apiP001-seu-nome</text:span><text:span text:style-name="T6"> (da API) e para </text:span><text:span text:style-name="T8">s3P003-seu-nome </text:span><text:span text:style-name="T6">(do arquivo S3), ambos publicando um evento NovoPedidoValidado no EventBridge.</text:span></text:p>
        </text:list-item>
        <text:list-item>
          <text:p text:style-name="P385" loext:marker-style-name="T5"><text:span text:style-name="T8">Caminho:</text:span><text:span text:style-name="T6"> CloudWatch &gt; Logs &gt; Log groups &gt; /aws/lambda/validacao-s3-arquivos-lambda-seu-nome</text:span></text:p>
        </text:list-item>
        <text:list-item>
          <text:p text:style-name="P386" loext:marker-style-name="T5"><text:span text:style-name="T8">Você deve ver:</text:span><text:span text:style-name="T6"> </text:span></text:p>
        </text:list-item>
      </text:list>
      <text:list xml:id="list105243134192746" text:continue-list="list105242838632700" text:style-name="WWNum85">
        <text:list-item>
          <text:p text:style-name="P387" loext:marker-style-name="T5"><text:span text:style-name="T6">"Evento SQS recebido". </text:span></text:p>
        </text:list-item>
        <text:list-item>
          <text:p text:style-name="P387" loext:marker-style-name="T5"><text:span text:style-name="T6">"Processando pedido do SQS". </text:span></text:p>
        </text:list-item>
        <text:list-item>
          <text:p text:style-name="P387" loext:marker-style-name="T5"><text:span text:style-name="T6">"Pedido X validado com sucesso". </text:span></text:p>
        </text:list-item>
        <text:list-item>
          <text:p text:style-name="P388" loext:marker-style-name="T5"><text:span text:style-name="T6">"Evento publicado no EventBridge". </text:span></text:p>
        </text:list-item>
      </text:list>
      <text:p text:style-name="P237" loext:marker-style-name="T9"/>
      <text:list xml:id="list105242847074280" text:continue-list="list105244209671348" text:style-name="WWNum86">
        <text:list-item>
          <text:p text:style-name="P270" loext:marker-style-name="T5"><text:span text:style-name="T8">EventBridge Rule Monitoring:</text:span></text:p>
        </text:list-item>
      </text:list>
      <text:list xml:id="list105243739624432" text:continue-list="list105242535947630" text:style-name="WWNum87">
        <text:list-item>
          <text:p text:style-name="P271" loext:marker-style-name="T5"><text:span text:style-name="T6">No console do </text:span><text:span text:style-name="T8">EventBridge &gt; Event buses</text:span><text:span text:style-name="T6">, selecione seu pedidos-event-bus-seu-nome.</text:span></text:p>
        </text:list-item>
        <text:list-item>
          <text:p text:style-name="P272" loext:marker-style-name="T5"><text:span text:style-name="T6">Clique na regra novo-pedido-validado-rule-seu-nome.</text:span></text:p>
        </text:list-item>
        <text:list-item>
          <text:p text:style-name="P389" loext:marker-style-name="T5"><text:span text:style-name="T6">Na aba "Monitoring", observe as métricas como </text:span><text:span text:style-name="T8">Invocations</text:span><text:span text:style-name="T6"> ou </text:span><text:span text:style-name="T8">TriggeredRules</text:span><text:span text:style-name="T6">. Você deverá ver um aumento correspondente aos eventos processados.</text:span></text:p>
        </text:list-item>
      </text:list>
      <text:list xml:id="list105243374677431" text:continue-list="list105242764099896" text:style-name="WWNum88">
        <text:list-item>
          <text:p text:style-name="P275" loext:marker-style-name="T5"><text:span text:style-name="T8">Fila SQS de Pedidos Pendentes (pedidos-pendentes-queue-seu-nome):</text:span></text:p>
        </text:list-item>
      </text:list>
      <text:list xml:id="list105244585593490" text:continue-list="list105243266992240" text:style-name="WWNum89">
        <text:list-item>
          <text:p text:style-name="P390" loext:marker-style-name="T5"><text:span text:style-name="T6">No SQS, observe esta fila. As mensagens (contendo os detalhes dos pedidos apiP001-seu-nome e s3P003-seu-nome). </text:span><text:span text:style-name="T8">É normal você chegar até aqui e não ver nenhuma mensagem no pool, pois ela é consumida rapidamente pelo seu lambda correspondente</text:span><text:span text:style-name="T6">.</text:span></text:p>
        </text:list-item>
      </text:list>
      <text:list xml:id="list105244477722174" text:continue-list="list105244462510720" text:style-name="WWNum90">
        <text:list-item>
          <text:p text:style-name="P277" loext:marker-style-name="T5"><text:span text:style-name="T8">Logs da processa-pedidos-lambda-seu-nome (Lambda desta Aula 3):</text:span></text:p>
        </text:list-item>
      </text:list>
      <text:list xml:id="list105242780028475" text:continue-list="list105243329961135" text:style-name="WWNum91">
        <text:list-item>
          <text:p text:style-name="P391" loext:marker-style-name="T5"><text:span text:style-name="T6">No CloudWatch, acesse os logs desta Lambda.</text:span></text:p>
        </text:list-item>
        <text:list-item>
          <text:p text:style-name="P392" loext:marker-style-name="T5"><text:soft-page-break/><text:span text:style-name="T6">Você deverá ver logs indicando o recebimento das mensagens da SQS e o processamento dos pedidos apiP001-seu-nome e s3P003-seu-nome.</text:span></text:p>
        </text:list-item>
        <text:list-item>
          <text:p text:style-name="P393" loext:marker-style-name="T5"><text:span text:style-name="T6">Procure por mensagens como: "Processando pedido: { ... 'pedidoId': 'apiP001-seu-nome' ... }" e "Pedido apiP001-seu-nome salvo/atualizado no DynamoDB com status PEDIDO_PROCESSADO.". Repita para o pedido S3.</text:span></text:p>
        </text:list-item>
      </text:list>
      <text:list xml:id="list105244785073913" text:continue-list="list2788627441" text:style-name="WWNum92">
        <text:list-item>
          <text:p text:style-name="P279" loext:marker-style-name="T5"><text:span text:style-name="T8">Tabela DynamoDB Principal (pedidos-db-seu-nome):</text:span></text:p>
        </text:list-item>
      </text:list>
      <text:list xml:id="list105242769645896" text:continue-list="list1948895347" text:style-name="WWNum93">
        <text:list-item>
          <text:p text:style-name="P394" loext:marker-style-name="T5"><text:span text:style-name="T6">No </text:span><text:span text:style-name="T8">DynamoDB &gt; Tables</text:span><text:span text:style-name="T6">, selecione a tabela pedidos-db-seu-nome.</text:span></text:p>
        </text:list-item>
        <text:list-item>
          <text:p text:style-name="P395" loext:marker-style-name="T5"><text:span text:style-name="T6">Clique em </text:span><text:span text:style-name="T8">"Explore table items"</text:span><text:span text:style-name="T6">.</text:span></text:p>
        </text:list-item>
        <text:list-item>
          <text:p text:style-name="P396" loext:marker-style-name="T5"><text:span text:style-name="T6">Você deverá encontrar dois novos itens:</text:span></text:p>
        </text:list-item>
      </text:list>
      <text:list xml:id="list105242789707074" text:continue-list="list3020802404" text:style-name="WWNum94">
        <text:list-item>
          <text:p text:style-name="P397" loext:marker-style-name="T5"><text:span text:style-name="T6">Um com </text:span><text:span text:style-name="T8">pedidoId</text:span><text:span text:style-name="T6"> igual a </text:span><text:span text:style-name="T8">apiP001-seu-nome</text:span><text:span text:style-name="T6">, </text:span><text:span text:style-name="T8">statusPedido </text:span><text:span text:style-name="T6">igual a </text:span><text:span text:style-name="T8">PEDIDO_PROCESSADO</text:span><text:span text:style-name="T6">, e origem provavelmente API (ou o que sua Lambda da Aula 1 definir por padrão se não houver campo de origem).</text:span></text:p>
        </text:list-item>
        <text:list-item>
          <text:p text:style-name="P398" loext:marker-style-name="T5"><text:span text:style-name="T6">Outro com </text:span><text:span text:style-name="T8">pedidoId </text:span><text:span text:style-name="T6">igual a </text:span><text:span text:style-name="T8">s3P003-seu-nome</text:span><text:span text:style-name="T6">, </text:span><text:span text:style-name="T8">statusPedido</text:span><text:span text:style-name="T6"> igual a </text:span><text:span text:style-name="T8">PEDIDO_PROCESSADO</text:span><text:span text:style-name="T6">, e origem igual a </text:span><text:span text:style-name="T8">S3_FILE</text:span><text:span text:style-name="T6">.</text:span></text:p>
        </text:list-item>
      </text:list>
      <text:p text:style-name="P22" loext:marker-style-name="T9"/>
      <text:p text:style-name="P383" loext:marker-style-name="T9"><draw:custom-shape text:anchor-type="as-char" draw:z-index="27" draw:name="AutoShape 22" draw:style-name="gr4" draw:text-style-name="P31" svg:width="14.976cm" svg:height="3.864cm"><svg:desc>Interface gráfica do usuário, Texto, Aplicativo, EmailO conteúdo gerado por IA pode estar incorreto.</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 loext:marker-style-name="T9"/>
      <text:list xml:id="list105243031872906" text:continue-list="list2719485332" text:style-name="WWNum95">
        <text:list-item>
          <text:p text:style-name="P399" loext:marker-style-name="T5"><text:span text:style-name="T6">Verifique os outros atributos para garantir que os dados foram persistidos corretamente.</text:span></text:p>
        </text:list-item>
      </text:list>
      <text:p text:style-name="P45" loext:marker-style-name="T9"><draw:custom-shape text:anchor-type="as-char" draw:z-index="28" draw:name="AutoShape 23"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 loext:marker-style-name="T3"><text:span text:style-name="T4">Conclusão da Aula 3</text:span></text:h>
      <text:p text:style-name="P12" loext:marker-style-name="T9"><text:span text:style-name="T6">Excelente! Você conectou com sucesso o pipeline de validação de pedidos ao seu processamento central e persistência. Agora, pedidos de múltiplas fontes (API e S3) são validados, um evento é disparado, e esse evento aciona um fluxo que processa e armazena o pedido final. Você aprendeu a:</text:span></text:p>
      <text:list xml:id="list105243783411508" text:continue-list="list75430860" text:style-name="WWNum96">
        <text:list-item>
          <text:p text:style-name="P400" loext:marker-style-name="T5"><text:span text:style-name="T6">Criar e configurar regras no Amazon EventBridge para rotear eventos baseados em padrões.</text:span></text:p>
        </text:list-item>
        <text:list-item>
          <text:p text:style-name="P400" loext:marker-style-name="T5"><text:soft-page-break/><text:span text:style-name="T6">Usar SQS como um buffer entre o EventBridge e uma Lambda de processamento.</text:span></text:p>
        </text:list-item>
        <text:list-item>
          <text:p text:style-name="P400" loext:marker-style-name="T5"><text:span text:style-name="T6">Desenvolver uma Lambda para consumir de SQS, executar lógica de negócio (simulada) e interagir com DynamoDB para persistência.</text:span></text:p>
        </text:list-item>
        <text:list-item>
          <text:p text:style-name="P401" loext:marker-style-name="T5"><text:span text:style-name="T6">Projetar uma tabela DynamoDB para armazenar dados de pedidos.</text:span></text:p>
        </text:list-item>
      </text:list>
      <text:p text:style-name="P10" loext:marker-style-name="T9"><text:span text:style-name="T6">Na próxima e última aula, expandiremos a funcionalidade para lidar com outros aspectos do ciclo de vida de um pedido (como cancelamento e alteração), reforçaremos o tratamento de erros com DLQs em todos os pontos e introduziremos o conceito de Lambda Layers para reuso de código.</text:span></text:p>
      <text:p text:style-name="P402" loext:marker-style-name="T9">Prepare-se para a Aula 4!</text:p>
      <text:p text:style-name="P402" loext:marker-style-name="T9"/>
      <text:p text:style-name="P1" loext:marker-style-name="T32"><text:span text:style-name="T32">SEMANA DO DESENVOLVEDOR – DIA 4</text:span></text:p>
      <text:p text:style-name="P1" loext:marker-style-name="T32"><text:span text:style-name="T32">Persistência Fluxos Adicionais de Pedidos, DLQs e Lambda Layers</text:span></text:p>
      <text:p text:style-name="P2" loext:marker-style-name="T2"><text:span text:style-name="T2">Visão Geral e Objetivos da Aula </text:span></text:p>
      <text:p text:style-name="P2">Bem-vindos à nossa última aula! Nas sessões anteriores, construímos os fluxos de ingestão de pedidos via API e S3, a validação desses pedidos, a publicação de eventos no EventBridge, e o processamento central com persistência no DynamoDB. </text:p>
      <text:p text:style-name="P2"/>
      <text:p text:style-name="P2">Nesta aula final, vamos expandir a funcionalidade do nosso sistema para lidar com outras operações importantes no ciclo de vida de um pedido: cancelamento e alteração. Utilizaremos novamente o EventBridge para rotear esses novos tipos de eventos para filas SQS dedicadas, que acionarão Lambdas específicas para atualizar o estado do pedido na nossa tabela DynamoDB principal. Além disso, revisaremos a importância das Dead Letter Queues (DLQs) que configuramos ao longo do caminho e faremos um teste prático para ver uma DLQ em ação. </text:p>
      <text:p text:style-name="P2"/>
      <text:p text:style-name="P2" loext:marker-style-name="T2"><text:span text:style-name="T2">Arquitetura completa</text:span></text:p>
      <text:p text:style-name="P2"><draw:frame draw:style-name="fr1" draw:name="Imagem 1 Copia 3" text:anchor-type="as-char" svg:width="15cm" svg:height="9.364cm" draw:z-index="29"><draw:image xlink:href="Pictures/1000000100000304000001E23B5F5543.png" xlink:type="simple" xlink:show="embed" xlink:actuate="onLoad" draw:mime-type="image/png"/></draw:frame></text:p>
      <text:p text:style-name="P2"/>
      <text:p text:style-name="P2" loext:marker-style-name="T2"><text:span text:style-name="T2">Arquitetura construida no dia 04</text:span></text:p>
      <text:p text:style-name="P2"><text:soft-page-break/><draw:frame draw:style-name="fr1" draw:name="Figura2 Copia 3" text:anchor-type="as-char" svg:width="11.723cm" svg:height="12.622cm" draw:z-index="30"><draw:image xlink:href="Pictures/10000001000001BB000001DD51E5A4EA.png" xlink:type="simple" xlink:show="embed" xlink:actuate="onLoad" draw:mime-type="image/png"/></draw:frame></text:p>
      <text:p text:style-name="P12" loext:marker-style-name="T9"><text:span text:style-name="T14">Ao final desta aula, você terá:</text:span></text:p>
      <text:list text:continue-list="list105243722577693" text:style-name="WWNum1">
        <text:list-item>
          <text:p text:style-name="P189" loext:marker-style-name="T5"><text:span text:style-name="T13">Fluxos funcionais para cancelamento e alteração de pedidos, integrados à arquitetura existente. </text:span></text:p>
        </text:list-item>
        <text:list-item>
          <text:p text:style-name="P189" loext:marker-style-name="T5"><text:span text:style-name="T13">Novas regras no EventBridge, filas SQS e funções Lambda para essas operações. </text:span></text:p>
        </text:list-item>
        <text:list-item>
          <text:p text:style-name="P189" loext:marker-style-name="T5"><text:span text:style-name="T13">Uma compreensão prática do funcionamento e da importância das DLQs. </text:span></text:p>
        </text:list-item>
        <text:list-item>
          <text:p text:style-name="P190" loext:marker-style-name="T5"><text:span text:style-name="T13">Uma visão completa da arquitetura integrada e funcional. </text:span></text:p>
        </text:list-item>
      </text:list>
      <text:p text:style-name="P22" loext:marker-style-name="T9"/>
      <text:p text:style-name="P12" loext:marker-style-name="T9"><text:span text:style-name="T14">Recursos a Serem Criados Nesta Aula:</text:span></text:p>
      <text:list text:continue-list="list105244511695227" text:style-name="WWNum2">
        <text:list-item>
          <text:p text:style-name="P191" loext:marker-style-name="T5"><text:span text:style-name="T13">IAM Role: lambda-altera-cancela-role-seu-nome </text:span></text:p>
        </text:list-item>
        <text:list-item>
          <text:p text:style-name="P191" loext:marker-style-name="T5"><text:span text:style-name="T13">Amazon SQS DLQ (Standard): cancela-pedido-dlq-seu-nome </text:span></text:p>
        </text:list-item>
        <text:list-item>
          <text:p text:style-name="P191" loext:marker-style-name="T5"><text:span text:style-name="T13">Amazon SQS Queue (Standard): cancela-pedido-queue-seu-nome </text:span></text:p>
        </text:list-item>
        <text:list-item>
          <text:p text:style-name="P191" loext:marker-style-name="T5"><text:span text:style-name="T13">AWS Lambda Function: cancela-pedido-lambda-seu-nome </text:span></text:p>
        </text:list-item>
        <text:list-item>
          <text:p text:style-name="P191" loext:marker-style-name="T5"><text:span text:style-name="T13">Amazon SQS DLQ (Standard): altera-pedido-dlq-seu-nome </text:span></text:p>
        </text:list-item>
        <text:list-item>
          <text:p text:style-name="P191" loext:marker-style-name="T5"><text:span text:style-name="T13">Amazon SQS Queue (Standard): altera-pedido-queue-seu-nome </text:span></text:p>
        </text:list-item>
        <text:list-item>
          <text:p text:style-name="P191" loext:marker-style-name="T5"><text:span text:style-name="T13">AWS Lambda Function: altera-pedido-lambda-seu-nome </text:span></text:p>
        </text:list-item>
        <text:list-item>
          <text:p text:style-name="P191" loext:marker-style-name="T5"><text:span text:style-name="T13">Amazon EventBridge Rules (2 novas): cancela-pedido-rule-seu-nome, altera-pedido-rule-seu-nome </text:span></text:p>
        </text:list-item>
        <text:list-item>
          <text:p text:style-name="P192" loext:marker-style-name="T5"><text:span text:style-name="T13">Revisão e Teste de DLQs existentes. </text:span></text:p>
        </text:list-item>
      </text:list>
      <text:p text:style-name="P10" loext:marker-style-name="T9"><text:soft-page-break/><text:span text:style-name="T14">Lembrete Importante</text:span><text:span text:style-name="T13">: Substitua seu-nome em todos os nomes de recursos. Trabalhe consistentemente na mesma região AWS. </text:span></text:p>
      <text:p text:style-name="P22" loext:marker-style-name="T9"/>
      <text:h text:style-name="P5" text:outline-level="3" loext:marker-style-name="T11"><text:span text:style-name="T12">Atenção</text:span></text:h>
      <text:p text:style-name="P193" loext:marker-style-name="T33"><text:span text:style-name="T34">A interface do Console de Gerenciamento da AWS pode sofrer pequenas alterações visuais ao longo do tempo, mas os conceitos e a localização geral dos serviços  permanecem consistentes. As instruções neste resumo seguem a estrutura geral das funcionalidades.</text:span></text:p>
      <text:p text:style-name="P22" loext:marker-style-name="T9"/>
      <text:h text:style-name="P5" text:outline-level="2" loext:marker-style-name="T3"><text:span text:style-name="T4">Início</text:span></text:h>
      <text:list text:continue-list="list105243312670358" text:style-name="WWNum3">
        <text:list-item>
          <text:p text:style-name="P6" loext:marker-style-name="T5"><text:span text:style-name="T6">Acesse o </text:span><text:a xlink:type="simple" xlink:href="https://console.aws.amazon.com/" office:target-frame-name="_blank" xlink:show="new" text:style-name="ListLabel_20_1252" text:visited-style-name="ListLabel_20_1252"><text:span text:style-name="T7">console de gerenciamento da AWS</text:span></text:a><text:span text:style-name="T6"> com a conta fornecida pela Escola da Nuvem. Caso apresente a mensagem de erro “</text:span><text:span text:style-name="T8">The credential in your login link were invalid. Please contact your administrator</text:span><text:span text:style-name="T6">.” abaixo, clique no texto em azul onde consta a informação “</text:span><text:span text:style-name="T8">To logout, click here</text:span><text:span text:style-name="T6">”. </text:span></text:p>
        </text:list-item>
        <text:list-item>
          <text:p text:style-name="P7" loext:marker-style-name="T5"><text:span text:style-name="T6">Após efetuar login, irá mostrar o console de gerenciamento da AWS. Sempre confira, no canto superior direito do console, qual a conta está logada, para evitar acessar com a conta incorreta e evitar gastos desnecessários.  </text:span></text:p>
        </text:list-item>
      </text:list>
      <text:p text:style-name="P8" loext:marker-style-name="T9"/>
      <text:h text:style-name="P9" text:outline-level="2" loext:marker-style-name="T3"><text:span text:style-name="T4">Acesso controlado no console AWS</text:span></text:h>
      <text:p text:style-name="P10" loext:marker-style-name="T9"><text:span text:style-name="T6">Os recursos liberados serão limitados para permitir apenas o necessário no laboratório. Mensagens de erro serão comuns de aparecer, caso tente acessar algum recurso não liberado na sua conta ou mesmo ao abrir algum serviço com limitações. Porém sempre siga à risca os passos propostos neste e em outros laboratórios. </text:span></text:p>
      <text:p text:style-name="P10" loext:marker-style-name="T9"><text:span text:style-name="T10">    </text:span></text:p>
      <text:h text:style-name="P9" text:outline-level="2" loext:marker-style-name="T3"><text:span text:style-name="T4">Configuração de Permissões (IAM Role)</text:span></text:h>
      <text:p text:style-name="P10" loext:marker-style-name="T9"><text:span text:style-name="T6">Criaremos uma nova role para as Lambdas que processarão os cancelamentos e alterações.</text:span></text:p>
      <text:p text:style-name="P22" loext:marker-style-name="T9"/>
      <text:h text:style-name="P5" text:outline-level="3" loext:marker-style-name="T11"><text:span text:style-name="T24">Criar Role para Lambdas de Alteração/Cancelamento (lambda-altera-cancela-role-seu-nome)</text:span></text:h>
      <text:list text:continue-list="list105243331149373" text:style-name="WWNum4">
        <text:list-item>
          <text:p text:style-name="P13" loext:marker-style-name="T5"><text:span text:style-name="T6">Acesse o serviço </text:span><text:span text:style-name="T8">IAM</text:span><text:span text:style-name="T6">.</text:span></text:p>
        </text:list-item>
      </text:list>
      <text:list text:continue-list="list105243556057823" text:style-name="WWNum5">
        <text:list-item>
          <text:p text:style-name="P195" loext:marker-style-name="T5"><text:span text:style-name="T6">Clique em </text:span><text:span text:style-name="T8">"Roles"</text:span><text:span text:style-name="T6"> &gt; </text:span><text:span text:style-name="T8">"Create role"</text:span><text:span text:style-name="T6">.</text:span></text:p>
        </text:list-item>
      </text:list>
      <text:list text:continue-list="list105243292279112" text:style-name="WWNum6">
        <text:list-item>
          <text:p text:style-name="P17" loext:marker-style-name="T5"><text:span text:style-name="T8">Trusted entity type:</text:span><text:span text:style-name="T6"> AWS service.</text:span></text:p>
        </text:list-item>
      </text:list>
      <text:list text:continue-list="list105242648418463" text:style-name="WWNum7">
        <text:list-item>
          <text:p text:style-name="P196" loext:marker-style-name="T5"><text:span text:style-name="T8">Use case:</text:span><text:span text:style-name="T6"> Lambda. Clique em </text:span><text:span text:style-name="T8">"Next"</text:span><text:span text:style-name="T6">.</text:span></text:p>
        </text:list-item>
      </text:list>
      <text:list text:continue-list="list105243671351037" text:style-name="WWNum8">
        <text:list-item>
          <text:p text:style-name="P20" loext:marker-style-name="T5"><text:span text:style-name="T8">Permissions policies:</text:span><text:span text:style-name="T6"> Adicione AWSLambdaBasicExecutionRole. Clique em </text:span><text:span text:style-name="T8">"Next"</text:span><text:span text:style-name="T6">.</text:span></text:p>
        </text:list-item>
      </text:list>
      <text:list text:continue-list="list105243211986159" text:style-name="WWNum9">
        <text:list-item>
          <text:p text:style-name="P403" loext:marker-style-name="T5"><text:span text:style-name="T8">Role name:</text:span><text:span text:style-name="T6"> lambda-altera-cancela-role-seu-nome.</text:span></text:p>
        </text:list-item>
      </text:list>
      <text:list text:continue-list="list105243282927303" text:style-name="WWNum10">
        <text:list-item>
          <text:p text:style-name="P24" loext:marker-style-name="T5"><text:span text:style-name="T6">Clique em </text:span><text:span text:style-name="T8">"Create role"</text:span><text:span text:style-name="T6">.</text:span></text:p>
        </text:list-item>
      </text:list>
      <text:list text:continue-list="list105242627427223" text:style-name="WWNum11">
        <text:list-item>
          <text:p text:style-name="P26" loext:marker-style-name="T5"><text:soft-page-break/><text:span text:style-name="T8">Nota</text:span><text:span text:style-name="T6">: Adicionaremos as permissões específicas após criar as SQS e sabermos o ARN da DynamoDB principal.</text:span></text:p>
        </text:list-item>
      </text:list>
      <text:p text:style-name="P10" loext:marker-style-name="T9"><draw:custom-shape text:anchor-type="as-char" draw:z-index="31" draw:name="AutoShape 24"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4">Implementação do Fluxo de Cancelamento de Pedido</text:span></text:h>
      <text:p text:style-name="P105" loext:marker-style-name="T9"/>
      <text:h text:style-name="P5" text:outline-level="3" loext:marker-style-name="T11"><text:span text:style-name="T12">Criar Filas SQS para Cancelamento (cancela-pedido-dlq-seu-nome e cancela-pedido-queue-seu-nome)</text:span></text:h>
      <text:list text:continue-list="list105244542092755" text:style-name="WWNum12">
        <text:list-item>
          <text:p text:style-name="P28" loext:marker-style-name="T5"><text:span text:style-name="T6">Acesse o </text:span><text:span text:style-name="T8">SQS</text:span><text:span text:style-name="T6">.</text:span></text:p>
        </text:list-item>
      </text:list>
      <text:list text:continue-list="list105242607773510" text:style-name="WWNum13">
        <text:list-item>
          <text:p text:style-name="P404" loext:marker-style-name="T5"><text:span text:style-name="T6">Crie a DLQ:</text:span></text:p>
        </text:list-item>
      </text:list>
      <text:list text:continue-list="list105244407208222" text:style-name="WWNum14">
        <text:list-item>
          <text:p text:style-name="P405" loext:marker-style-name="T5"><text:span text:style-name="T6">Type: Standard.</text:span></text:p>
        </text:list-item>
        <text:list-item>
          <text:p text:style-name="P406" loext:marker-style-name="T5"><text:span text:style-name="T6">Name: cancela-pedido-dlq-seu-nome. </text:span></text:p>
        </text:list-item>
        <text:list-item>
          <text:p text:style-name="P407" loext:marker-style-name="T5"><text:span text:style-name="T6">Clique em "Create queue". </text:span></text:p>
        </text:list-item>
        <text:list-item>
          <text:p text:style-name="P408" loext:marker-style-name="T5"><text:span text:style-name="T6">Anote o ARN.</text:span></text:p>
        </text:list-item>
      </text:list>
      <text:list text:continue-list="list105244651768669" text:style-name="WWNum15">
        <text:list-item>
          <text:p text:style-name="P35" loext:marker-style-name="T5"><text:span text:style-name="T6">Crie a Fila Principal:</text:span></text:p>
        </text:list-item>
      </text:list>
      <text:list text:continue-list="list105244488345300" text:style-name="WWNum16">
        <text:list-item>
          <text:p text:style-name="P37" loext:marker-style-name="T5"><text:span text:style-name="T6">No menu lateral, clique em </text:span><text:span text:style-name="T8">“Queues”.</text:span></text:p>
        </text:list-item>
        <text:list-item>
          <text:p text:style-name="P38" loext:marker-style-name="T5"><text:span text:style-name="T8">Create queue.</text:span></text:p>
        </text:list-item>
        <text:list-item>
          <text:p text:style-name="P409" loext:marker-style-name="T5"><text:span text:style-name="T8">Type:</text:span><text:span text:style-name="T6"> Standard.</text:span></text:p>
        </text:list-item>
        <text:list-item>
          <text:p text:style-name="P38" loext:marker-style-name="T5"><text:span text:style-name="T8">Name:</text:span><text:span text:style-name="T6"> cancela-pedido-queue-seu-nome.</text:span></text:p>
        </text:list-item>
        <text:list-item>
          <text:p text:style-name="P410" loext:marker-style-name="T5"><text:span text:style-name="T8">Visibility timeout:</text:span><text:span text:style-name="T6"> Ajuste para 70 segundos (para ser maior que o timeout da Lambda que criaremos).</text:span></text:p>
        </text:list-item>
        <text:list-item>
          <text:p text:style-name="P411" loext:marker-style-name="T5"><text:span text:style-name="T8">Dead-letter queue (DLQ):</text:span><text:span text:style-name="T6"> Enabled, selecione o ARN da cancela-pedido-dlq-seu-nome.</text:span></text:p>
        </text:list-item>
        <text:list-item>
          <text:p text:style-name="P412" loext:marker-style-name="T5"><text:span text:style-name="T8">Max receives:</text:span><text:span text:style-name="T6"> 3.</text:span></text:p>
        </text:list-item>
        <text:list-item>
          <text:p text:style-name="P413" loext:marker-style-name="T5"><text:span text:style-name="T6">Clique em </text:span><text:span text:style-name="T8">"Create queue".</text:span><text:span text:style-name="T6"> </text:span></text:p>
        </text:list-item>
        <text:list-item>
          <text:p text:style-name="P414" loext:marker-style-name="T5"><text:span text:style-name="T6">Anote o ARN e a URL.</text:span></text:p>
        </text:list-item>
      </text:list>
      <text:p text:style-name="P22" loext:marker-style-name="T9"/>
      <text:h text:style-name="P9" text:outline-level="3" loext:marker-style-name="T11"><text:span text:style-name="T12">Conceder Permissão SQS para Cancelamento à Role lambda-altera-cancela-role-seu-nome</text:span></text:h>
      <text:p text:style-name="P12" loext:marker-style-name="T9"><text:span text:style-name="T6">Antes de criarmos a Lambda de cancelamento e adicionarmos seu trigger SQS, vamos garantir que sua IAM Role (lambda-altera-cancela-role-seu-nome) tenha as permissões para interagir com a fila cancela-pedido-queue-seu-nome.</text:span></text:p>
      <text:list text:continue-list="list105242961996134" text:style-name="WWNum17">
        <text:list-item>
          <text:p text:style-name="P40" loext:marker-style-name="T5"><text:span text:style-name="T6">Acesse o serviço </text:span><text:span text:style-name="T8">IAM</text:span><text:span text:style-name="T6"> no Console AWS.</text:span></text:p>
        </text:list-item>
      </text:list>
      <text:list text:continue-list="list105244030316599" text:style-name="WWNum18">
        <text:list-item>
          <text:p text:style-name="P42" loext:marker-style-name="T5"><text:span text:style-name="T6">No menu à esquerda, clique em </text:span><text:span text:style-name="T8">"Roles"</text:span><text:span text:style-name="T6"> e encontre a role </text:span><text:span text:style-name="T8">lambda-altera-cancela-role-seu-nome</text:span><text:span text:style-name="T6">. Clique nela.</text:span></text:p>
        </text:list-item>
      </text:list>
      <text:list text:continue-list="list105242922681987" text:style-name="WWNum19">
        <text:list-item>
          <text:p text:style-name="P199" loext:marker-style-name="T5"><text:span text:style-name="T6">Na aba </text:span><text:span text:style-name="T8">"Permissions"</text:span><text:span text:style-name="T6">, sob "Permissions policies", clique em </text:span><text:span text:style-name="T8">"Add permissions"</text:span><text:span text:style-name="T6"> e selecione </text:span><text:span text:style-name="T8">"Create inline policy"</text:span><text:span text:style-name="T6">.</text:span></text:p>
        </text:list-item>
      </text:list>
      <text:list text:continue-list="list105243051368636" text:style-name="WWNum20">
        <text:list-item>
          <text:p text:style-name="P200" loext:marker-style-name="T5"><text:span text:style-name="T6">Selecione a aba </text:span><text:span text:style-name="T8">JSON</text:span><text:span text:style-name="T6">.</text:span></text:p>
        </text:list-item>
      </text:list>
      <text:list text:continue-list="list105243728574180" text:style-name="WWNum21">
        <text:list-item>
          <text:p text:style-name="P201" loext:marker-style-name="T5"><text:span text:style-name="T6">Remova a política existente e cole a política abaixo, modificando as seguintes informações:</text:span></text:p>
        </text:list-item>
      </text:list>
      <text:p text:style-name="P44" loext:marker-style-name="T9"/>
      <text:p text:style-name="P46" loext:marker-style-name="T9"><text:soft-page-break/><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p>
      <text:p text:style-name="P47" loext:marker-style-name="T9"><text:span text:style-name="T16">       </text:span><text:span text:style-name="T17">"sqs</text:span><text:span text:style-name="T16">:</text:span><text:span text:style-name="T17">ReceiveMessage"</text:span><text:span text:style-name="T16">,</text:span></text:p>
      <text:p text:style-name="P47" loext:marker-style-name="T9"><text:span text:style-name="T16">       </text:span><text:span text:style-name="T17">"sqs</text:span><text:span text:style-name="T16">:</text:span><text:span text:style-name="T17">DeleteMessage"</text:span><text:span text:style-name="T16">,</text:span></text:p>
      <text:p text:style-name="P47" loext:marker-style-name="T9"><text:span text:style-name="T16">       </text:span><text:span text:style-name="T17">"sqs</text:span><text:span text:style-name="T16">:</text:span><text:span text:style-name="T17">GetQueueAttributes"</text:span></text:p>
      <text:p text:style-name="P47" loext:marker-style-name="T9"><text:span text:style-name="T16">     ],</text:span></text:p>
      <text:p text:style-name="P47" loext:marker-style-name="T9"><text:span text:style-name="T16">     </text:span><text:span text:style-name="T17">"Resource"</text:span><text:span text:style-name="T16">: [</text:span></text:p>
      <text:p text:style-name="P47" loext:marker-style-name="T9"><text:span text:style-name="T16">       </text:span><text:span text:style-name="T17">"COLE AQUI O ARN DA SUA FILA cancela</text:span><text:span text:style-name="T16">-</text:span><text:span text:style-name="T17">pedido</text:span><text:span text:style-name="T16">-</text:span><text:span text:style-name="T17">queue</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22" loext:marker-style-name="T9"/>
      <text:p text:style-name="P12" loext:marker-style-name="T9"><text:span text:style-name="T8">Caminho:</text:span><text:span text:style-name="T6"> IAM &gt; Roles &gt; lambda-altera-cancela-role-seu-nome</text:span></text:p>
      <text:list text:continue-list="list105244158676483" text:style-name="WWNum22">
        <text:list-item>
          <text:p text:style-name="P202" loext:marker-style-name="T5"><text:span text:style-name="T8">Next</text:span><text:span text:style-name="T6">.</text:span></text:p>
        </text:list-item>
      </text:list>
      <text:list text:continue-list="list105243650974918" text:style-name="WWNum23">
        <text:list-item>
          <text:p text:style-name="P203" loext:marker-style-name="T5"><text:span text:style-name="T6">Em </text:span><text:span text:style-name="T8">"Review policy"</text:span><text:span text:style-name="T6">: </text:span></text:p>
        </text:list-item>
      </text:list>
      <text:list text:continue-list="list105244364118243" text:style-name="WWNum24">
        <text:list-item>
          <text:p text:style-name="P415" loext:marker-style-name="T5"><text:span text:style-name="T8">Name:</text:span><text:span text:style-name="T6"> SQSReadCancelaTrigger-seu-nome.</text:span></text:p>
        </text:list-item>
      </text:list>
      <text:list text:continue-list="list105243159082632" text:style-name="WWNum25">
        <text:list-item>
          <text:p text:style-name="P336" loext:marker-style-name="T5"><text:span text:style-name="T6">Clique em </text:span><text:span text:style-name="T8">"Create policy"</text:span><text:span text:style-name="T6">.</text:span></text:p>
        </text:list-item>
      </text:list>
      <text:p text:style-name="P22" loext:marker-style-name="T9"/>
      <text:h text:style-name="P5" text:outline-level="3" loext:marker-style-name="T11"><text:span text:style-name="T12">Criar Lambda para Cancelamento (cancela-pedido-lambda-seu-nome)</text:span></text:h>
      <text:list text:continue-list="list105244463135002" text:style-name="WWNum26">
        <text:list-item>
          <text:p text:style-name="P206" loext:marker-style-name="T5"><text:span text:style-name="T6">Acesse </text:span><text:span text:style-name="T8">AWS Lambda</text:span><text:span text:style-name="T6"> &gt; </text:span><text:span text:style-name="T8">"Create function"</text:span><text:span text:style-name="T6"> &gt; "Author from scratch".</text:span></text:p>
        </text:list-item>
      </text:list>
      <text:list text:continue-list="list105244030902539" text:style-name="WWNum27">
        <text:list-item>
          <text:p text:style-name="P340" loext:marker-style-name="T5"><text:span text:style-name="T8">Function name:</text:span><text:span text:style-name="T6"> cancela-pedido-lambda-seu-nome.</text:span></text:p>
        </text:list-item>
      </text:list>
      <text:list text:continue-list="list105243370600576" text:style-name="WWNum28">
        <text:list-item>
          <text:p text:style-name="P210" loext:marker-style-name="T5"><text:span text:style-name="T8">Runtime:</text:span><text:span text:style-name="T6"> Python 3.12.</text:span></text:p>
        </text:list-item>
      </text:list>
      <text:list text:continue-list="list105243805659904" text:style-name="WWNum29">
        <text:list-item>
          <text:p text:style-name="P211" loext:marker-style-name="T5"><text:span text:style-name="T6">Use a role existente lambda-altera-cancela-role-seu-nome.</text:span></text:p>
        </text:list-item>
      </text:list>
      <text:list text:continue-list="list105243917506775" text:style-name="WWNum30">
        <text:list-item>
          <text:p text:style-name="P80" loext:marker-style-name="T5"><text:span text:style-name="T6">Clique em </text:span><text:span text:style-name="T8">"Create function"</text:span><text:span text:style-name="T6">.</text:span></text:p>
        </text:list-item>
      </text:list>
      <text:list text:continue-list="list105243318082008" text:style-name="WWNum31">
        <text:list-item>
          <text:p text:style-name="P212" loext:marker-style-name="T5"><text:span text:style-name="T6">Na página da função, rola para baixo, até a aba </text:span><text:span text:style-name="T8">"Code"</text:span><text:span text:style-name="T6">, substitua lambda_function.py pelo código Python que você encontra a seguir:</text:span></text:p>
        </text:list-item>
      </text:list>
      <text:p text:style-name="P44" loext:marker-style-name="T9"/>
      <text:p text:style-name="P58" loext:marker-style-name="T9"><text:span text:style-name="T35">import</text:span><text:span text:style-name="T36"> json</text:span></text:p>
      <text:p text:style-name="P287" loext:marker-style-name="T9"><text:span text:style-name="T35">import</text:span><text:span text:style-name="T36"> os</text:span></text:p>
      <text:p text:style-name="P287" loext:marker-style-name="T9"><text:span text:style-name="T35">import</text:span><text:span text:style-name="T36"> boto3</text:span></text:p>
      <text:p text:style-name="P287" loext:marker-style-name="T9"><text:span text:style-name="T35">from</text:span><text:span text:style-name="T36"> datetime </text:span><text:span text:style-name="T35">import</text:span><text:span text:style-name="T36"> datetime</text:span></text:p>
      <text:p text:style-name="P416" loext:marker-style-name="T9"/>
      <text:p text:style-name="P287" loext:marker-style-name="T9"><text:span text:style-name="T36">DYNAMODB_TABLE_NAME = os.environ[</text:span><text:span text:style-name="T38">'DYNAMODB_TABLE_NAME'</text:span><text:span text:style-name="T36">]</text:span></text:p>
      <text:p text:style-name="P287" loext:marker-style-name="T9"><text:span text:style-name="T36">dynamodb = boto3.resource(</text:span><text:span text:style-name="T38">'dynamodb'</text:span><text:span text:style-name="T36">)</text:span></text:p>
      <text:p text:style-name="P287" loext:marker-style-name="T9"><text:span text:style-name="T36">table = dynamodb.Table(DYNAMODB_TABLE_NAME)</text:span></text:p>
      <text:p text:style-name="P416" loext:marker-style-name="T9"/>
      <text:p text:style-name="P287" loext:marker-style-name="T9"><text:span text:style-name="T35">def</text:span><text:span text:style-name="T36"> lambda_handler(</text:span><text:span text:style-name="T35">event</text:span><text:span text:style-name="T36">, context):</text:span></text:p>
      <text:p text:style-name="P287" loext:marker-style-name="T9"><text:span text:style-name="T36">   </text:span><text:span text:style-name="T35">print</text:span><text:span text:style-name="T36">(f</text:span><text:span text:style-name="T38">"Evento SQS </text:span><text:span text:style-name="T36">(</text:span><text:span text:style-name="T38">cancelamento</text:span><text:span text:style-name="T36">)</text:span><text:span text:style-name="T38"> recebido</text:span><text:span text:style-name="T36">:</text:span><text:span text:style-name="T38"> </text:span><text:span text:style-name="T36">{</text:span><text:span text:style-name="T38">event</text:span><text:span text:style-name="T36">}</text:span><text:span text:style-name="T38">"</text:span><text:span text:style-name="T36">)</text:span></text:p>
      <text:p text:style-name="P287" loext:marker-style-name="T9"><text:soft-page-break/><text:span text:style-name="T36">   </text:span><text:span text:style-name="T35">for</text:span><text:span text:style-name="T36"> record </text:span><text:span text:style-name="T35">in</text:span><text:span text:style-name="T36"> event[</text:span><text:span text:style-name="T38">'Records'</text:span><text:span text:style-name="T36">]:</text:span></text:p>
      <text:p text:style-name="P287" loext:marker-style-name="T9"><text:span text:style-name="T36">       pedido_id = None  </text:span><text:span text:style-name="T37"># Inicializa para o log de erro</text:span></text:p>
      <text:p text:style-name="P287" loext:marker-style-name="T9"><text:span text:style-name="T36">       </text:span><text:span text:style-name="T35">try</text:span><text:span text:style-name="T36">:</text:span></text:p>
      <text:p text:style-name="P287" loext:marker-style-name="T9"><text:span text:style-name="T36">           eventbridge_event = json.loads(record[</text:span><text:span text:style-name="T38">'body'</text:span><text:span text:style-name="T36">])</text:span></text:p>
      <text:p text:style-name="P287" loext:marker-style-name="T9"><text:span text:style-name="T36">           </text:span><text:span text:style-name="T35">print</text:span><text:span text:style-name="T36">(f</text:span><text:span text:style-name="T38">"Evento EventBridge recebido via SQS</text:span><text:span text:style-name="T36">:</text:span><text:span text:style-name="T38"> </text:span><text:span text:style-name="T36">{</text:span><text:span text:style-name="T38">eventbridge_event</text:span><text:span text:style-name="T36">}</text:span><text:span text:style-name="T38">"</text:span><text:span text:style-name="T36">)</text:span></text:p>
      <text:p text:style-name="P287" loext:marker-style-name="T9"><text:span text:style-name="T36">           </text:span><text:span text:style-name="T35">if</text:span><text:span text:style-name="T36"> </text:span><text:span text:style-name="T38">'detail'</text:span><text:span text:style-name="T36"> </text:span><text:span text:style-name="T35">not</text:span><text:span text:style-name="T36"> </text:span><text:span text:style-name="T35">in</text:span><text:span text:style-name="T36"> eventbridge_event:</text:span></text:p>
      <text:p text:style-name="P287" loext:marker-style-name="T9"><text:span text:style-name="T36">               </text:span><text:span text:style-name="T35">print</text:span><text:span text:style-name="T36">(f</text:span><text:span text:style-name="T38">"Erro</text:span><text:span text:style-name="T36">:</text:span><text:span text:style-name="T38"> Campo 'detail' não encontrado no evento</text:span><text:span text:style-name="T36">:</text:span><text:span text:style-name="T38"> </text:span><text:span text:style-name="T36">{</text:span><text:span text:style-name="T38">eventbridge_event</text:span><text:span text:style-name="T36">}</text:span><text:span text:style-name="T38">"</text:span><text:span text:style-name="T36">)</text:span></text:p>
      <text:p text:style-name="P287" loext:marker-style-name="T9"><text:span text:style-name="T36">               </text:span><text:span text:style-name="T35">continue</text:span></text:p>
      <text:p text:style-name="P416" loext:marker-style-name="T9"/>
      <text:p text:style-name="P287" loext:marker-style-name="T9"><text:span text:style-name="T36">           pedido_data = eventbridge_event[</text:span><text:span text:style-name="T38">'detail'</text:span><text:span text:style-name="T36">]</text:span></text:p>
      <text:p text:style-name="P287" loext:marker-style-name="T9"><text:span text:style-name="T36">           pedido_id = pedido_data.</text:span><text:span text:style-name="T35">get</text:span><text:span text:style-name="T36">(</text:span><text:span text:style-name="T38">'pedidoId'</text:span><text:span text:style-name="T36">)</text:span></text:p>
      <text:p text:style-name="P287" loext:marker-style-name="T9"><text:span text:style-name="T36">           </text:span><text:span text:style-name="T35">if</text:span><text:span text:style-name="T36"> </text:span><text:span text:style-name="T35">not</text:span><text:span text:style-name="T36"> pedido_id:</text:span></text:p>
      <text:p text:style-name="P287" loext:marker-style-name="T9"><text:span text:style-name="T36">               </text:span><text:span text:style-name="T35">print</text:span><text:span text:style-name="T36">(f</text:span><text:span text:style-name="T38">"Erro</text:span><text:span text:style-name="T36">:</text:span><text:span text:style-name="T38"> pedidoId não encontrado nos detalhes do evento</text:span><text:span text:style-name="T36">:</text:span><text:span text:style-name="T38"> </text:span><text:span text:style-name="T36">{</text:span><text:span text:style-name="T38">pedido_data</text:span><text:span text:style-name="T36">}</text:span><text:span text:style-name="T38">"</text:span><text:span text:style-name="T36">)</text:span></text:p>
      <text:p text:style-name="P287" loext:marker-style-name="T9"><text:span text:style-name="T36">               </text:span><text:span text:style-name="T35">continue</text:span></text:p>
      <text:p text:style-name="P416" loext:marker-style-name="T9"/>
      <text:p text:style-name="P287" loext:marker-style-name="T9"><text:span text:style-name="T36">           </text:span><text:span text:style-name="T35">print</text:span><text:span text:style-name="T36">(f</text:span><text:span text:style-name="T38">"Processando cancelamento para pedido</text:span><text:span text:style-name="T36">:</text:span><text:span text:style-name="T38"> </text:span><text:span text:style-name="T36">{</text:span><text:span text:style-name="T38">pedido_id</text:span><text:span text:style-name="T36">}</text:span><text:span text:style-name="T38">"</text:span><text:span text:style-name="T36">)</text:span></text:p>
      <text:p text:style-name="P416" loext:marker-style-name="T9"/>
      <text:p text:style-name="P287" loext:marker-style-name="T9"><text:span text:style-name="T36">           </text:span><text:span text:style-name="T37"># Atualizar status no DynamoDB</text:span></text:p>
      <text:p text:style-name="P287" loext:marker-style-name="T9"><text:span text:style-name="T36">           response = table.update_item(</text:span></text:p>
      <text:p text:style-name="P287" loext:marker-style-name="T9"><text:span text:style-name="T36">               Key={</text:span><text:span text:style-name="T38">'pedidoId'</text:span><text:span text:style-name="T36">: str(pedido_id)},</text:span></text:p>
      <text:p text:style-name="P287" loext:marker-style-name="T9"><text:span text:style-name="T36">               UpdateExpression=</text:span><text:span text:style-name="T38">"SET statusPedido </text:span><text:span text:style-name="T36">=</text:span><text:span text:style-name="T38"> </text:span><text:span text:style-name="T36">:</text:span><text:span text:style-name="T38">status</text:span><text:span text:style-name="T36">,</text:span><text:span text:style-name="T38"> timestampAtualizacao </text:span><text:span text:style-name="T36">=</text:span><text:span text:style-name="T38"> </text:span><text:span text:style-name="T36">:</text:span><text:span text:style-name="T38">ts"</text:span><text:span text:style-name="T36">,</text:span></text:p>
      <text:p text:style-name="P287" loext:marker-style-name="T9"><text:span text:style-name="T36">               ExpressionAttributeValues={</text:span></text:p>
      <text:p text:style-name="P287" loext:marker-style-name="T9"><text:span text:style-name="T36">                   </text:span><text:span text:style-name="T38">'</text:span><text:span text:style-name="T36">:</text:span><text:span text:style-name="T38">status'</text:span><text:span text:style-name="T36">: </text:span><text:span text:style-name="T38">'CANCELADO'</text:span><text:span text:style-name="T36">,</text:span></text:p>
      <text:p text:style-name="P287" loext:marker-style-name="T9"><text:span text:style-name="T36">                   </text:span><text:span text:style-name="T38">'</text:span><text:span text:style-name="T36">:</text:span><text:span text:style-name="T38">ts'</text:span><text:span text:style-name="T36">: datetime.utcnow().isoformat() + </text:span><text:span text:style-name="T38">"Z"</text:span></text:p>
      <text:p text:style-name="P287" loext:marker-style-name="T9"><text:span text:style-name="T36">               },</text:span></text:p>
      <text:p text:style-name="P287" loext:marker-style-name="T9"><text:span text:style-name="T36">               ReturnValues=</text:span><text:span text:style-name="T38">"UPDATED_NEW"</text:span><text:span text:style-name="T36">  </text:span><text:span text:style-name="T37"># Opcional: retorna os atributos atualizados</text:span></text:p>
      <text:p text:style-name="P287" loext:marker-style-name="T9"><text:span text:style-name="T36">           )</text:span></text:p>
      <text:p text:style-name="P287" loext:marker-style-name="T9"><text:span text:style-name="T36">           </text:span><text:span text:style-name="T35">print</text:span><text:span text:style-name="T36">(f</text:span><text:span text:style-name="T38">"Pedido </text:span><text:span text:style-name="T36">{</text:span><text:span text:style-name="T38">pedido_id</text:span><text:span text:style-name="T36">}</text:span><text:span text:style-name="T38"> atualizado para CANCELADO</text:span><text:span text:style-name="T36">.</text:span><text:span text:style-name="T38"> Resposta DynamoDB</text:span><text:span text:style-name="T36">:</text:span><text:span text:style-name="T38"> </text:span><text:span text:style-name="T36">{</text:span><text:span text:style-name="T38">response</text:span><text:span text:style-name="T36">}</text:span><text:span text:style-name="T38">"</text:span><text:span text:style-name="T36">)</text:span></text:p>
      <text:p text:style-name="P416" loext:marker-style-name="T9"/>
      <text:p text:style-name="P287" loext:marker-style-name="T9"><text:span text:style-name="T36">       </text:span><text:span text:style-name="T35">except</text:span><text:span text:style-name="T36"> json.JSONDecodeError </text:span><text:span text:style-name="T35">as</text:span><text:span text:style-name="T36"> je:</text:span></text:p>
      <text:p text:style-name="P287" loext:marker-style-name="T9"><text:span text:style-name="T36">           </text:span><text:span text:style-name="T35">print</text:span><text:span text:style-name="T36">(f</text:span><text:span text:style-name="T38">"Erro de JSON ao processar registro </text:span><text:span text:style-name="T36">{</text:span><text:span text:style-name="T38">record</text:span><text:span text:style-name="T36">[</text:span><text:span text:style-name="T38">'messageId'</text:span><text:span text:style-name="T36">]}:</text:span><text:span text:style-name="T38"> </text:span><text:span text:style-name="T36">{</text:span><text:span text:style-name="T38">str</text:span><text:span text:style-name="T36">(</text:span><text:span text:style-name="T38">je</text:span><text:span text:style-name="T36">)}</text:span><text:span text:style-name="T38">"</text:span><text:span text:style-name="T36">)</text:span></text:p>
      <text:p text:style-name="P287" loext:marker-style-name="T9"><text:span text:style-name="T36">           </text:span><text:span text:style-name="T35">raise</text:span><text:span text:style-name="T36"> je</text:span></text:p>
      <text:p text:style-name="P287" loext:marker-style-name="T9"><text:span text:style-name="T36">       </text:span><text:span text:style-name="T35">except</text:span><text:span text:style-name="T36"> Exception </text:span><text:span text:style-name="T35">as</text:span><text:span text:style-name="T36"> e:</text:span></text:p>
      <text:p text:style-name="P287" loext:marker-style-name="T9"><text:span text:style-name="T36">           </text:span><text:span text:style-name="T35">print</text:span><text:span text:style-name="T36">(f</text:span><text:span text:style-name="T38">"Erro geral ao processar cancelamento </text:span><text:span text:style-name="T36">{</text:span><text:span text:style-name="T38">record</text:span><text:span text:style-name="T36">[</text:span><text:span text:style-name="T38">'messageId'</text:span><text:span text:style-name="T36">]}</text:span><text:span text:style-name="T38"> </text:span><text:span text:style-name="T36">(</text:span><text:span text:style-name="T38">pedidoId</text:span><text:span text:style-name="T36">:</text:span><text:span text:style-name="T38"> </text:span><text:span text:style-name="T36">{</text:span><text:span text:style-name="T38">pedido_id</text:span><text:span text:style-name="T36">}):</text:span><text:span text:style-name="T38"> </text:span><text:span text:style-name="T36">{</text:span><text:span text:style-name="T38">str</text:span><text:span text:style-name="T36">(</text:span><text:span text:style-name="T38">e</text:span><text:span text:style-name="T36">)}</text:span><text:span text:style-name="T38">"</text:span><text:span text:style-name="T36">)</text:span></text:p>
      <text:p text:style-name="P287" loext:marker-style-name="T9"><text:span text:style-name="T36">           </text:span><text:span text:style-name="T35">raise</text:span><text:span text:style-name="T36"> e</text:span></text:p>
      <text:p text:style-name="P288" loext:marker-style-name="T9"><text:span text:style-name="T36">   </text:span><text:span text:style-name="T35">return</text:span><text:span text:style-name="T36"> {</text:span><text:span text:style-name="T38">'statusCode'</text:span><text:span text:style-name="T36">: </text:span><text:span text:style-name="T39">200</text:span><text:span text:style-name="T36">, </text:span><text:span text:style-name="T38">'body'</text:span><text:span text:style-name="T36">: </text:span><text:span text:style-name="T38">'Processamento de cancelamentos concluído'</text:span><text:span text:style-name="T36">}</text:span></text:p>
      <text:p text:style-name="P44" loext:marker-style-name="T9"/>
      <text:list text:continue-list="list105244602761465" text:style-name="WWNum32">
        <text:list-item>
          <text:p text:style-name="P213" loext:marker-style-name="T5"><text:span text:style-name="T6">Clique em </text:span><text:span text:style-name="T8">"Deploy"</text:span><text:span text:style-name="T6">.</text:span></text:p>
        </text:list-item>
      </text:list>
      <text:list text:continue-list="list105242822016372" text:style-name="WWNum33">
        <text:list-item>
          <text:p text:style-name="P87" loext:marker-style-name="T5"><text:span text:style-name="T6">Configure Variáveis de Ambiente:</text:span></text:p>
        </text:list-item>
      </text:list>
      <text:list text:continue-list="list105243854062090" text:style-name="WWNum34">
        <text:list-item>
          <text:p text:style-name="P417" loext:marker-style-name="T5"><text:span text:style-name="T6">Vá para </text:span><text:span text:style-name="T8">"Configuration</text:span><text:span text:style-name="T6">" &gt; "</text:span><text:span text:style-name="T8">Environment variables</text:span><text:span text:style-name="T6">" &gt; "</text:span><text:span text:style-name="T8">Edit</text:span><text:span text:style-name="T6">" &gt; “</text:span><text:span text:style-name="T8">Add environment variable</text:span><text:span text:style-name="T6">”.</text:span></text:p>
        </text:list-item>
        <text:list-item>
          <text:p text:style-name="P418" loext:marker-style-name="T5"><text:span text:style-name="T6">Adicione: </text:span></text:p>
        </text:list-item>
      </text:list>
      <text:list text:continue-list="list105243124205619" text:style-name="WWNum35">
        <text:list-item>
          <text:p text:style-name="P419" loext:marker-style-name="T5"><text:span text:style-name="T6">Key: </text:span><text:span text:style-name="T8">DYNAMODB_TABLE_NAME</text:span><text:span text:style-name="T6">.</text:span></text:p>
        </text:list-item>
        <text:list-item>
          <text:p text:style-name="P420" loext:marker-style-name="T5"><text:span text:style-name="T6">Value: </text:span><text:span text:style-name="T8">pedidos-db-seu-nome</text:span><text:span text:style-name="T6">.</text:span></text:p>
        </text:list-item>
      </text:list>
      <text:list text:continue-list="list105244101157913" text:style-name="WWNum36">
        <text:list-item>
          <text:p text:style-name="P421" loext:marker-style-name="T5"><text:span text:style-name="T6">Clique em "</text:span><text:span text:style-name="T8">Save</text:span><text:span text:style-name="T6">".</text:span></text:p>
        </text:list-item>
      </text:list>
      <text:list text:continue-list="list105243348626866" text:style-name="WWNum37">
        <text:list-item>
          <text:p text:style-name="P422" loext:marker-style-name="T5"><text:soft-page-break/><text:span text:style-name="T6">Configure Timeout:</text:span></text:p>
        </text:list-item>
      </text:list>
      <text:list text:continue-list="list105243300051568" text:style-name="WWNum38">
        <text:list-item>
          <text:p text:style-name="P423" loext:marker-style-name="T5"><text:span text:style-name="T6">Vá para "</text:span><text:span text:style-name="T8">Configuration</text:span><text:span text:style-name="T6">" &gt; "</text:span><text:span text:style-name="T8">General configuration</text:span><text:span text:style-name="T6">" &gt; "</text:span><text:span text:style-name="T8">Edit</text:span><text:span text:style-name="T6">".</text:span></text:p>
        </text:list-item>
        <text:list-item>
          <text:p text:style-name="P424" loext:marker-style-name="T5"><text:span text:style-name="T6">Defina “</text:span><text:span text:style-name="T8">Timeout”</text:span><text:span text:style-name="T6"> para 60 segundos.</text:span></text:p>
        </text:list-item>
        <text:list-item>
          <text:p text:style-name="P425" loext:marker-style-name="T5"><text:span text:style-name="T6">Clique em "</text:span><text:span text:style-name="T8">Save</text:span><text:span text:style-name="T6">".</text:span></text:p>
        </text:list-item>
      </text:list>
      <text:list text:continue-list="list105244179393947" text:style-name="WWNum39">
        <text:list-item>
          <text:p text:style-name="P426" loext:marker-style-name="T5"><text:span text:style-name="T6">Adicione Trigger SQS:</text:span></text:p>
        </text:list-item>
      </text:list>
      <text:list text:continue-list="list105243613543052" text:style-name="WWNum40">
        <text:list-item>
          <text:p text:style-name="P427" loext:marker-style-name="T5"><text:span text:style-name="T6">Vá para "</text:span><text:span text:style-name="T8">Configuration</text:span><text:span text:style-name="T6">" &gt; "</text:span><text:span text:style-name="T8">Triggers</text:span><text:span text:style-name="T6">" &gt; "</text:span><text:span text:style-name="T8">Add trigger</text:span><text:span text:style-name="T6">".</text:span></text:p>
        </text:list-item>
        <text:list-item>
          <text:p text:style-name="P428" loext:marker-style-name="T5"><text:span text:style-name="T6">Em </text:span><text:span text:style-name="T8">“Trigger configuration”</text:span><text:span text:style-name="T6">, selecione a</text:span><text:span text:style-name="T8"> </text:span><text:span text:style-name="T6">fonte  </text:span><text:span text:style-name="T8">SQS</text:span><text:span text:style-name="T6">.</text:span></text:p>
        </text:list-item>
        <text:list-item>
          <text:p text:style-name="P429" loext:marker-style-name="T5"><text:span text:style-name="T8">SQS queue</text:span><text:span text:style-name="T6">: cancela-pedido-queue-seu-nome.</text:span></text:p>
        </text:list-item>
        <text:list-item>
          <text:p text:style-name="P428" loext:marker-style-name="T5"><text:span text:style-name="T6">Batch size: 1.</text:span></text:p>
        </text:list-item>
        <text:list-item>
          <text:p text:style-name="P430" loext:marker-style-name="T5"><text:span text:style-name="T6">Clique em "</text:span><text:span text:style-name="T8">Add</text:span><text:span text:style-name="T6">".</text:span></text:p>
        </text:list-item>
      </text:list>
      <text:p text:style-name="P12" loext:marker-style-name="T9"><text:span text:style-name="T8">3.3. Criar Regra no EventBridge para Cancelamento (cancela-pedido-rule-seu-nome)</text:span></text:p>
      <text:list text:continue-list="list105244181411851" text:style-name="WWNum41">
        <text:list-item>
          <text:p text:style-name="P107" loext:marker-style-name="T5"><text:span text:style-name="T6">Acesse </text:span><text:span text:style-name="T8">Amazon EventBridge</text:span><text:span text:style-name="T6"> &gt; </text:span><text:span text:style-name="T8">"Rules"</text:span><text:span text:style-name="T6">.</text:span></text:p>
        </text:list-item>
      </text:list>
      <text:list text:continue-list="list105243320827252" text:style-name="WWNum42">
        <text:list-item>
          <text:p text:style-name="P216" loext:marker-style-name="T5"><text:span text:style-name="T6">Selecione o Event Bus: pedidos-event-bus-seu-nome.</text:span></text:p>
        </text:list-item>
      </text:list>
      <text:list text:continue-list="list105243033533847" text:style-name="WWNum43">
        <text:list-item>
          <text:p text:style-name="P217" loext:marker-style-name="T5"><text:span text:style-name="T6">Clique em </text:span><text:span text:style-name="T8">"Create rule"</text:span><text:span text:style-name="T6">.</text:span></text:p>
        </text:list-item>
      </text:list>
      <text:list text:continue-list="list105243354436732" text:style-name="WWNum44">
        <text:list-item>
          <text:p text:style-name="P218" loext:marker-style-name="T5"><text:span text:style-name="T8">Name:</text:span><text:span text:style-name="T6"> cancela-pedido-rule-seu-nome.</text:span></text:p>
        </text:list-item>
      </text:list>
      <text:list text:continue-list="list105243431518766" text:style-name="WWNum45">
        <text:list-item>
          <text:p text:style-name="P111" loext:marker-style-name="T5"><text:span text:style-name="T8">Rule type:</text:span><text:span text:style-name="T6"> "Rule with an event pattern". </text:span></text:p>
        </text:list-item>
      </text:list>
      <text:list text:continue-list="list105244200579469" text:style-name="WWNum46">
        <text:list-item>
          <text:p text:style-name="P112" loext:marker-style-name="T5"><text:span text:style-name="T6">Clique em </text:span><text:span text:style-name="T8">"Next"</text:span><text:span text:style-name="T6">.</text:span></text:p>
        </text:list-item>
      </text:list>
      <text:list text:continue-list="list105244497564986" text:style-name="WWNum47">
        <text:list-item>
          <text:p text:style-name="P113" loext:marker-style-name="T5"><text:span text:style-name="T6">Role para baixo.</text:span></text:p>
        </text:list-item>
      </text:list>
      <text:list text:continue-list="list105242715651806" text:style-name="WWNum48">
        <text:list-item>
          <text:p text:style-name="P219" loext:marker-style-name="T5"><text:span text:style-name="T6">Em </text:span><text:span text:style-name="T8">Event pattern:</text:span><text:span text:style-name="T6"> Selecione "Custom patterns (JSON editor)" e cole:</text:span></text:p>
        </text:list-item>
      </text:list>
      <text:p text:style-name="P44" loext:marker-style-name="T9"/>
      <text:p text:style-name="P96" loext:marker-style-name="T9"><text:span text:style-name="T16">{</text:span></text:p>
      <text:p text:style-name="P97" loext:marker-style-name="T9"><text:span text:style-name="T16"> </text:span><text:span text:style-name="T17">"source"</text:span><text:span text:style-name="T16">: [</text:span><text:span text:style-name="T17">"lab</text:span><text:span text:style-name="T16">.</text:span><text:span text:style-name="T17">aula4</text:span><text:span text:style-name="T16">.</text:span><text:span text:style-name="T17">operacoes"</text:span><text:span text:style-name="T16">],</text:span></text:p>
      <text:p text:style-name="P97" loext:marker-style-name="T9"><text:span text:style-name="T16"> </text:span><text:span text:style-name="T17">"detail</text:span><text:span text:style-name="T16">-</text:span><text:span text:style-name="T17">type"</text:span><text:span text:style-name="T16">: [</text:span><text:span text:style-name="T17">"CancelarPedido"</text:span><text:span text:style-name="T16">]</text:span></text:p>
      <text:p text:style-name="P98" loext:marker-style-name="T9"><text:span text:style-name="T16">}</text:span></text:p>
      <text:p text:style-name="P44" loext:marker-style-name="T9"/>
      <text:p text:style-name="P238" loext:marker-style-name="T9"><text:span text:style-name="T28">(</text:span><text:span text:style-name="T50">Nota:</text:span><text:span text:style-name="T28"> Usaremos lab.aula4.operacoes como a origem lógica para esses novos eventos).</text:span></text:p>
      <text:list text:continue-list="list105242649642742" text:style-name="WWNum49">
        <text:list-item>
          <text:p text:style-name="P119" loext:marker-style-name="T5"><text:span text:style-name="T6">Clique em </text:span><text:span text:style-name="T8">"Next".</text:span></text:p>
        </text:list-item>
      </text:list>
      <text:list text:continue-list="list105244365028156" text:style-name="WWNum50">
        <text:list-item>
          <text:p text:style-name="P431" loext:marker-style-name="T5"><text:span text:style-name="T8">Target types: </text:span><text:span text:style-name="T6">AWS service</text:span></text:p>
        </text:list-item>
      </text:list>
      <text:list text:continue-list="list105244168137196" text:style-name="WWNum51">
        <text:list-item>
          <text:p text:style-name="P432" loext:marker-style-name="T5"><text:span text:style-name="T8">Select a target:</text:span><text:span text:style-name="T6"> SQS queue.</text:span></text:p>
        </text:list-item>
      </text:list>
      <text:list text:continue-list="list105243253286128" text:style-name="WWNum52">
        <text:list-item>
          <text:p text:style-name="P433" loext:marker-style-name="T5"><text:span text:style-name="T8">Queue:</text:span><text:span text:style-name="T6"> cancela-pedido-queue-seu-nome. </text:span></text:p>
        </text:list-item>
      </text:list>
      <text:list text:continue-list="list105243151900360" text:style-name="WWNum53">
        <text:list-item>
          <text:p text:style-name="P434" loext:marker-style-name="T5"><text:span text:style-name="T6">Clique em </text:span><text:span text:style-name="T8">"Next"</text:span><text:span text:style-name="T6">.</text:span></text:p>
        </text:list-item>
      </text:list>
      <text:list text:continue-list="list105243364361370" text:style-name="WWNum54">
        <text:list-item>
          <text:p text:style-name="P435" loext:marker-style-name="T5"><text:span text:style-name="T8">Next</text:span><text:span text:style-name="T6">.</text:span></text:p>
        </text:list-item>
      </text:list>
      <text:list text:continue-list="list105243927043545" text:style-name="WWNum55">
        <text:list-item>
          <text:p text:style-name="P436" loext:marker-style-name="T5"><text:span text:style-name="T6">Clique em </text:span><text:span text:style-name="T8">"Create rule"</text:span><text:span text:style-name="T6">.</text:span></text:p>
        </text:list-item>
      </text:list>
      <text:p text:style-name="P10" loext:marker-style-name="T9"><draw:custom-shape text:anchor-type="as-char" draw:z-index="32" draw:name="AutoShape 25"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4">Implementação do Fluxo de Alteração de Pedido</text:span></text:h>
      <text:p text:style-name="P10" loext:marker-style-name="T9"><text:soft-page-break/><text:span text:style-name="T6">Este fluxo é muito similar ao de cancelamento.</text:span></text:p>
      <text:p text:style-name="P22" loext:marker-style-name="T9"/>
      <text:h text:style-name="P5" text:outline-level="3" loext:marker-style-name="T11"><text:span text:style-name="T12">Criar Filas SQS para Alteração (altera-pedido-dlq-seu-nome e altera-pedido-queue-seu-nome)</text:span></text:h>
      <text:list text:continue-list="list105243164812670" text:style-name="WWNum56">
        <text:list-item>
          <text:p text:style-name="P226" loext:marker-style-name="T5"><text:span text:style-name="T8">Crie a DLQ:</text:span></text:p>
        </text:list-item>
      </text:list>
      <text:list text:continue-list="list105243960604929" text:style-name="WWNum57">
        <text:list-item>
          <text:p text:style-name="P350" loext:marker-style-name="T5"><text:span text:style-name="T6">Acesse </text:span><text:span text:style-name="T8">SQS &gt; Create queue</text:span><text:span text:style-name="T6">.</text:span></text:p>
        </text:list-item>
        <text:list-item>
          <text:p text:style-name="P437" loext:marker-style-name="T5"><text:span text:style-name="T8">Type: </text:span><text:span text:style-name="T6">Standard.</text:span></text:p>
        </text:list-item>
        <text:list-item>
          <text:p text:style-name="P438" loext:marker-style-name="T5"><text:span text:style-name="T8">Name:</text:span><text:span text:style-name="T6"> altera-pedido-dlq-seu-nome. </text:span></text:p>
        </text:list-item>
        <text:list-item>
          <text:p text:style-name="P437" loext:marker-style-name="T5"><text:span text:style-name="T8">Create queue.</text:span></text:p>
        </text:list-item>
        <text:list-item>
          <text:p text:style-name="P439" loext:marker-style-name="T5"><text:span text:style-name="T6">Anote o ARN.</text:span></text:p>
        </text:list-item>
      </text:list>
      <text:list text:continue-list="list105243177694329" text:style-name="WWNum58">
        <text:list-item>
          <text:p text:style-name="P229" loext:marker-style-name="T5"><text:span text:style-name="T8">Crie a Fila Principal:</text:span></text:p>
        </text:list-item>
      </text:list>
      <text:list text:continue-list="list105243226332599" text:style-name="WWNum59">
        <text:list-item>
          <text:p text:style-name="P352" loext:marker-style-name="T5"><text:span text:style-name="T6">No menu lateral, clique em </text:span><text:span text:style-name="T8">“Queues”.</text:span></text:p>
        </text:list-item>
        <text:list-item>
          <text:p text:style-name="P353" loext:marker-style-name="T5"><text:span text:style-name="T8">Create queue.</text:span></text:p>
        </text:list-item>
        <text:list-item>
          <text:p text:style-name="P354" loext:marker-style-name="T5"><text:span text:style-name="T8">Type:</text:span><text:span text:style-name="T6"> Standard.</text:span></text:p>
        </text:list-item>
        <text:list-item>
          <text:p text:style-name="P353" loext:marker-style-name="T5"><text:span text:style-name="T8">Name:</text:span><text:span text:style-name="T6"> altera-pedido-queue-seu-nome.</text:span></text:p>
        </text:list-item>
        <text:list-item>
          <text:p text:style-name="P440" loext:marker-style-name="T5"><text:span text:style-name="T8">Visibility timeout:</text:span><text:span text:style-name="T6"> 70 segundos.</text:span></text:p>
        </text:list-item>
        <text:list-item>
          <text:p text:style-name="P441" loext:marker-style-name="T5"><text:span text:style-name="T8">Dead-letter queue:</text:span><text:span text:style-name="T6"> Enabled.</text:span></text:p>
        </text:list-item>
        <text:list-item>
          <text:p text:style-name="P442" loext:marker-style-name="T5"><text:span text:style-name="T8">Choose queue</text:span><text:span text:style-name="T6"> : Queue ARN da altera-pedido-dlq-seu-nome.</text:span></text:p>
        </text:list-item>
        <text:list-item>
          <text:p text:style-name="P443" loext:marker-style-name="T5"><text:span text:style-name="T8">Max receives:</text:span><text:span text:style-name="T6"> 3.</text:span></text:p>
        </text:list-item>
        <text:list-item>
          <text:p text:style-name="P444" loext:marker-style-name="T5"><text:span text:style-name="T6">Clique em "Create queue". </text:span></text:p>
        </text:list-item>
        <text:list-item>
          <text:p text:style-name="P444" loext:marker-style-name="T5"><text:span text:style-name="T6">Anote o ARN e a URL.</text:span></text:p>
        </text:list-item>
      </text:list>
      <text:p text:style-name="P22" loext:marker-style-name="T9"/>
      <text:h text:style-name="P9" text:outline-level="3" loext:marker-style-name="T11"><text:span text:style-name="T12">Conceder Permissão SQS </text:span></text:h>
      <text:p text:style-name="P12" loext:marker-style-name="T9"><text:span text:style-name="T6">Antes de criarmos a Lambda de alteração e adicionarmos seu trigger SQS, vamos garantir que sua IAM Role (lambda-altera-cancela-role-seu-nome) tenha as permissões para interagir com a fila altera-pedido-queue-seu-nome.</text:span></text:p>
      <text:list text:continue-list="list105243428944569" text:style-name="WWNum60">
        <text:list-item>
          <text:p text:style-name="P233" loext:marker-style-name="T5"><text:span text:style-name="T6">Acesse o serviço </text:span><text:span text:style-name="T8">IAM</text:span><text:span text:style-name="T6"> no Console AWS.</text:span></text:p>
        </text:list-item>
      </text:list>
      <text:list text:continue-list="list105243655169522" text:style-name="WWNum61">
        <text:list-item>
          <text:p text:style-name="P234" loext:marker-style-name="T5"><text:span text:style-name="T6">No menu à esquerda, clique em </text:span><text:span text:style-name="T8">"Roles"</text:span><text:span text:style-name="T6"> e encontre a role </text:span><text:span text:style-name="T8">lambda-altera-cancela-role-seu-nome</text:span><text:span text:style-name="T6">. Clique nela.</text:span></text:p>
        </text:list-item>
      </text:list>
      <text:list text:continue-list="list105243374426638" text:style-name="WWNum62">
        <text:list-item>
          <text:p text:style-name="P356" loext:marker-style-name="T5"><text:span text:style-name="T6">Na aba </text:span><text:span text:style-name="T8">"Permissions"</text:span><text:span text:style-name="T6">, sob "Permissions policies", clique em </text:span><text:span text:style-name="T8">"Add permissions"</text:span><text:span text:style-name="T6"> e selecione </text:span><text:span text:style-name="T8">"Create inline policy"</text:span><text:span text:style-name="T6">.</text:span></text:p>
        </text:list-item>
      </text:list>
      <text:list text:continue-list="list105243465658772" text:style-name="WWNum63">
        <text:list-item>
          <text:p text:style-name="P240" loext:marker-style-name="T5"><text:span text:style-name="T6">Selecione a aba </text:span><text:span text:style-name="T8">JSON</text:span><text:span text:style-name="T6">.</text:span></text:p>
        </text:list-item>
      </text:list>
      <text:list text:continue-list="list105243696575821" text:style-name="WWNum64">
        <text:list-item>
          <text:p text:style-name="P357" loext:marker-style-name="T5"><text:span text:style-name="T6">Remova a política existente e cole a política abaixo, modificando as seguintes informações:</text:span></text:p>
        </text:list-item>
      </text:list>
      <text:p text:style-name="P118" loext:marker-style-name="T9"/>
      <text:p text:style-name="P46" loext:marker-style-name="T9"><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p>
      <text:p text:style-name="P47" loext:marker-style-name="T9"><text:span text:style-name="T16">       </text:span><text:span text:style-name="T17">"sqs</text:span><text:span text:style-name="T16">:</text:span><text:span text:style-name="T17">ReceiveMessage"</text:span><text:span text:style-name="T16">,</text:span></text:p>
      <text:p text:style-name="P47" loext:marker-style-name="T9"><text:soft-page-break/><text:span text:style-name="T16">       </text:span><text:span text:style-name="T17">"sqs</text:span><text:span text:style-name="T16">:</text:span><text:span text:style-name="T17">DeleteMessage"</text:span><text:span text:style-name="T16">,</text:span></text:p>
      <text:p text:style-name="P47" loext:marker-style-name="T9"><text:span text:style-name="T16">       </text:span><text:span text:style-name="T17">"sqs</text:span><text:span text:style-name="T16">:</text:span><text:span text:style-name="T17">GetQueueAttributes"</text:span></text:p>
      <text:p text:style-name="P47" loext:marker-style-name="T9"><text:span text:style-name="T16">     ],</text:span></text:p>
      <text:p text:style-name="P47" loext:marker-style-name="T9"><text:span text:style-name="T16">     </text:span><text:span text:style-name="T17">"Resource"</text:span><text:span text:style-name="T16">: [</text:span></text:p>
      <text:p text:style-name="P47" loext:marker-style-name="T9"><text:span text:style-name="T16">       </text:span><text:span text:style-name="T17">"COLE AQUI O ARN DA SUA FILA altera</text:span><text:span text:style-name="T16">-</text:span><text:span text:style-name="T17">pedido</text:span><text:span text:style-name="T16">-</text:span><text:span text:style-name="T17">queue</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22" loext:marker-style-name="T9"/>
      <text:p text:style-name="P12" loext:marker-style-name="T9"><text:span text:style-name="T8">Caminho:</text:span><text:span text:style-name="T6"> IAM &gt; Roles &gt; lambda-altera-cancela-role-seu-nome</text:span></text:p>
      <text:list text:continue-list="list105242713494507" text:style-name="WWNum65">
        <text:list-item>
          <text:p text:style-name="P243" loext:marker-style-name="T5"><text:span text:style-name="T8">Next</text:span><text:span text:style-name="T6">.</text:span></text:p>
        </text:list-item>
      </text:list>
      <text:list text:continue-list="list105244788039933" text:style-name="WWNum66">
        <text:list-item>
          <text:p text:style-name="P362" loext:marker-style-name="T5"><text:span text:style-name="T6">Em </text:span><text:span text:style-name="T8">"Review policy"</text:span><text:span text:style-name="T6">: </text:span></text:p>
        </text:list-item>
      </text:list>
      <text:list text:continue-list="list105242786074173" text:style-name="WWNum67">
        <text:list-item>
          <text:p text:style-name="P363" loext:marker-style-name="T5"><text:span text:style-name="T8">Name:</text:span><text:span text:style-name="T6"> SQSReadAlteraTrigger-seu-nome.</text:span></text:p>
        </text:list-item>
      </text:list>
      <text:list text:continue-list="list105242828931260" text:style-name="WWNum68">
        <text:list-item>
          <text:p text:style-name="P247" loext:marker-style-name="T5"><text:span text:style-name="T6">Clique em </text:span><text:span text:style-name="T8">"Create policy"</text:span><text:span text:style-name="T6">.</text:span></text:p>
        </text:list-item>
      </text:list>
      <text:p text:style-name="P22" loext:marker-style-name="T9"/>
      <text:h text:style-name="P5" text:outline-level="3" loext:marker-style-name="T11"><text:span text:style-name="T12">Criar Lambda para Alteração (altera-pedido-lambda-seu-nome)</text:span></text:h>
      <text:list text:continue-list="list105243071070171" text:style-name="WWNum69">
        <text:list-item>
          <text:p text:style-name="P445" loext:marker-style-name="T5"><text:span text:style-name="T6">Acesse </text:span><text:span text:style-name="T8">AWS Lambda</text:span><text:span text:style-name="T6"> &gt; </text:span><text:span text:style-name="T8">"Create function"</text:span><text:span text:style-name="T6"> &gt; "Author from scratch".</text:span></text:p>
        </text:list-item>
      </text:list>
      <text:list text:continue-list="list105243273098997" text:style-name="WWNum70">
        <text:list-item>
          <text:p text:style-name="P371" loext:marker-style-name="T5"><text:span text:style-name="T8">Function name:</text:span><text:span text:style-name="T6"> altera-pedido-lambda-seu-nome.</text:span></text:p>
        </text:list-item>
      </text:list>
      <text:list text:continue-list="list105243929686081" text:style-name="WWNum71">
        <text:list-item>
          <text:p text:style-name="P250" loext:marker-style-name="T5"><text:span text:style-name="T8">Runtime:</text:span><text:span text:style-name="T6"> Python 3.12.</text:span></text:p>
        </text:list-item>
      </text:list>
      <text:list text:continue-list="list105242923347289" text:style-name="WWNum72">
        <text:list-item>
          <text:p text:style-name="P251" loext:marker-style-name="T5"><text:span text:style-name="T6">Use a role lambda-altera-cancela-role-seu-nome.</text:span></text:p>
        </text:list-item>
      </text:list>
      <text:list text:continue-list="list105244130484898" text:style-name="WWNum73">
        <text:list-item>
          <text:p text:style-name="P252" loext:marker-style-name="T5"><text:span text:style-name="T6">Clique em </text:span><text:span text:style-name="T8">"Create function"</text:span><text:span text:style-name="T6">.</text:span></text:p>
        </text:list-item>
      </text:list>
      <text:list text:continue-list="list105244009253738" text:style-name="WWNum74">
        <text:list-item>
          <text:p text:style-name="P253" loext:marker-style-name="T5"><text:span text:style-name="T6">Na página da função, rola para baixo, até a aba </text:span><text:span text:style-name="T8">"Code"</text:span><text:span text:style-name="T6">, substitua lambda_function.py pelo código Python que você encontra abaixo:</text:span></text:p>
        </text:list-item>
      </text:list>
      <text:p text:style-name="P44" loext:marker-style-name="T9"/>
      <text:p text:style-name="P96" loext:marker-style-name="T9"><text:span text:style-name="T35">import</text:span><text:span text:style-name="T36"> json</text:span></text:p>
      <text:p text:style-name="P97" loext:marker-style-name="T9"><text:span text:style-name="T35">import</text:span><text:span text:style-name="T36"> os</text:span></text:p>
      <text:p text:style-name="P97" loext:marker-style-name="T9"><text:span text:style-name="T35">import</text:span><text:span text:style-name="T36"> boto3</text:span></text:p>
      <text:p text:style-name="P97" loext:marker-style-name="T9"><text:span text:style-name="T35">from</text:span><text:span text:style-name="T36"> datetime </text:span><text:span text:style-name="T35">import</text:span><text:span text:style-name="T36"> datetime</text:span></text:p>
      <text:p text:style-name="P446" loext:marker-style-name="T9"/>
      <text:p text:style-name="P97" loext:marker-style-name="T9"><text:span text:style-name="T36">DYNAMODB_TABLE_NAME = os.environ[</text:span><text:span text:style-name="T38">'DYNAMODB_TABLE_NAME'</text:span><text:span text:style-name="T36">]</text:span></text:p>
      <text:p text:style-name="P97" loext:marker-style-name="T9"><text:span text:style-name="T36">dynamodb = boto3.resource(</text:span><text:span text:style-name="T38">'dynamodb'</text:span><text:span text:style-name="T36">)</text:span></text:p>
      <text:p text:style-name="P97" loext:marker-style-name="T9"><text:span text:style-name="T36">table = dynamodb.Table(DYNAMODB_TABLE_NAME)</text:span></text:p>
      <text:p text:style-name="P446" loext:marker-style-name="T9"/>
      <text:p text:style-name="P97" loext:marker-style-name="T9"><text:span text:style-name="T35">def</text:span><text:span text:style-name="T36"> lambda_handler(</text:span><text:span text:style-name="T35">event</text:span><text:span text:style-name="T36">, context):</text:span></text:p>
      <text:p text:style-name="P97" loext:marker-style-name="T9"><text:span text:style-name="T36">   </text:span><text:span text:style-name="T35">print</text:span><text:span text:style-name="T36">(f</text:span><text:span text:style-name="T38">"Evento SQS </text:span><text:span text:style-name="T36">(</text:span><text:span text:style-name="T38">alteração</text:span><text:span text:style-name="T36">)</text:span><text:span text:style-name="T38"> recebido</text:span><text:span text:style-name="T36">:</text:span><text:span text:style-name="T38"> </text:span><text:span text:style-name="T36">{</text:span><text:span text:style-name="T38">event</text:span><text:span text:style-name="T36">}</text:span><text:span text:style-name="T38">"</text:span><text:span text:style-name="T36">)</text:span></text:p>
      <text:p text:style-name="P97" loext:marker-style-name="T9"><text:span text:style-name="T36">   </text:span><text:span text:style-name="T35">for</text:span><text:span text:style-name="T36"> record </text:span><text:span text:style-name="T35">in</text:span><text:span text:style-name="T36"> event[</text:span><text:span text:style-name="T38">'Records'</text:span><text:span text:style-name="T36">]:</text:span></text:p>
      <text:p text:style-name="P97" loext:marker-style-name="T9"><text:span text:style-name="T36">       pedido_id = None</text:span></text:p>
      <text:p text:style-name="P97" loext:marker-style-name="T9"><text:span text:style-name="T36">       </text:span><text:span text:style-name="T35">try</text:span><text:span text:style-name="T36">:</text:span></text:p>
      <text:p text:style-name="P97" loext:marker-style-name="T9"><text:span text:style-name="T36">           eventbridge_event = json.loads(record[</text:span><text:span text:style-name="T38">'body'</text:span><text:span text:style-name="T36">])</text:span></text:p>
      <text:p text:style-name="P97" loext:marker-style-name="T9"><text:span text:style-name="T36">           </text:span><text:span text:style-name="T35">print</text:span><text:span text:style-name="T36">(f</text:span><text:span text:style-name="T38">"Evento EventBridge recebido via SQS</text:span><text:span text:style-name="T36">:</text:span><text:span text:style-name="T38"> </text:span><text:span text:style-name="T36">{</text:span><text:span text:style-name="T38">eventbridge_event</text:span><text:span text:style-name="T36">}</text:span><text:span text:style-name="T38">"</text:span><text:span text:style-name="T36">)</text:span></text:p>
      <text:p text:style-name="P97" loext:marker-style-name="T9"><text:span text:style-name="T36">           </text:span><text:span text:style-name="T35">if</text:span><text:span text:style-name="T36"> </text:span><text:span text:style-name="T38">'detail'</text:span><text:span text:style-name="T36"> </text:span><text:span text:style-name="T35">not</text:span><text:span text:style-name="T36"> </text:span><text:span text:style-name="T35">in</text:span><text:span text:style-name="T36"> eventbridge_event:</text:span></text:p>
      <text:p text:style-name="P97" loext:marker-style-name="T9"><text:span text:style-name="T36">               </text:span><text:span text:style-name="T35">print</text:span><text:span text:style-name="T36">(f</text:span><text:span text:style-name="T38">"Erro</text:span><text:span text:style-name="T36">:</text:span><text:span text:style-name="T38"> Campo 'detail' não encontrado no evento</text:span><text:span text:style-name="T36">:</text:span><text:span text:style-name="T38"> </text:span><text:span text:style-name="T36">{</text:span><text:span text:style-name="T38">eventbridge_event</text:span><text:span text:style-name="T36">}</text:span><text:span text:style-name="T38">"</text:span><text:span text:style-name="T36">)</text:span></text:p>
      <text:p text:style-name="P97" loext:marker-style-name="T9"><text:span text:style-name="T36">               </text:span><text:span text:style-name="T35">continue</text:span></text:p>
      <text:p text:style-name="P446" loext:marker-style-name="T9"><text:soft-page-break/></text:p>
      <text:p text:style-name="P97" loext:marker-style-name="T9"><text:span text:style-name="T36">           pedido_data = eventbridge_event[</text:span><text:span text:style-name="T38">'detail'</text:span><text:span text:style-name="T36">]</text:span></text:p>
      <text:p text:style-name="P97" loext:marker-style-name="T9"><text:span text:style-name="T36">           pedido_id = pedido_data.</text:span><text:span text:style-name="T35">get</text:span><text:span text:style-name="T36">(</text:span><text:span text:style-name="T38">'pedidoId'</text:span><text:span text:style-name="T36">)</text:span></text:p>
      <text:p text:style-name="P97" loext:marker-style-name="T9"><text:span text:style-name="T36">           </text:span><text:span text:style-name="T37"># Espera-se que o evento de alteração contenha os novos itens</text:span></text:p>
      <text:p text:style-name="P97" loext:marker-style-name="T9"><text:span text:style-name="T36">           novos_itens = pedido_data.</text:span><text:span text:style-name="T35">get</text:span><text:span text:style-name="T36">(</text:span><text:span text:style-name="T38">'novosItens'</text:span><text:span text:style-name="T36">)</text:span></text:p>
      <text:p text:style-name="P446" loext:marker-style-name="T9"/>
      <text:p text:style-name="P97" loext:marker-style-name="T9"><text:span text:style-name="T36">           </text:span><text:span text:style-name="T35">if</text:span><text:span text:style-name="T36"> </text:span><text:span text:style-name="T35">not</text:span><text:span text:style-name="T36"> pedido_id </text:span><text:span text:style-name="T35">or</text:span><text:span text:style-name="T36"> novos_itens </text:span><text:span text:style-name="T35">is</text:span><text:span text:style-name="T36"> None:  </text:span><text:span text:style-name="T37"># Checa se novosItens está presente, mesmo que seja lista vazia</text:span></text:p>
      <text:p text:style-name="P97" loext:marker-style-name="T9"><text:span text:style-name="T36">               </text:span><text:span text:style-name="T35">print</text:span><text:span text:style-name="T36">(f</text:span><text:span text:style-name="T38">"Erro</text:span><text:span text:style-name="T36">:</text:span><text:span text:style-name="T38"> pedidoId ou novosItens não encontrados nos detalhes do evento</text:span><text:span text:style-name="T36">:</text:span><text:span text:style-name="T38"> </text:span><text:span text:style-name="T36">{</text:span><text:span text:style-name="T38">pedido_data</text:span><text:span text:style-name="T36">}</text:span><text:span text:style-name="T38">"</text:span><text:span text:style-name="T36">)</text:span></text:p>
      <text:p text:style-name="P97" loext:marker-style-name="T9"><text:span text:style-name="T36">               </text:span><text:span text:style-name="T35">continue</text:span></text:p>
      <text:p text:style-name="P446" loext:marker-style-name="T9"/>
      <text:p text:style-name="P97" loext:marker-style-name="T9"><text:span text:style-name="T36">           </text:span><text:span text:style-name="T35">print</text:span><text:span text:style-name="T36">(f</text:span><text:span text:style-name="T38">"Processando alteração para pedido</text:span><text:span text:style-name="T36">:</text:span><text:span text:style-name="T38"> </text:span><text:span text:style-name="T36">{</text:span><text:span text:style-name="T38">pedido_id</text:span><text:span text:style-name="T36">}</text:span><text:span text:style-name="T38"> com novos itens</text:span><text:span text:style-name="T36">:</text:span><text:span text:style-name="T38"> </text:span><text:span text:style-name="T36">{</text:span><text:span text:style-name="T38">novos_itens</text:span><text:span text:style-name="T36">}</text:span><text:span text:style-name="T38">"</text:span><text:span text:style-name="T36">)</text:span></text:p>
      <text:p text:style-name="P446" loext:marker-style-name="T9"/>
      <text:p text:style-name="P97" loext:marker-style-name="T9"><text:span text:style-name="T36">           </text:span><text:span text:style-name="T37"># Atualizar itens e status no DynamoDB</text:span></text:p>
      <text:p text:style-name="P97" loext:marker-style-name="T9"><text:span text:style-name="T36">           response = table.update_item(</text:span></text:p>
      <text:p text:style-name="P97" loext:marker-style-name="T9"><text:span text:style-name="T36">               Key={</text:span><text:span text:style-name="T38">'pedidoId'</text:span><text:span text:style-name="T36">: str(pedido_id)},</text:span></text:p>
      <text:p text:style-name="P97" loext:marker-style-name="T9"><text:span text:style-name="T36">               UpdateExpression=</text:span><text:span text:style-name="T38">"SET itens </text:span><text:span text:style-name="T36">=</text:span><text:span text:style-name="T38"> </text:span><text:span text:style-name="T36">:</text:span><text:span text:style-name="T38">i</text:span><text:span text:style-name="T36">,</text:span><text:span text:style-name="T38"> statusPedido </text:span><text:span text:style-name="T36">=</text:span><text:span text:style-name="T38"> </text:span><text:span text:style-name="T36">:</text:span><text:span text:style-name="T38">s</text:span><text:span text:style-name="T36">,</text:span><text:span text:style-name="T38"> timestampAtualizacao </text:span><text:span text:style-name="T36">=</text:span><text:span text:style-name="T38"> </text:span><text:span text:style-name="T36">:</text:span><text:span text:style-name="T38">ts"</text:span><text:span text:style-name="T36">,</text:span></text:p>
      <text:p text:style-name="P97" loext:marker-style-name="T9"><text:span text:style-name="T36">               ExpressionAttributeValues={</text:span></text:p>
      <text:p text:style-name="P97" loext:marker-style-name="T9"><text:span text:style-name="T36">                   </text:span><text:span text:style-name="T38">'</text:span><text:span text:style-name="T36">:</text:span><text:span text:style-name="T38">i'</text:span><text:span text:style-name="T36">: novos_itens,  </text:span><text:span text:style-name="T37"># Assume que novosItens já está no formato correto</text:span></text:p>
      <text:p text:style-name="P97" loext:marker-style-name="T9"><text:span text:style-name="T36">                   </text:span><text:span text:style-name="T38">'</text:span><text:span text:style-name="T36">:</text:span><text:span text:style-name="T38">s'</text:span><text:span text:style-name="T36">: </text:span><text:span text:style-name="T38">'ALTERADO'</text:span><text:span text:style-name="T36">,</text:span></text:p>
      <text:p text:style-name="P97" loext:marker-style-name="T9"><text:span text:style-name="T36">                   </text:span><text:span text:style-name="T38">'</text:span><text:span text:style-name="T36">:</text:span><text:span text:style-name="T38">ts'</text:span><text:span text:style-name="T36">: datetime.utcnow().isoformat() + </text:span><text:span text:style-name="T38">"Z"</text:span></text:p>
      <text:p text:style-name="P97" loext:marker-style-name="T9"><text:span text:style-name="T36">               },</text:span></text:p>
      <text:p text:style-name="P97" loext:marker-style-name="T9"><text:span text:style-name="T36">               ReturnValues=</text:span><text:span text:style-name="T38">"UPDATED_NEW"</text:span></text:p>
      <text:p text:style-name="P97" loext:marker-style-name="T9"><text:span text:style-name="T36">           )</text:span></text:p>
      <text:p text:style-name="P97" loext:marker-style-name="T9"><text:span text:style-name="T36">           </text:span><text:span text:style-name="T35">print</text:span><text:span text:style-name="T36">(f</text:span><text:span text:style-name="T38">"Pedido </text:span><text:span text:style-name="T36">{</text:span><text:span text:style-name="T38">pedido_id</text:span><text:span text:style-name="T36">}</text:span><text:span text:style-name="T38"> atualizado para ALTERADO</text:span><text:span text:style-name="T36">.</text:span><text:span text:style-name="T38"> Resposta DynamoDB</text:span><text:span text:style-name="T36">:</text:span><text:span text:style-name="T38"> </text:span><text:span text:style-name="T36">{</text:span><text:span text:style-name="T38">response</text:span><text:span text:style-name="T36">}</text:span><text:span text:style-name="T38">"</text:span><text:span text:style-name="T36">)</text:span></text:p>
      <text:p text:style-name="P446" loext:marker-style-name="T9"/>
      <text:p text:style-name="P97" loext:marker-style-name="T9"><text:span text:style-name="T36">       </text:span><text:span text:style-name="T35">except</text:span><text:span text:style-name="T36"> json.JSONDecodeError </text:span><text:span text:style-name="T35">as</text:span><text:span text:style-name="T36"> je:</text:span></text:p>
      <text:p text:style-name="P97" loext:marker-style-name="T9"><text:span text:style-name="T36">           </text:span><text:span text:style-name="T35">print</text:span><text:span text:style-name="T36">(f</text:span><text:span text:style-name="T38">"Erro de JSON ao processar registro </text:span><text:span text:style-name="T36">{</text:span><text:span text:style-name="T38">record</text:span><text:span text:style-name="T36">[</text:span><text:span text:style-name="T38">'messageId'</text:span><text:span text:style-name="T36">]}:</text:span><text:span text:style-name="T38"> </text:span><text:span text:style-name="T36">{</text:span><text:span text:style-name="T38">str</text:span><text:span text:style-name="T36">(</text:span><text:span text:style-name="T38">je</text:span><text:span text:style-name="T36">)}</text:span><text:span text:style-name="T38">"</text:span><text:span text:style-name="T36">)</text:span></text:p>
      <text:p text:style-name="P97" loext:marker-style-name="T9"><text:span text:style-name="T36">           </text:span><text:span text:style-name="T35">raise</text:span><text:span text:style-name="T36"> je</text:span></text:p>
      <text:p text:style-name="P97" loext:marker-style-name="T9"><text:span text:style-name="T36">       </text:span><text:span text:style-name="T35">except</text:span><text:span text:style-name="T36"> Exception </text:span><text:span text:style-name="T35">as</text:span><text:span text:style-name="T36"> e:</text:span></text:p>
      <text:p text:style-name="P97" loext:marker-style-name="T9"><text:span text:style-name="T36">           </text:span><text:span text:style-name="T35">print</text:span><text:span text:style-name="T36">(f</text:span><text:span text:style-name="T38">"Erro geral ao processar alteração </text:span><text:span text:style-name="T36">{</text:span><text:span text:style-name="T38">record</text:span><text:span text:style-name="T36">[</text:span><text:span text:style-name="T38">'messageId'</text:span><text:span text:style-name="T36">]}</text:span><text:span text:style-name="T38"> </text:span><text:span text:style-name="T36">(</text:span><text:span text:style-name="T38">pedidoId</text:span><text:span text:style-name="T36">:</text:span><text:span text:style-name="T38"> </text:span><text:span text:style-name="T36">{</text:span><text:span text:style-name="T38">pedido_id</text:span><text:span text:style-name="T36">}):</text:span><text:span text:style-name="T38"> </text:span><text:span text:style-name="T36">{</text:span><text:span text:style-name="T38">str</text:span><text:span text:style-name="T36">(</text:span><text:span text:style-name="T38">e</text:span><text:span text:style-name="T36">)}</text:span><text:span text:style-name="T38">"</text:span><text:span text:style-name="T36">)</text:span></text:p>
      <text:p text:style-name="P97" loext:marker-style-name="T9"><text:span text:style-name="T36">           </text:span><text:span text:style-name="T35">raise</text:span><text:span text:style-name="T36"> e</text:span></text:p>
      <text:p text:style-name="P98" loext:marker-style-name="T9"><text:span text:style-name="T36">   </text:span><text:span text:style-name="T35">return</text:span><text:span text:style-name="T36"> {</text:span><text:span text:style-name="T38">'statusCode'</text:span><text:span text:style-name="T36">: </text:span><text:span text:style-name="T39">200</text:span><text:span text:style-name="T36">, </text:span><text:span text:style-name="T38">'body'</text:span><text:span text:style-name="T36">: </text:span><text:span text:style-name="T38">'Processamento de alterações concluído'</text:span><text:span text:style-name="T36">}</text:span></text:p>
      <text:p text:style-name="P44" loext:marker-style-name="T9"/>
      <text:list text:continue-list="list105243692627155" text:style-name="WWNum75">
        <text:list-item>
          <text:p text:style-name="P254" loext:marker-style-name="T5"><text:span text:style-name="T6">Clique em </text:span><text:span text:style-name="T8">"Deploy"</text:span><text:span text:style-name="T6">.</text:span></text:p>
        </text:list-item>
        <text:list-item>
          <text:p text:style-name="P447" loext:marker-style-name="T5"><text:span text:style-name="T6">Configure Variáveis de Ambiente. Vá para a aba </text:span><text:span text:style-name="T8">"Configuration"</text:span><text:span text:style-name="T6"> &gt; </text:span><text:span text:style-name="T8">"Environment variables"</text:span><text:span text:style-name="T6"> &gt; </text:span><text:span text:style-name="T8">"Edit"</text:span><text:span text:style-name="T6"> &gt; </text:span><text:span text:style-name="T8">"Add environment variable"</text:span><text:span text:style-name="T6">.</text:span></text:p>
        </text:list-item>
      </text:list>
      <text:list text:continue-list="list105243302965524" text:style-name="WWNum76">
        <text:list-item>
          <text:p text:style-name="P448" loext:marker-style-name="T5"><text:span text:style-name="T6">Adicione:</text:span></text:p>
        </text:list-item>
      </text:list>
      <text:list text:continue-list="list105243637880518" text:style-name="WWNum77">
        <text:list-item>
          <text:p text:style-name="P449" loext:marker-style-name="T5"><text:span text:style-name="T6">Key: </text:span><text:span text:style-name="T8">DYNAMODB_TABLE_NAME</text:span></text:p>
        </text:list-item>
        <text:list-item>
          <text:p text:style-name="P450" loext:marker-style-name="T5"><text:span text:style-name="T6">Value:</text:span><text:span text:style-name="T8"> pedidos-db-seu-nome</text:span></text:p>
        </text:list-item>
      </text:list>
      <text:list text:continue-list="list105243438538745" text:style-name="WWNum78">
        <text:list-item>
          <text:p text:style-name="P451" loext:marker-style-name="T5"><text:span text:style-name="T6">Save.</text:span></text:p>
        </text:list-item>
      </text:list>
      <text:list text:continue-list="list105243631415523" text:style-name="WWNum79">
        <text:list-item>
          <text:p text:style-name="P452" loext:marker-style-name="T5"><text:span text:style-name="T6">Ainda na aba </text:span><text:span text:style-name="T8">"Configuration"</text:span><text:span text:style-name="T6">, selecione </text:span><text:span text:style-name="T8">"General configuration"</text:span><text:span text:style-name="T6"> &gt; </text:span><text:span text:style-name="T8">"Edit"</text:span><text:span text:style-name="T6">.</text:span></text:p>
        </text:list-item>
        <text:list-item>
          <text:p text:style-name="P453" loext:marker-style-name="T5"><text:soft-page-break/><text:span text:style-name="T6">Configure </text:span><text:span text:style-name="T8">Timeout</text:span><text:span text:style-name="T6">:</text:span></text:p>
        </text:list-item>
      </text:list>
      <text:list text:continue-list="list105243222250666" text:style-name="WWNum80">
        <text:list-item>
          <text:p text:style-name="P454" loext:marker-style-name="T5"><text:span text:style-name="T6">Defina </text:span><text:span text:style-name="T8">Timeout </text:span><text:span text:style-name="T6">para 60 segundos. </text:span></text:p>
        </text:list-item>
        <text:list-item>
          <text:p text:style-name="P455" loext:marker-style-name="T5"><text:span text:style-name="T6">Save.</text:span></text:p>
        </text:list-item>
      </text:list>
      <text:list text:continue-list="list105243422332957" text:style-name="WWNum81">
        <text:list-item>
          <text:p text:style-name="P456" loext:marker-style-name="T5"><text:span text:style-name="T6">Adicione Trigger SQS. Vá para </text:span><text:span text:style-name="T8">"Configuration"</text:span><text:span text:style-name="T6"> &gt; </text:span><text:span text:style-name="T8">"Triggers"</text:span><text:span text:style-name="T6"> &gt; </text:span><text:span text:style-name="T8">"Add trigger"</text:span><text:span text:style-name="T6">.</text:span></text:p>
        </text:list-item>
      </text:list>
      <text:list text:continue-list="list105243201374819" text:style-name="WWNum82">
        <text:list-item>
          <text:p text:style-name="P457" loext:marker-style-name="T5"><text:span text:style-name="T8">Trigger configuration:</text:span><text:span text:style-name="T6"> SQS.</text:span></text:p>
        </text:list-item>
        <text:list-item>
          <text:p text:style-name="P458" loext:marker-style-name="T5"><text:span text:style-name="T8">SQS queue:</text:span><text:span text:style-name="T6"> altera-pedido-queue-seu-nome.</text:span></text:p>
        </text:list-item>
        <text:list-item>
          <text:p text:style-name="P459" loext:marker-style-name="T5"><text:span text:style-name="T8">Batch size:</text:span><text:span text:style-name="T6"> 1. </text:span></text:p>
        </text:list-item>
        <text:list-item>
          <text:p text:style-name="P460" loext:marker-style-name="T5"><text:span text:style-name="T8">Add</text:span><text:span text:style-name="T6">.</text:span></text:p>
        </text:list-item>
      </text:list>
      <text:p text:style-name="P22" loext:marker-style-name="T9"/>
      <text:h text:style-name="P5" text:outline-level="3" loext:marker-style-name="T11"><text:span text:style-name="T12">Criar Regra no EventBridge para Alteração (altera-pedido-rule-seu-nome)</text:span></text:h>
      <text:list text:continue-list="list105244296780899" text:style-name="WWNum83">
        <text:list-item>
          <text:p text:style-name="P263" loext:marker-style-name="T5"><text:span text:style-name="T6">Acesse </text:span><text:span text:style-name="T8">Amazon EventBridge</text:span><text:span text:style-name="T6"> &gt; </text:span><text:span text:style-name="T8">"Rules"</text:span><text:span text:style-name="T6">.</text:span></text:p>
        </text:list-item>
      </text:list>
      <text:list text:continue-list="list105243774715985" text:style-name="WWNum84">
        <text:list-item>
          <text:p text:style-name="P264" loext:marker-style-name="T5"><text:span text:style-name="T6">Selecione o </text:span><text:span text:style-name="T8">Event Bus</text:span><text:span text:style-name="T6">: pedidos-event-bus-seu-nome.</text:span></text:p>
        </text:list-item>
      </text:list>
      <text:list text:continue-list="list105243134192746" text:style-name="WWNum85">
        <text:list-item>
          <text:p text:style-name="P461" loext:marker-style-name="T5"><text:span text:style-name="T6">Clique em </text:span><text:span text:style-name="T8">"Create rule"</text:span><text:span text:style-name="T6">.</text:span></text:p>
        </text:list-item>
      </text:list>
      <text:list text:continue-list="list105242847074280" text:style-name="WWNum86">
        <text:list-item>
          <text:p text:style-name="P270" loext:marker-style-name="T5"><text:span text:style-name="T8">Name:</text:span><text:span text:style-name="T6"> altera-pedido-rule-seu-nome.</text:span></text:p>
        </text:list-item>
      </text:list>
      <text:list text:continue-list="list105243739624432" text:style-name="WWNum87">
        <text:list-item>
          <text:p text:style-name="P462" loext:marker-style-name="T5"><text:span text:style-name="T8">Rule type:</text:span><text:span text:style-name="T6"> "Rule with an event pattern". </text:span></text:p>
        </text:list-item>
      </text:list>
      <text:list text:continue-list="list105243374677431" text:style-name="WWNum88">
        <text:list-item>
          <text:p text:style-name="P275" loext:marker-style-name="T5"><text:span text:style-name="T8">Next.</text:span></text:p>
        </text:list-item>
      </text:list>
      <text:list text:continue-list="list105244585593490" text:style-name="WWNum89">
        <text:list-item>
          <text:p text:style-name="P276" loext:marker-style-name="T5"><text:span text:style-name="T6">Desça até</text:span><text:span text:style-name="T8"> Event pattern </text:span><text:span text:style-name="T6">e selecione </text:span><text:span text:style-name="T8">"Custom patterns (JSON editor)"</text:span><text:span text:style-name="T6">.</text:span></text:p>
        </text:list-item>
      </text:list>
      <text:list text:continue-list="list105244477722174" text:style-name="WWNum90">
        <text:list-item>
          <text:p text:style-name="P277" loext:marker-style-name="T5"><text:span text:style-name="T8">Cole:</text:span></text:p>
        </text:list-item>
      </text:list>
      <text:p text:style-name="P118" loext:marker-style-name="T9"/>
      <text:p text:style-name="P96" loext:marker-style-name="T9"><text:span text:style-name="T16">{</text:span></text:p>
      <text:p text:style-name="P97" loext:marker-style-name="T9"><text:span text:style-name="T16"> </text:span><text:span text:style-name="T17">"source"</text:span><text:span text:style-name="T16">: [</text:span><text:span text:style-name="T17">"lab</text:span><text:span text:style-name="T16">.</text:span><text:span text:style-name="T17">aula4</text:span><text:span text:style-name="T16">.</text:span><text:span text:style-name="T17">operacoes"</text:span><text:span text:style-name="T16">],</text:span></text:p>
      <text:p text:style-name="P97" loext:marker-style-name="T9"><text:span text:style-name="T16"> </text:span><text:span text:style-name="T17">"detail</text:span><text:span text:style-name="T16">-</text:span><text:span text:style-name="T17">type"</text:span><text:span text:style-name="T16">: [</text:span><text:span text:style-name="T17">"AlterarPedido"</text:span><text:span text:style-name="T16">]</text:span></text:p>
      <text:p text:style-name="P463" loext:marker-style-name="T9"><text:span text:style-name="T16">}</text:span></text:p>
      <text:p text:style-name="P118" loext:marker-style-name="T9"/>
      <text:list text:continue-list="list105242780028475" text:style-name="WWNum91">
        <text:list-item>
          <text:p text:style-name="P278" loext:marker-style-name="T5"><text:span text:style-name="T8">Next.</text:span></text:p>
        </text:list-item>
      </text:list>
      <text:list text:continue-list="list105244785073913" text:style-name="WWNum92">
        <text:list-item>
          <text:p text:style-name="P464" loext:marker-style-name="T5"><text:span text:style-name="T8">Target types: </text:span><text:span text:style-name="T6">AWS service.</text:span></text:p>
        </text:list-item>
      </text:list>
      <text:list text:continue-list="list105242769645896" text:style-name="WWNum93">
        <text:list-item>
          <text:p text:style-name="P465" loext:marker-style-name="T5"><text:span text:style-name="T8">Select a target:</text:span><text:span text:style-name="T6"> SQS queue.</text:span></text:p>
        </text:list-item>
      </text:list>
      <text:list text:continue-list="list105242789707074" text:style-name="WWNum94">
        <text:list-item>
          <text:p text:style-name="P466" loext:marker-style-name="T5"><text:span text:style-name="T8">Queue:</text:span><text:span text:style-name="T6"> altera-pedido-queue-seu-nome. </text:span></text:p>
        </text:list-item>
      </text:list>
      <text:list text:continue-list="list105243031872906" text:style-name="WWNum95">
        <text:list-item>
          <text:p text:style-name="P467" loext:marker-style-name="T5"><text:span text:style-name="T8">Next.</text:span></text:p>
        </text:list-item>
      </text:list>
      <text:list text:continue-list="list105243783411508" text:style-name="WWNum96">
        <text:list-item>
          <text:p text:style-name="P468" loext:marker-style-name="T5"><text:span text:style-name="T6">Pule tags (Next).</text:span></text:p>
        </text:list-item>
      </text:list>
      <text:list text:continue-list="list35541563" text:style-name="WWNum97">
        <text:list-item>
          <text:p text:style-name="P469" loext:marker-style-name="T5"><text:span text:style-name="T8">"Create rule"</text:span><text:span text:style-name="T6">.</text:span></text:p>
        </text:list-item>
      </text:list>
      <text:p text:style-name="P10" loext:marker-style-name="T9"><draw:custom-shape text:anchor-type="as-char" draw:z-index="33" draw:name="AutoShape 26"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26">Atualizar Permissões da Role de Alteração/Cancelamento</text:span></text:h>
      <text:p text:style-name="P12" loext:marker-style-name="T9"><text:span text:style-name="T6">Agora concederemos as permissões SQS e DynamoDB necessárias à role lambda-altera-cancela-role-seu-nome.</text:span></text:p>
      <text:list text:continue-list="list805517697" text:style-name="WWNum98">
        <text:list-item>
          <text:p text:style-name="P470" loext:marker-style-name="T5"><text:soft-page-break/><text:span text:style-name="T6">Vá para </text:span><text:span text:style-name="T8">IAM</text:span><text:span text:style-name="T6"> &gt; </text:span><text:span text:style-name="T8">Roles</text:span><text:span text:style-name="T6"> &gt; lambda-altera-cancela-role-seu-nome.</text:span></text:p>
        </text:list-item>
        <text:list-item>
          <text:p text:style-name="P470" loext:marker-style-name="T5"><text:span text:style-name="T6">Na aba </text:span><text:span text:style-name="T8">"Permissions"</text:span><text:span text:style-name="T6"> &gt; </text:span><text:span text:style-name="T8">"Add permissions"</text:span><text:span text:style-name="T6"> &gt; </text:span><text:span text:style-name="T8">"Create inline policy"</text:span><text:span text:style-name="T6">.</text:span></text:p>
        </text:list-item>
        <text:list-item>
          <text:p text:style-name="P470" loext:marker-style-name="T5"><text:span text:style-name="T6">Selecione a aba </text:span><text:span text:style-name="T8">JSON</text:span><text:span text:style-name="T6">.</text:span></text:p>
        </text:list-item>
        <text:list-item>
          <text:p text:style-name="P470" loext:marker-style-name="T5"><text:span text:style-name="T6">Remova a política existente e cole a política abaixo, modificando as seguintes informações:</text:span></text:p>
        </text:list-item>
      </text:list>
      <text:p text:style-name="P44" loext:marker-style-name="T9"/>
      <text:p text:style-name="P46" loext:marker-style-name="T9"><text:span text:style-name="T16">{</text:span></text:p>
      <text:p text:style-name="P47" loext:marker-style-name="T9"><text:span text:style-name="T16"> </text:span><text:span text:style-name="T17">"Version"</text:span><text:span text:style-name="T16">: </text:span><text:span text:style-name="T17">"2012</text:span><text:span text:style-name="T16">-</text:span><text:span text:style-name="T17">10</text:span><text:span text:style-name="T16">-</text:span><text:span text:style-name="T17">17"</text:span><text:span text:style-name="T16">,</text:span></text:p>
      <text:p text:style-name="P47" loext:marker-style-name="T9"><text:span text:style-name="T16"> </text:span><text:span text:style-name="T17">"Statement"</text:span><text:span text:style-name="T16">: [</text:span></text:p>
      <text:p text:style-name="P47" loext:marker-style-name="T9"><text:span text:style-name="T16">   {</text:span></text:p>
      <text:p text:style-name="P47" loext:marker-style-name="T9"><text:span text:style-name="T16">     </text:span><text:span text:style-name="T17">"Effect"</text:span><text:span text:style-name="T16">: </text:span><text:span text:style-name="T17">"Allow"</text:span><text:span text:style-name="T16">,</text:span></text:p>
      <text:p text:style-name="P47" loext:marker-style-name="T9"><text:span text:style-name="T16">     </text:span><text:span text:style-name="T17">"Action"</text:span><text:span text:style-name="T16">: [</text:span></text:p>
      <text:p text:style-name="P47" loext:marker-style-name="T9"><text:span text:style-name="T16">       </text:span><text:span text:style-name="T17">"dynamodb</text:span><text:span text:style-name="T16">:</text:span><text:span text:style-name="T17">UpdateItem"</text:span><text:span text:style-name="T16">,</text:span></text:p>
      <text:p text:style-name="P47" loext:marker-style-name="T9"><text:span text:style-name="T16">       </text:span><text:span text:style-name="T17">"dynamodb</text:span><text:span text:style-name="T16">:</text:span><text:span text:style-name="T17">GetItem"</text:span></text:p>
      <text:p text:style-name="P47" loext:marker-style-name="T9"><text:span text:style-name="T16">     ],</text:span></text:p>
      <text:p text:style-name="P47" loext:marker-style-name="T9"><text:span text:style-name="T16">     </text:span><text:span text:style-name="T17">"Resource"</text:span><text:span text:style-name="T16">: </text:span><text:span text:style-name="T17">"COLE AQUI O ARN DA SUA TABELA pedidos</text:span><text:span text:style-name="T16">-</text:span><text:span text:style-name="T17">db</text:span><text:span text:style-name="T16">-</text:span><text:span text:style-name="T17">seu</text:span><text:span text:style-name="T16">-</text:span><text:span text:style-name="T17">nome"</text:span></text:p>
      <text:p text:style-name="P47" loext:marker-style-name="T9"><text:span text:style-name="T16">   }</text:span></text:p>
      <text:p text:style-name="P47" loext:marker-style-name="T9"><text:span text:style-name="T16"> ]</text:span></text:p>
      <text:p text:style-name="P48" loext:marker-style-name="T9"><text:span text:style-name="T16">}</text:span></text:p>
      <text:p text:style-name="P44" loext:marker-style-name="T9"/>
      <text:list text:continue-list="list313476641" text:style-name="WWNum99">
        <text:list-item>
          <text:p text:style-name="P291" loext:marker-style-name="T5"><text:span text:style-name="T8">Next.</text:span></text:p>
        </text:list-item>
        <text:list-item>
          <text:p text:style-name="P291" loext:marker-style-name="T5"><text:span text:style-name="T6">Em </text:span><text:span text:style-name="T8">"Review policy"</text:span><text:span text:style-name="T6">:</text:span></text:p>
        </text:list-item>
      </text:list>
      <text:list text:continue-list="list183203884" text:style-name="WWNum100">
        <text:list-item>
          <text:p text:style-name="P471" loext:marker-style-name="T5"><text:span text:style-name="T8">Policy name:</text:span><text:span text:style-name="T6"> ReadCancelAlterDynamoUpdate-seu-nome.</text:span></text:p>
        </text:list-item>
      </text:list>
      <text:list text:continue-list="list3978536298" text:style-name="WWNum101">
        <text:list-item>
          <text:p text:style-name="P293" loext:marker-style-name="T5"><text:span text:style-name="T6">Clique em </text:span><text:span text:style-name="T8">"Create policy"</text:span><text:span text:style-name="T6">.</text:span></text:p>
        </text:list-item>
      </text:list>
      <text:p text:style-name="P10" loext:marker-style-name="T9"><draw:custom-shape text:anchor-type="as-char" draw:z-index="34" draw:name="AutoShape 27"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4">Teste dos Novos Fluxos de Cancelamento e Alteração</text:span></text:h>
      <text:p text:style-name="P10" loext:marker-style-name="T9"><text:span text:style-name="T6">Vamos simular a chegada de eventos de cancelamento e alteração no nosso Event Bus. A forma mais fácil é usar o próprio console do EventBridge.</text:span></text:p>
      <text:p text:style-name="P22" loext:marker-style-name="T9"/>
      <text:h text:style-name="P5" text:outline-level="3" loext:marker-style-name="T11"><text:span text:style-name="T24">Preparar um Pedido Existente:</text:span></text:h>
      <text:list text:continue-list="list2163374437" text:style-name="WWNum102">
        <text:list-item>
          <text:p text:style-name="P294" loext:marker-style-name="T5"><text:span text:style-name="T6">Certifique-se de que você tem um pedido na tabela pedidos-db-seu-nome que foi processado anteriormente (ex: apiP001-seu-nome ou s3P003-seu-nome). </text:span></text:p>
        </text:list-item>
        <text:list-item>
          <text:p text:style-name="P294" loext:marker-style-name="T5"><text:span text:style-name="T8">Caminho: </text:span><text:span text:style-name="T6">DynamoDB &gt; Explore items &gt; pedidos-db-seu-nome &gt; pedidos-db-seu-nome</text:span></text:p>
        </text:list-item>
        <text:list-item>
          <text:p text:style-name="P294" loext:marker-style-name="T5"><text:span text:style-name="T6">Anote o pedidoId de um deles. </text:span></text:p>
        </text:list-item>
      </text:list>
      <text:list text:continue-list="list801278802" text:style-name="WWNum103">
        <text:list-item>
          <text:p text:style-name="P472" loext:marker-style-name="T5"><text:span text:style-name="T8">Exemplo:</text:span><text:span text:style-name="T6"> apiP001-seu-nome</text:span></text:p>
        </text:list-item>
      </text:list>
      <text:p text:style-name="P22" loext:marker-style-name="T9"/>
      <text:h text:style-name="P5" text:outline-level="3" loext:marker-style-name="T11"><text:span text:style-name="T12">Testar o Fluxo de Cancelamento:</text:span></text:h>
      <text:list text:continue-list="list4041555091" text:style-name="WWNum104">
        <text:list-item>
          <text:p text:style-name="P473" loext:marker-style-name="T5"><text:span text:style-name="T6">Vá para </text:span><text:span text:style-name="T8">Amazon EventBridge</text:span><text:span text:style-name="T6"> &gt; </text:span><text:span text:style-name="T8">"Event buses"</text:span><text:span text:style-name="T6">.</text:span></text:p>
        </text:list-item>
      </text:list>
      <text:list text:continue-list="list2255332851" text:style-name="WWNum105">
        <text:list-item>
          <text:p text:style-name="P298" loext:marker-style-name="T5"><text:span text:style-name="T6">Selecione seu bus </text:span><text:span text:style-name="T8">pedidos-event-bus-seu-nome</text:span><text:span text:style-name="T6">.</text:span></text:p>
        </text:list-item>
      </text:list>
      <text:list text:continue-list="list720395882" text:style-name="WWNum106">
        <text:list-item>
          <text:p text:style-name="P474" loext:marker-style-name="T5"><text:span text:style-name="T6">Clique em </text:span><text:span text:style-name="T8">"Send events"</text:span><text:span text:style-name="T6">.</text:span></text:p>
        </text:list-item>
      </text:list>
      <text:list text:continue-list="list748081965" text:style-name="WWNum107">
        <text:list-item>
          <text:p text:style-name="P475" loext:marker-style-name="T5"><text:soft-page-break/><text:span text:style-name="T8">Event source:</text:span><text:span text:style-name="T6"> lab.aula4.operacoes</text:span></text:p>
        </text:list-item>
      </text:list>
      <text:list text:continue-list="list1128155409" text:style-name="WWNum108">
        <text:list-item>
          <text:p text:style-name="P476" loext:marker-style-name="T5"><text:span text:style-name="T8">Detail type:</text:span><text:span text:style-name="T6"> CancelarPedido</text:span></text:p>
        </text:list-item>
      </text:list>
      <text:list text:continue-list="list2521693894" text:style-name="WWNum109">
        <text:list-item>
          <text:p text:style-name="P302" loext:marker-style-name="T5"><text:span text:style-name="T8">Event detail (JSON):</text:span><text:span text:style-name="T6"> (Substitua &lt;ID_DO_SEU_PEDIDO&gt; pelo ID anotado no passo "Preparar um pedido existebte")</text:span></text:p>
        </text:list-item>
      </text:list>
      <text:p text:style-name="P118" loext:marker-style-name="T9"/>
      <text:p text:style-name="P96" loext:marker-style-name="T9"><text:span text:style-name="T16">{</text:span></text:p>
      <text:p text:style-name="P97" loext:marker-style-name="T9"><text:span text:style-name="T16"> </text:span><text:span text:style-name="T17">"pedidoId"</text:span><text:span text:style-name="T16">: </text:span><text:span text:style-name="T17">"</text:span><text:span text:style-name="T16">&lt;</text:span><text:span text:style-name="T17">ID_DO_SEU_PEDIDO</text:span><text:span text:style-name="T16">&gt;</text:span><text:span text:style-name="T17">"</text:span></text:p>
      <text:p text:style-name="P98" loext:marker-style-name="T9"><text:span text:style-name="T16">}</text:span></text:p>
      <text:p text:style-name="P118" loext:marker-style-name="T9"/>
      <text:list text:continue-list="list965452847" text:style-name="WWNum110">
        <text:list-item>
          <text:p text:style-name="P303" loext:marker-style-name="T5"><text:span text:style-name="T6">Clique em </text:span><text:span text:style-name="T8">"Send"</text:span><text:span text:style-name="T6">.</text:span></text:p>
        </text:list-item>
      </text:list>
      <text:p text:style-name="P22" loext:marker-style-name="T9"/>
      <text:p text:style-name="P12" loext:marker-style-name="T9"><text:span text:style-name="T8">Verificações:</text:span></text:p>
      <text:list text:continue-list="list3382943975" text:style-name="WWNum111">
        <text:list-item>
          <text:p text:style-name="P304" loext:marker-style-name="T5"><text:span text:style-name="T8">Fila SQS cancela-pedido-queue-seu-nome:</text:span><text:span text:style-name="T6"> A mensagem deve passar por ela rapidamente.</text:span></text:p>
        </text:list-item>
      </text:list>
      <text:list text:continue-list="list1487135142" text:style-name="WWNum112">
        <text:list-item>
          <text:p text:style-name="P305" loext:marker-style-name="T5"><text:span text:style-name="T8">Logs da cancela-pedido-lambda-seu-nome:</text:span><text:span text:style-name="T6"> Verifique no CloudWatch se a Lambda foi invocada, processou o pedidoId e logou a atualização no DynamoDB.</text:span></text:p>
        </text:list-item>
      </text:list>
      <text:list text:continue-list="list1825992827" text:style-name="WWNum113">
        <text:list-item>
          <text:p text:style-name="P477" loext:marker-style-name="T5"><text:span text:style-name="T8">DynamoDB pedidos-db-seu-nome:</text:span><text:span text:style-name="T6"> Explore os itens da tabela. O status do pedido que você cancelou deve agora ser "CANCELADO" e o timestampAtualizacao deve ter sido atualizado.</text:span></text:p>
        </text:list-item>
      </text:list>
      <text:p text:style-name="P478" loext:marker-style-name="T9"/>
      <text:p text:style-name="P22" loext:marker-style-name="T9"/>
      <text:h text:style-name="P5" text:outline-level="3" loext:marker-style-name="T11"><text:span text:style-name="T24">Testar o Fluxo de Alteração:</text:span></text:h>
      <text:list text:continue-list="list143567122" text:style-name="WWNum114">
        <text:list-item>
          <text:p text:style-name="P479" loext:marker-style-name="T5"><text:span text:style-name="T6">Use o mesmo pedidoId (ou crie/processe um novo pedido se preferir).</text:span></text:p>
        </text:list-item>
      </text:list>
      <text:list text:continue-list="list2588969292" text:style-name="WWNum115">
        <text:list-item>
          <text:p text:style-name="P480" loext:marker-style-name="T5"><text:span text:style-name="T6">Vá para </text:span><text:span text:style-name="T8">Amazon EventBridge</text:span><text:span text:style-name="T6"> &gt; </text:span><text:span text:style-name="T8">"Event buses"</text:span><text:span text:style-name="T6"> &gt; pedidos-event-bus-seu-nome &gt; </text:span><text:span text:style-name="T8">"Send events"</text:span><text:span text:style-name="T6">.</text:span></text:p>
        </text:list-item>
      </text:list>
      <text:list text:continue-list="list1018140597" text:style-name="WWNum116">
        <text:list-item>
          <text:p text:style-name="P310" loext:marker-style-name="T5"><text:span text:style-name="T8">Event source:</text:span><text:span text:style-name="T6"> lab.aula4.operacoes</text:span></text:p>
        </text:list-item>
      </text:list>
      <text:list text:continue-list="list1393759107" text:style-name="WWNum117">
        <text:list-item>
          <text:p text:style-name="P311" loext:marker-style-name="T5"><text:span text:style-name="T8">Detail type:</text:span><text:span text:style-name="T6"> AlterarPedido</text:span></text:p>
        </text:list-item>
      </text:list>
      <text:list text:continue-list="list460712394" text:style-name="WWNum118">
        <text:list-item>
          <text:p text:style-name="P312" loext:marker-style-name="T5"><text:span text:style-name="T8">Event detail (JSON):</text:span><text:span text:style-name="T6"> (Substitua &lt;ID_DO_SEU_PEDIDO&gt;)</text:span></text:p>
        </text:list-item>
      </text:list>
      <text:p text:style-name="P22" loext:marker-style-name="T9"/>
      <text:p text:style-name="P12" loext:marker-style-name="T9"><text:span text:style-name="T8">   </text:span></text:p>
      <text:p text:style-name="P46" loext:marker-style-name="T9"><text:span text:style-name="T16">{</text:span></text:p>
      <text:p text:style-name="P47" loext:marker-style-name="T9"><text:span text:style-name="T16"> </text:span><text:span text:style-name="T17">"pedidoId"</text:span><text:span text:style-name="T16">: </text:span><text:span text:style-name="T17">"</text:span><text:span text:style-name="T16">&lt;</text:span><text:span text:style-name="T17">ID_DO_SEU_PEDIDO</text:span><text:span text:style-name="T16">&gt;</text:span><text:span text:style-name="T17">"</text:span><text:span text:style-name="T16">,</text:span></text:p>
      <text:p text:style-name="P47" loext:marker-style-name="T9"><text:span text:style-name="T16"> </text:span><text:span text:style-name="T17">"novosItens"</text:span><text:span text:style-name="T16">: [</text:span></text:p>
      <text:p text:style-name="P47" loext:marker-style-name="T9"><text:span text:style-name="T16">   {</text:span><text:span text:style-name="T17">"sku"</text:span><text:span text:style-name="T16">: </text:span><text:span text:style-name="T17">"PROD</text:span><text:span text:style-name="T16">-</text:span><text:span text:style-name="T17">ALTERADO</text:span><text:span text:style-name="T16">-</text:span><text:span text:style-name="T17">1"</text:span><text:span text:style-name="T16">, </text:span><text:span text:style-name="T17">"qtd"</text:span><text:span text:style-name="T16">: 1},</text:span></text:p>
      <text:p text:style-name="P47" loext:marker-style-name="T9"><text:span text:style-name="T16">   {</text:span><text:span text:style-name="T17">"sku"</text:span><text:span text:style-name="T16">: </text:span><text:span text:style-name="T17">"PROD</text:span><text:span text:style-name="T16">-</text:span><text:span text:style-name="T17">ALTERADO</text:span><text:span text:style-name="T16">-</text:span><text:span text:style-name="T17">2"</text:span><text:span text:style-name="T16">, </text:span><text:span text:style-name="T17">"qtd"</text:span><text:span text:style-name="T16">: </text:span><text:span text:style-name="T22">99</text:span><text:span text:style-name="T16">}</text:span></text:p>
      <text:p text:style-name="P47" loext:marker-style-name="T9"><text:span text:style-name="T16"> ]</text:span></text:p>
      <text:p text:style-name="P48" loext:marker-style-name="T9"><text:span text:style-name="T16">}</text:span></text:p>
      <text:p text:style-name="P118" loext:marker-style-name="T9"/>
      <text:list text:continue-list="list3532718944" text:style-name="WWNum119">
        <text:list-item>
          <text:p text:style-name="P481" loext:marker-style-name="T5"><text:span text:style-name="T6">Clique em </text:span><text:span text:style-name="T8">"Send"</text:span><text:span text:style-name="T6">.</text:span></text:p>
        </text:list-item>
      </text:list>
      <text:p text:style-name="P44" loext:marker-style-name="T9"><text:soft-page-break/></text:p>
      <text:p text:style-name="P260" loext:marker-style-name="T9"><text:span text:style-name="T8">Verificações:</text:span></text:p>
      <text:list text:continue-list="list637123797" text:style-name="WWNum120">
        <text:list-item>
          <text:p text:style-name="P482" loext:marker-style-name="T5"><text:span text:style-name="T8">Fila SQS altera-pedido-queue-seu-nome:</text:span><text:span text:style-name="T6"> A mensagem deve passar rapidamente.</text:span></text:p>
        </text:list-item>
      </text:list>
      <text:list text:continue-list="list1591311987" text:style-name="WWNum121">
        <text:list-item>
          <text:p text:style-name="P483" loext:marker-style-name="T5"><text:span text:style-name="T8">Logs da altera-pedido-lambda-seu-nome:</text:span><text:span text:style-name="T6"> Verifique no CloudWatch a invocação, o processamento e a atualização no DynamoDB.</text:span></text:p>
        </text:list-item>
      </text:list>
      <text:list text:continue-list="list2389444987" text:style-name="WWNum122">
        <text:list-item>
          <text:p text:style-name="P484" loext:marker-style-name="T5"><text:span text:style-name="T8">DynamoDB pedidos-db-seu-nome:</text:span><text:span text:style-name="T6"> O status do pedido deve ser "ALTERADO", o timestampAtualizacao atualizado, e o atributo itens deve refletir a nova lista de itens enviada no evento.</text:span></text:p>
        </text:list-item>
      </text:list>
      <text:p text:style-name="P485" loext:marker-style-name="T9"/>
      <text:p text:style-name="P10" loext:marker-style-name="T9"><draw:custom-shape text:anchor-type="as-char" draw:z-index="35" draw:name="AutoShape 28"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26">Revisão e Teste de Dead Letter Queues (DLQs)</text:span></text:h>
      <text:p text:style-name="P12" loext:marker-style-name="T9"><text:span text:style-name="T6">Configuramos DLQs para todas as nossas filas SQS. Elas são essenciais para capturar mensagens que falharam repetidamente no processamento por uma Lambda. Vamos testar uma delas.</text:span></text:p>
      <text:list text:continue-list="list4250686144" text:style-name="WWNum123">
        <text:list-item>
          <text:p text:style-name="P486" loext:marker-style-name="T5"><text:span text:style-name="T8">Escolher uma Lambda e Forçar um Erro:</text:span></text:p>
        </text:list-item>
      </text:list>
      <text:list text:continue-list="list3663549130" text:style-name="WWNum124">
        <text:list-item>
          <text:p text:style-name="P487" loext:marker-style-name="T5"><text:span text:style-name="T6">Vamos usar a processa-pedidos-lambda-seu-nome (da Aula 3) como exemplo.</text:span></text:p>
        </text:list-item>
        <text:list-item>
          <text:p text:style-name="P488" loext:marker-style-name="T5"><text:span text:style-name="T6">Vá para a função Lambda processa-pedidos-lambda-seu-nome.</text:span></text:p>
        </text:list-item>
        <text:list-item>
          <text:p text:style-name="P489" loext:marker-style-name="T5"><text:span text:style-name="T6">Na aba </text:span><text:span text:style-name="T8">"Code"</text:span><text:span text:style-name="T6">, edite lambda_function.py.</text:span></text:p>
        </text:list-item>
        <text:list-item>
          <text:p text:style-name="P488" loext:marker-style-name="T5"><text:span text:style-name="T6">Logo no início da função lambda_handler, adicione a linha: raise ValueError("Teste Forçado para DLQ!")</text:span></text:p>
        </text:list-item>
        <text:list-item>
          <text:p text:style-name="P490" loext:marker-style-name="T5"><text:span text:style-name="T6">Clique em </text:span><text:span text:style-name="T8">"Deploy"</text:span><text:span text:style-name="T6">.</text:span></text:p>
        </text:list-item>
      </text:list>
      <text:list text:continue-list="list328101012" text:style-name="WWNum125">
        <text:list-item>
          <text:p text:style-name="P325" loext:marker-style-name="T5"><text:span text:style-name="T8">Disparar o Fluxo:</text:span></text:p>
        </text:list-item>
      </text:list>
      <text:list text:continue-list="list2010195694" text:style-name="WWNum126">
        <text:list-item>
          <text:p text:style-name="P326" loext:marker-style-name="T5"><text:span text:style-name="T6">Envie um novo pedido pela API Gateway (como no Passo 8.1 da Aula 3).</text:span></text:p>
        </text:list-item>
      </text:list>
      <text:list text:continue-list="list3306111870" text:style-name="WWNum127">
        <text:list-item>
          <text:p text:style-name="P491" loext:marker-style-name="T5"><text:span text:style-name="T8">Prepare a Requisição </text:span></text:p>
        </text:list-item>
      </text:list>
      <text:p text:style-name="P10" loext:marker-style-name="T9"><text:span text:style-name="T6">Você enviará uma requisição POST para a URL da sua API com um payload em formato JSON. Utilize o comando que você encontrará a seguir, e altere os </text:span><text:span text:style-name="T8">valores abaixo: </text:span></text:p>
      <text:p text:style-name="P44" loext:marker-style-name="T9"/>
      <text:p text:style-name="P343" loext:marker-style-name="T9"><text:span text:style-name="T16">curl -X POST &lt;INVOKE_URL&gt;/pedidos \</text:span></text:p>
      <text:p text:style-name="P344" loext:marker-style-name="T9"><text:span text:style-name="T16"> -H </text:span><text:span text:style-name="T17">"Content</text:span><text:span text:style-name="T16">-</text:span><text:span text:style-name="T17">Type</text:span><text:span text:style-name="T16">:</text:span><text:span text:style-name="T17"> application/json"</text:span><text:span text:style-name="T16"> \</text:span></text:p>
      <text:p text:style-name="P344" loext:marker-style-name="T9"><text:span text:style-name="T16"> -d '{</text:span></text:p>
      <text:p text:style-name="P344" loext:marker-style-name="T9"><text:span text:style-name="T16">   </text:span><text:span text:style-name="T17">"pedidoId"</text:span><text:span text:style-name="T16">: </text:span><text:span text:style-name="T17">"apiP001</text:span><text:span text:style-name="T16">-</text:span><text:span text:style-name="T17">seu</text:span><text:span text:style-name="T16">-</text:span><text:span text:style-name="T17">nome"</text:span><text:span text:style-name="T16">,</text:span></text:p>
      <text:p text:style-name="P344" loext:marker-style-name="T9"><text:span text:style-name="T16">   </text:span><text:span text:style-name="T17">"clienteId"</text:span><text:span text:style-name="T16">: </text:span><text:span text:style-name="T17">"clienteXYZ</text:span><text:span text:style-name="T16">-</text:span><text:span text:style-name="T17">seu</text:span><text:span text:style-name="T16">-</text:span><text:span text:style-name="T17">nome"</text:span><text:span text:style-name="T16">,</text:span></text:p>
      <text:p text:style-name="P344" loext:marker-style-name="T9"><text:span text:style-name="T16">   </text:span><text:span text:style-name="T17">"itens"</text:span><text:span text:style-name="T16">: [</text:span></text:p>
      <text:p text:style-name="P344" loext:marker-style-name="T9"><text:span text:style-name="T16">     {</text:span></text:p>
      <text:p text:style-name="P344" loext:marker-style-name="T9"><text:span text:style-name="T16">       </text:span><text:span text:style-name="T17">"Item"</text:span><text:span text:style-name="T16">: </text:span><text:span text:style-name="T17">"Produto X API"</text:span><text:span text:style-name="T16">,</text:span></text:p>
      <text:p text:style-name="P344" loext:marker-style-name="T9"><text:span text:style-name="T16">       </text:span><text:span text:style-name="T17">"qtd"</text:span><text:span text:style-name="T16">: </text:span><text:span text:style-name="T22">1</text:span></text:p>
      <text:p text:style-name="P344" loext:marker-style-name="T9"><text:soft-page-break/><text:span text:style-name="T16">     }</text:span></text:p>
      <text:p text:style-name="P344" loext:marker-style-name="T9"><text:span text:style-name="T16">   ]</text:span></text:p>
      <text:p text:style-name="P345" loext:marker-style-name="T9"><text:span text:style-name="T16"> }'</text:span></text:p>
      <text:p text:style-name="P44" loext:marker-style-name="T9"/>
      <text:list text:continue-list="list2163148684" text:style-name="WWNum128">
        <text:list-item>
          <text:p text:style-name="P492" loext:marker-style-name="T5"><text:span text:style-name="T8">&lt;INVOKE_URL&gt;</text:span><text:span text:style-name="T6">: </text:span><text:span text:style-name="T8">URL de Invocação (Invoke URL) da sua API </text:span><text:span text:style-name="T6">que você anotou anteriormente. </text:span></text:p>
        </text:list-item>
      </text:list>
      <text:list text:continue-list="list117337262" text:style-name="WWNum129">
        <text:list-item>
          <text:p text:style-name="P493" loext:marker-style-name="T5"><text:span text:style-name="T8">Caminho:</text:span><text:span text:style-name="T6"> API Gateway &gt; APIs &gt; pedidos-api-seu-nome &gt; Stages</text:span></text:p>
        </text:list-item>
      </text:list>
      <text:list text:continue-list="list2197335895" text:style-name="WWNum130">
        <text:list-item>
          <text:p text:style-name="P494" loext:marker-style-name="T5"><text:span text:style-name="T8">pedidoId </text:span><text:span text:style-name="T6">e </text:span><text:span text:style-name="T8">clienteId</text:span><text:span text:style-name="T6">: personalize com os dados: </text:span></text:p>
        </text:list-item>
      </text:list>
      <text:list text:continue-list="list2269919274" text:style-name="WWNum131">
        <text:list-item>
          <text:p text:style-name="P495" loext:marker-style-name="T5"><text:span text:style-name="T6">"</text:span><text:span text:style-name="T8">pedidoId</text:span><text:span text:style-name="T6">": " apiP0043-TESTE-FLUXO-AULA-4"</text:span></text:p>
        </text:list-item>
        <text:list-item>
          <text:p text:style-name="P495" loext:marker-style-name="T5"><text:span text:style-name="T6">"</text:span><text:span text:style-name="T8">clienteId</text:span><text:span text:style-name="T6">": "clienteAPI-TRE-seu-nome",</text:span></text:p>
        </text:list-item>
        <text:list-item>
          <text:p text:style-name="P496" loext:marker-style-name="T5"><text:span text:style-name="T6">"</text:span><text:span text:style-name="T8">itens</text:span><text:span text:style-name="T6">": [{"item": "Produto X API", "qtd": 1}]</text:span></text:p>
        </text:list-item>
      </text:list>
      <text:p text:style-name="P22" loext:marker-style-name="T9"/>
      <text:p text:style-name="P10" loext:marker-style-name="T9"><text:span text:style-name="T8">Exemplo com URL fictício de como deverá ficar: </text:span></text:p>
      <text:p text:style-name="P118" loext:marker-style-name="T9"/>
      <text:list text:style-name="WWNum132">
        <text:list-item>
          <text:p text:style-name="P497" loext:marker-style-name="T5"><text:span text:style-name="T8">Observar o Comportamento:</text:span></text:p>
        </text:list-item>
      </text:list>
      <text:list text:style-name="WWNum133">
        <text:list-item>
          <text:p text:style-name="P498" loext:marker-style-name="T5"><text:span text:style-name="T8">Logs da processa-pedidos-lambda-seu-nome:</text:span><text:span text:style-name="T6"> Você verá a Lambda sendo invocada, logando o evento recebido e imediatamente falhando com o ValueError("Teste Forçado para DLQ!").</text:span></text:p>
        </text:list-item>
        <text:list-item>
          <text:p text:style-name="P499" loext:marker-style-name="T5"><text:span text:style-name="T8">Fila SQS pedidos-pendentes-queue-seu-nome:</text:span><text:span text:style-name="T6"> A mensagem aparecerá, desaparecerá (enquanto a Lambda tenta processar e falha), e reaparecerá algumas vezes (conforme o Visibility Timeout e as tentativas).</text:span></text:p>
        </text:list-item>
        <text:list-item>
          <text:p text:style-name="P500" loext:marker-style-name="T5"><text:span text:style-name="T8">Você não localiza a mensagem?</text:span><text:span text:style-name="T6"> Vamos investigar por que a mensagem pode não estar visível na fila de origem.</text:span></text:p>
        </text:list-item>
        <text:list-item>
          <text:p text:style-name="P501" loext:marker-style-name="T5"><text:span text:style-name="T8">Causas Possíveis e Pontos de Verificação:</text:span></text:p>
        </text:list-item>
      </text:list>
      <text:list text:style-name="WWNum134">
        <text:list-item>
          <text:p text:style-name="P502" loext:marker-style-name="T5"><text:span text:style-name="T6">Lambda Falhando Rápido Demais e SQS Movendo para DLQ Muito Rapidamente:</text:span></text:p>
        </text:list-item>
        <text:list-item>
          <text:p text:style-name="P502" loext:marker-style-name="T5"><text:span text:style-name="T6">Se a Lambda processa-pedidos-lambda-seu-nome está falhando extremamente rápido (o que é o caso com um raise ValueError logo no início) e o maxReceiveCount na fila </text:span><text:span text:style-name="T8">pedidos-pendentes-queue-seu-nome</text:span><text:span text:style-name="T6"> está configurado para um número baixo (</text:span><text:span text:style-name="T8">como 1, ou o padrão de 3 que usamos</text:span><text:span text:style-name="T6">), a SQS pode mover a mensagem para a DLQ (pedidos-pendentes-dlq-seu-nome) quase que imediatamente após as tentativas falharem.</text:span></text:p>
        </text:list-item>
        <text:list-item>
          <text:p text:style-name="P502" loext:marker-style-name="T5"><text:span text:style-name="T6">Você pode não ter tempo de "vê-la" na fila principal usando "Poll for messages" no console, pois a transição para a DLQ é rápida.</text:span></text:p>
        </text:list-item>
        <text:list-item>
          <text:p text:style-name="P503" loext:marker-style-name="T5"><text:soft-page-break/><text:span text:style-name="T8">Achamos a causa possível!</text:span><text:span text:style-name="T6"> Vamos seguir em frente.</text:span></text:p>
        </text:list-item>
      </text:list>
      <text:list text:style-name="WWNum135">
        <text:list-item>
          <text:p text:style-name="P504" loext:marker-style-name="T5"><text:span text:style-name="T8">DLQ pedidos-pendentes-dlq-seu-nome:</text:span><text:span text:style-name="T6"> Após o número máximo de tentativas (configurado como 3), a mensagem será movida para esta DLQ.</text:span></text:p>
        </text:list-item>
      </text:list>
      <text:list text:style-name="WWNum136">
        <text:list-item>
          <text:p text:style-name="P505" loext:marker-style-name="T5"><text:span text:style-name="T6">Vá para a fila DLQ no console SQS.</text:span></text:p>
        </text:list-item>
        <text:list-item>
          <text:p text:style-name="P505" loext:marker-style-name="T5"><text:span text:style-name="T6">Observe a coluna "Messages available". Ela deverá aumentar para 1.</text:span></text:p>
        </text:list-item>
        <text:list-item>
          <text:p text:style-name="P506" loext:marker-style-name="T5"><text:span text:style-name="T6">Use "Send and receive messages" &gt; "Poll for messages" para visualizar a mensagem na DLQ.</text:span></text:p>
        </text:list-item>
      </text:list>
      <text:list text:style-name="WWNum137">
        <text:list-item>
          <text:p text:style-name="P507" loext:marker-style-name="T5"><text:span text:style-name="T8">Limpeza:</text:span></text:p>
        </text:list-item>
      </text:list>
      <text:list text:style-name="WWNum138">
        <text:list-item>
          <text:p text:style-name="P508" loext:marker-style-name="T5"><text:span text:style-name="T40">IMPORTANTE:</text:span><text:span text:style-name="T6"> Volte para a Lambda processa-pedidos-lambda-seu-nome, remova a linha raise ValueError("Teste Forçado para DLQ!") do código e clique em </text:span><text:span text:style-name="T8">"Deploy"</text:span><text:span text:style-name="T6"> novamente para restaurar o funcionamento normal.</text:span></text:p>
        </text:list-item>
        <text:list-item>
          <text:p text:style-name="P509" loext:marker-style-name="T5"><text:span text:style-name="T6">Você pode deixar a mensagem na DLQ ou deletá-la. Em um cenário real, você analisaria a mensagem na DLQ para entender o erro e decidir como reprocessá-la (talvez usando "Start message redrive").</text:span></text:p>
        </text:list-item>
      </text:list>
      <text:p text:style-name="P22" loext:marker-style-name="T9"/>
      <text:h text:style-name="P9" text:outline-level="2" loext:marker-style-name="T3"><text:span text:style-name="T4">Conclusão da Aula 4 e do Laboratório</text:span></text:h>
      <text:p text:style-name="P10" loext:marker-style-name="T9"><text:span text:style-name="T6">Parabéns por concluir a Aula 4! Você expandiu significativamente a funcionalidade do nosso sistema de processamento de pedidos, adicionando fluxos de cancelamento e alteração, e validou o funcionamento crucial das Dead Letter Queues.</text:span><text:span text:style-name="T28"> </text:span></text:p>
      <text:p text:style-name="P10" loext:marker-style-name="T9"><draw:custom-shape text:anchor-type="as-char" draw:z-index="36" draw:name="AutoShape 29" draw:style-name="gr1" draw:text-style-name="P31" svg:width="0.027cm" svg:height="0.027cm"><svg:desc>Forma</svg:desc><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2" loext:marker-style-name="T3"><text:span text:style-name="T4">Conclusão Geral do Laboratório</text:span></text:h>
      <text:p text:style-name="P22" loext:marker-style-name="T9"/>
      <text:p text:style-name="P231" loext:marker-style-name="T9"><text:span text:style-name="T8">A Jornada:</text:span><text:span text:style-name="T6"> </text:span></text:p>
      <text:p text:style-name="P10" loext:marker-style-name="T9"><text:span text:style-name="T6">Ao longo destas quatro aulas, embarcamos juntos na construção de uma arquitetura AWS completa e funcional. Começamos na Aula 1 estabelecendo a porta de entrada principal via API Gateway e o início do pipeline com SQS e EventBridge. Na Aula 2, adicionamos um fluxo robusto para ingestão de arquivos via S3, integrando-o inteligentemente ao pipeline principal. Na Aula 3, conectamos as pontas, implementando o processamento central que consome os eventos do EventBridge e persiste os pedidos no DynamoDB. Finalmente, na Aula 4, adicionamos complexidade e realismo com fluxos de cancelamento e alteração e solidificamos o tratamento de erros com DLQs.</text:span></text:p>
      <text:p text:style-name="P105" loext:marker-style-name="T9"/>
      <text:p text:style-name="P10" loext:marker-style-name="T9"><text:span text:style-name="T8">A Arquitetura Construída:</text:span></text:p>
      <text:p text:style-name="P22" loext:marker-style-name="T9"/>
      <text:p text:style-name="P12" loext:marker-style-name="T9"><text:soft-page-break/><text:span text:style-name="T6">Vocês agora têm diante de si uma arquitetura orientada a eventos, serverless e desacoplada, capaz de lidar com múltiplas fontes de dados e diferentes operações de negócio. Ela utiliza serviços essenciais da AWS:</text:span></text:p>
      <text:list text:style-name="WWNum139">
        <text:list-item>
          <text:p text:style-name="P510" loext:marker-style-name="T5"><text:span text:style-name="T8">Compute:</text:span><text:span text:style-name="T6"> AWS Lambda</text:span></text:p>
        </text:list-item>
        <text:list-item>
          <text:p text:style-name="P510" loext:marker-style-name="T5"><text:span text:style-name="T8">Integração:</text:span><text:span text:style-name="T6"> Amazon API Gateway, Amazon SQS (Standard e FIFO), Amazon EventBridge, Amazon SNS</text:span></text:p>
        </text:list-item>
        <text:list-item>
          <text:p text:style-name="P510" loext:marker-style-name="T5"><text:span text:style-name="T8">Armazenamento:</text:span><text:span text:style-name="T6"> Amazon S3, Amazon DynamoDB</text:span></text:p>
        </text:list-item>
        <text:list-item>
          <text:p text:style-name="P510" loext:marker-style-name="T5"><text:span text:style-name="T8">Gerenciamento e Governança:</text:span><text:span text:style-name="T6"> AWS IAM, AWS CloudWatch (Logs e Métricas)</text:span></text:p>
        </text:list-item>
      </text:list>
      <text:p text:style-name="P511" loext:marker-style-name="T9"/>
      <text:p text:style-name="P231" loext:marker-style-name="T9"><text:span text:style-name="T6"> </text:span><text:span text:style-name="T9"><text:line-break/></text:span><text:span text:style-name="T8">Vocês Conseguiram!</text:span><text:span text:style-name="T6"> </text:span></text:p>
      <text:p text:style-name="P10" loext:marker-style-name="T9"><text:span text:style-name="T6">Estes quatro dias foram intensos, cheios de práticas, configurações e, inevitavelmente, alguns desafios. Cada erro encontrado e solucionado é uma oportunidade de aprendizado valiosa e faz parte intrínseca do processo de desenvolvimento na nuvem. A persistência e a curiosidade que demonstraram são admiráveis.</text:span></text:p>
      <text:p text:style-name="P10" loext:marker-style-name="T9"><text:span text:style-name="T6">Vocês não apenas seguiram passos, mas construíram algo complexo e funcional, peça por peça. Parabéns por chegarem até aqui, por todo o esforço e pela dedicação! O conhecimento que vocês consolidaram aqui é uma base sólida para continuar explorando o vasto universo da AWS.</text:span></text:p>
      <text:p text:style-name="P10" loext:marker-style-name="T9"><text:span text:style-name="T6">Desejo a cada um de vocês todo o sucesso do mundo em suas carreiras e projetos futuros na nuvem. Continuem aprendendo, experimentando e construindo coisas incríveis.</text:span></text:p>
      <text:p text:style-name="P402" loext:marker-style-name="T9"/>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charset="x-symbol"/>
    <style:font-face style:name="Arial" svg:font-family="Arial" style:font-family-generic="swiss" style:font-pitch="variable"/>
    <style:font-face style:name="Arial1" svg:font-family="Arial" style:font-family-generic="system" style:font-pitch="variable"/>
    <style:font-face style:name="Lato 2" svg:font-family="'Lato 2'"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820" style:display-name="ListLabel 820" style:family="text">
      <style:text-properties fo:color="#000000" loext:opacity="100%" style:font-name="Lato 2" fo:font-family="'Lato 2'" style:font-family-generic="roman" style:font-pitch="variable" fo:font-size="15pt" style:text-underline-style="solid" style:text-underline-width="auto" style:text-underline-color="font-color" style:letter-kerning="false" fo:background-color="#ffffff" style:font-name-asian="Times New Roman" style:font-family-asian="'Times New Roman'" style:font-family-generic-asian="system" style:font-pitch-asian="variable" style:font-size-asian="15pt" style:language-asian="pt" style:country-asian="BR" style:font-name-complex="Arial1" style:font-family-complex="Arial" style:font-family-generic-complex="system" style:font-pitch-complex="variable" style:font-size-complex="15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821" style:display-name="ListLabel 821" style:family="text">
      <style:text-properties fo:color="#0000ff" loext:opacity="100%" style:font-name="Lato 2" fo:font-family="'Lato 2'" style:font-family-generic="roman" style:font-pitch="variable" fo:font-size="15pt" style:text-underline-style="solid" style:text-underline-width="auto" style:text-underline-color="font-color" style:letter-kerning="false" fo:background-color="#ffffff" style:font-name-asian="Times New Roman" style:font-family-asian="'Times New Roman'" style:font-family-generic-asian="system" style:font-pitch-asian="variable" style:font-size-asian="15pt" style:language-asian="pt" style:country-asian="BR" style:font-name-complex="Arial1" style:font-family-complex="Arial" style:font-family-generic-complex="system" style:font-pitch-complex="variable" style:font-size-complex="15pt"/>
    </style:style>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text-properties style:font-name="Aptos" fo:font-family="Aptos" style:font-family-generic="roman" style:font-pitch="variable" style:font-charset="x-symbol" fo:font-size="10pt" style:font-size-asian="10pt"/>
    </style:style>
    <style:style style:name="ListLabel_20_776" style:display-name="ListLabel 776" style:family="text">
      <style:text-properties style:font-name="Aptos" fo:font-family="Aptos" style:font-family-generic="roman" style:font-pitch="variable" style:font-charset="x-symbol" fo:font-size="10pt" style:font-size-asian="10pt"/>
    </style:style>
    <style:style style:name="ListLabel_20_777" style:display-name="ListLabel 777" style:family="text">
      <style:text-properties style:font-name="Aptos" fo:font-family="Aptos" style:font-family-generic="roman" style:font-pitch="variable" style:font-charset="x-symbol" fo:font-size="10pt" style:font-size-asian="10pt"/>
    </style:style>
    <style:style style:name="ListLabel_20_778" style:display-name="ListLabel 778" style:family="text">
      <style:text-properties style:font-name="Aptos" fo:font-family="Aptos" style:font-family-generic="roman" style:font-pitch="variable" style:font-charset="x-symbol" fo:font-size="10pt" style:font-size-asian="10pt"/>
    </style:style>
    <style:style style:name="ListLabel_20_779" style:display-name="ListLabel 779" style:family="text">
      <style:text-properties style:font-name="Aptos" fo:font-family="Aptos" style:font-family-generic="roman" style:font-pitch="variable" style:font-charset="x-symbol" fo:font-size="10pt" style:font-size-asian="10pt"/>
    </style:style>
    <style:style style:name="ListLabel_20_780" style:display-name="ListLabel 780" style:family="text">
      <style:text-properties style:font-name="Aptos" fo:font-family="Aptos" style:font-family-generic="roman" style:font-pitch="variable" style:font-charset="x-symbol" fo:font-size="10pt" style:font-size-asian="10pt"/>
    </style:style>
    <style:style style:name="ListLabel_20_781" style:display-name="ListLabel 781" style:family="text">
      <style:text-properties style:font-name="Aptos" fo:font-family="Aptos" style:font-family-generic="roman" style:font-pitch="variable" style:font-charset="x-symbol" fo:font-size="10pt" style:font-size-asian="10pt"/>
    </style:style>
    <style:style style:name="ListLabel_20_782" style:display-name="ListLabel 782" style:family="text">
      <style:text-properties style:font-name="Aptos" fo:font-family="Aptos" style:font-family-generic="roman" style:font-pitch="variable" style:font-charset="x-symbol" fo:font-size="10pt" style:font-size-asian="10pt"/>
    </style:style>
    <style:style style:name="ListLabel_20_783" style:display-name="ListLabel 783" style:family="text">
      <style:text-properties style:font-name="Aptos" fo:font-family="Aptos" style:font-family-generic="roman" style:font-pitch="variable" style:font-charset="x-symbol" fo:font-size="10pt" style:font-size-asian="10pt"/>
    </style:style>
    <style:style style:name="ListLabel_20_784" style:display-name="ListLabel 784" style:family="text">
      <style:text-properties style:font-name="Aptos" fo:font-family="Aptos" style:font-family-generic="roman" style:font-pitch="variable" style:font-charset="x-symbol" fo:font-size="10pt" style:font-size-asian="10pt"/>
    </style:style>
    <style:style style:name="ListLabel_20_785" style:display-name="ListLabel 785" style:family="text">
      <style:text-properties style:font-name="Aptos" fo:font-family="Aptos" style:font-family-generic="roman" style:font-pitch="variable" style:font-charset="x-symbol" fo:font-size="10pt" style:font-size-asian="10pt"/>
    </style:style>
    <style:style style:name="ListLabel_20_786" style:display-name="ListLabel 786" style:family="text">
      <style:text-properties style:font-name="Aptos" fo:font-family="Aptos" style:font-family-generic="roman" style:font-pitch="variable" style:font-charset="x-symbol" fo:font-size="10pt" style:font-size-asian="10pt"/>
    </style:style>
    <style:style style:name="ListLabel_20_787" style:display-name="ListLabel 787" style:family="text">
      <style:text-properties style:font-name="Aptos" fo:font-family="Aptos" style:font-family-generic="roman" style:font-pitch="variable" style:font-charset="x-symbol" fo:font-size="10pt" style:font-size-asian="10pt"/>
    </style:style>
    <style:style style:name="ListLabel_20_788" style:display-name="ListLabel 788" style:family="text">
      <style:text-properties style:font-name="Aptos" fo:font-family="Aptos" style:font-family-generic="roman" style:font-pitch="variable" style:font-charset="x-symbol" fo:font-size="10pt" style:font-size-asian="10pt"/>
    </style:style>
    <style:style style:name="ListLabel_20_789" style:display-name="ListLabel 789" style:family="text">
      <style:text-properties style:font-name="Aptos" fo:font-family="Aptos" style:font-family-generic="roman" style:font-pitch="variable" style:font-charset="x-symbol" fo:font-size="10pt" style:font-size-asian="10pt"/>
    </style:style>
    <style:style style:name="ListLabel_20_790" style:display-name="ListLabel 790" style:family="text">
      <style:text-properties style:font-name="Aptos" fo:font-family="Aptos" style:font-family-generic="roman" style:font-pitch="variable" style:font-charset="x-symbol" fo:font-size="10pt" style:font-size-asian="10pt"/>
    </style:style>
    <style:style style:name="ListLabel_20_791" style:display-name="ListLabel 791" style:family="text">
      <style:text-properties style:font-name="Aptos" fo:font-family="Aptos" style:font-family-generic="roman" style:font-pitch="variable" style:font-charset="x-symbol" fo:font-size="10pt" style:font-size-asian="10pt"/>
    </style:style>
    <style:style style:name="ListLabel_20_792" style:display-name="ListLabel 792" style:family="text">
      <style:text-properties style:font-name="Aptos" fo:font-family="Aptos" style:font-family-generic="roman" style:font-pitch="variable" style:font-charset="x-symbol" fo:font-size="10pt" style:font-size-asian="10pt"/>
    </style:style>
    <style:style style:name="ListLabel_20_793" style:display-name="ListLabel 793" style:family="text">
      <style:text-properties style:font-name="Aptos" fo:font-family="Aptos" style:font-family-generic="roman" style:font-pitch="variable" style:font-charset="x-symbol" fo:font-size="10pt" style:font-size-asian="10pt"/>
    </style:style>
    <style:style style:name="ListLabel_20_794" style:display-name="ListLabel 794" style:family="text">
      <style:text-properties style:font-name="Aptos" fo:font-family="Aptos" style:font-family-generic="roman" style:font-pitch="variable" style:font-charset="x-symbol" fo:font-size="10pt" style:font-size-asian="10pt"/>
    </style:style>
    <style:style style:name="ListLabel_20_795" style:display-name="ListLabel 795" style:family="text">
      <style:text-properties style:font-name="Aptos" fo:font-family="Aptos" style:font-family-generic="roman" style:font-pitch="variable" style:font-charset="x-symbol" fo:font-size="10pt" style:font-size-asian="10pt"/>
    </style:style>
    <style:style style:name="ListLabel_20_796" style:display-name="ListLabel 796" style:family="text">
      <style:text-properties style:font-name="Aptos" fo:font-family="Aptos" style:font-family-generic="roman" style:font-pitch="variable" style:font-charset="x-symbol" fo:font-size="10pt" style:font-size-asian="10pt"/>
    </style:style>
    <style:style style:name="ListLabel_20_797" style:display-name="ListLabel 797" style:family="text">
      <style:text-properties style:font-name="Aptos" fo:font-family="Aptos" style:font-family-generic="roman" style:font-pitch="variable" style:font-charset="x-symbol" fo:font-size="10pt" style:font-size-asian="10pt"/>
    </style:style>
    <style:style style:name="ListLabel_20_798" style:display-name="ListLabel 798" style:family="text">
      <style:text-properties style:font-name="Aptos" fo:font-family="Aptos" style:font-family-generic="roman" style:font-pitch="variable" style:font-charset="x-symbol" fo:font-size="10pt" style:font-size-asian="10pt"/>
    </style:style>
    <style:style style:name="ListLabel_20_799" style:display-name="ListLabel 799" style:family="text">
      <style:text-properties style:font-name="Aptos" fo:font-family="Aptos" style:font-family-generic="roman" style:font-pitch="variable" style:font-charset="x-symbol" fo:font-size="10pt" style:font-size-asian="10pt"/>
    </style:style>
    <style:style style:name="ListLabel_20_800" style:display-name="ListLabel 800" style:family="text">
      <style:text-properties style:font-name="Aptos" fo:font-family="Aptos" style:font-family-generic="roman" style:font-pitch="variable" style:font-charset="x-symbol" fo:font-size="10pt" style:font-size-asian="10pt"/>
    </style:style>
    <style:style style:name="ListLabel_20_801" style:display-name="ListLabel 801" style:family="text">
      <style:text-properties style:font-name="Aptos" fo:font-family="Aptos" style:font-family-generic="roman" style:font-pitch="variable" style:font-charset="x-symbol" fo:font-size="10pt" style:font-size-asian="10pt"/>
    </style:style>
    <style:style style:name="ListLabel_20_802" style:display-name="ListLabel 802" style:family="text">
      <style:text-properties style:font-name="Aptos" fo:font-family="Aptos" style:font-family-generic="roman" style:font-pitch="variable" style:font-charset="x-symbol" fo:font-size="10pt" style:font-size-asian="10pt"/>
    </style:style>
    <style:style style:name="ListLabel_20_803" style:display-name="ListLabel 803" style:family="text">
      <style:text-properties style:font-name="Aptos" fo:font-family="Aptos" style:font-family-generic="roman" style:font-pitch="variable" style:font-charset="x-symbol" fo:font-size="10pt" style:font-size-asian="10pt"/>
    </style:style>
    <style:style style:name="ListLabel_20_804" style:display-name="ListLabel 804" style:family="text">
      <style:text-properties style:font-name="Aptos" fo:font-family="Aptos" style:font-family-generic="roman" style:font-pitch="variable" style:font-charset="x-symbol" fo:font-size="10pt" style:font-size-asian="10pt"/>
    </style:style>
    <style:style style:name="ListLabel_20_805" style:display-name="ListLabel 805" style:family="text">
      <style:text-properties style:font-name="Aptos" fo:font-family="Aptos" style:font-family-generic="roman" style:font-pitch="variable" style:font-charset="x-symbol" fo:font-size="10pt" style:font-size-asian="10pt"/>
    </style:style>
    <style:style style:name="ListLabel_20_806" style:display-name="ListLabel 806" style:family="text">
      <style:text-properties style:font-name="Aptos" fo:font-family="Aptos" style:font-family-generic="roman" style:font-pitch="variable" style:font-charset="x-symbol" fo:font-size="10pt" style:font-size-asian="10pt"/>
    </style:style>
    <style:style style:name="ListLabel_20_807" style:display-name="ListLabel 807" style:family="text">
      <style:text-properties style:font-name="Aptos" fo:font-family="Aptos" style:font-family-generic="roman" style:font-pitch="variable" style:font-charset="x-symbol" fo:font-size="10pt" style:font-size-asian="10pt"/>
    </style:style>
    <style:style style:name="ListLabel_20_808" style:display-name="ListLabel 808" style:family="text">
      <style:text-properties style:font-name="Aptos" fo:font-family="Aptos" style:font-family-generic="roman" style:font-pitch="variable" style:font-charset="x-symbol" fo:font-size="10pt" style:font-size-asian="10pt"/>
    </style:style>
    <style:style style:name="ListLabel_20_809" style:display-name="ListLabel 809" style:family="text">
      <style:text-properties style:font-name="Aptos" fo:font-family="Aptos" style:font-family-generic="roman" style:font-pitch="variable" style:font-charset="x-symbol" fo:font-size="10pt" style:font-size-asian="10pt"/>
    </style:style>
    <style:style style:name="ListLabel_20_810" style:display-name="ListLabel 810" style:family="text">
      <style:text-properties style:font-name="Aptos" fo:font-family="Aptos" style:font-family-generic="roman" style:font-pitch="variable" style:font-charset="x-symbol" fo:font-size="10pt" style:font-size-asian="10pt"/>
    </style:style>
    <style:style style:name="ListLabel_20_811" style:display-name="ListLabel 811" style:family="text">
      <style:text-properties style:font-name="Aptos" fo:font-family="Aptos" style:font-family-generic="roman" style:font-pitch="variable" style:font-charset="x-symbol" fo:font-size="10pt" style:font-size-asian="10pt"/>
    </style:style>
    <style:style style:name="ListLabel_20_812" style:display-name="ListLabel 812" style:family="text">
      <style:text-properties style:font-name="Aptos" fo:font-family="Aptos" style:font-family-generic="roman" style:font-pitch="variable" style:font-charset="x-symbol" fo:font-size="10pt" style:font-size-asian="10pt"/>
    </style:style>
    <style:style style:name="ListLabel_20_813" style:display-name="ListLabel 813" style:family="text">
      <style:text-properties style:font-name="Aptos" fo:font-family="Aptos" style:font-family-generic="roman" style:font-pitch="variable" style:font-charset="x-symbol" fo:font-size="10pt" style:font-size-asian="10pt"/>
    </style:style>
    <style:style style:name="ListLabel_20_814" style:display-name="ListLabel 814" style:family="text">
      <style:text-properties style:font-name="Aptos" fo:font-family="Aptos" style:font-family-generic="roman" style:font-pitch="variable" style:font-charset="x-symbol" fo:font-size="10pt" style:font-size-asian="10pt"/>
    </style:style>
    <style:style style:name="ListLabel_20_815" style:display-name="ListLabel 815" style:family="text">
      <style:text-properties style:font-name="Aptos" fo:font-family="Aptos" style:font-family-generic="roman" style:font-pitch="variable" style:font-charset="x-symbol" fo:font-size="10pt" style:font-size-asian="10pt"/>
    </style:style>
    <style:style style:name="ListLabel_20_816" style:display-name="ListLabel 816" style:family="text">
      <style:text-properties style:font-name="Aptos" fo:font-family="Aptos" style:font-family-generic="roman" style:font-pitch="variable" style:font-charset="x-symbol" fo:font-size="10pt" style:font-size-asian="10pt"/>
    </style:style>
    <style:style style:name="ListLabel_20_817" style:display-name="ListLabel 817" style:family="text">
      <style:text-properties style:font-name="Aptos" fo:font-family="Aptos" style:font-family-generic="roman" style:font-pitch="variable" style:font-charset="x-symbol" fo:font-size="10pt" style:font-size-asian="10pt"/>
    </style:style>
    <style:style style:name="ListLabel_20_818" style:display-name="ListLabel 818" style:family="text">
      <style:text-properties style:font-name="Aptos" fo:font-family="Aptos" style:font-family-generic="roman" style:font-pitch="variable" style:font-charset="x-symbol" fo:font-size="10pt" style:font-size-asian="10pt"/>
    </style:style>
    <style:style style:name="ListLabel_20_819" style:display-name="ListLabel 819" style:family="text">
      <style:text-properties style:font-name="Aptos" fo:font-family="Aptos" style:font-family-generic="roman" style:font-pitch="variable" style:font-charset="x-symbol" fo:font-size="10pt" style:font-size-asian="10pt"/>
    </style:style>
    <style:style style:name="ListLabel_20_1180" style:display-name="ListLabel 1180" style:family="text">
      <style:text-properties fo:color="#000000" loext:opacity="100%" style:font-name="Lato 2" fo:font-family="'Lato 2'" style:font-family-generic="roman" style:font-pitch="variable" fo:font-size="15pt" style:text-underline-style="solid" style:text-underline-width="auto" style:text-underline-color="font-color" style:letter-kerning="false" fo:background-color="#ffffff" style:font-name-asian="Times New Roman" style:font-family-asian="'Times New Roman'" style:font-family-generic-asian="system" style:font-pitch-asian="variable" style:font-size-asian="15pt" style:language-asian="pt" style:country-asian="BR" style:font-name-complex="Arial1" style:font-family-complex="Arial" style:font-family-generic-complex="system" style:font-pitch-complex="variable" style:font-size-complex="15pt"/>
    </style:style>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252" style:display-name="ListLabel 1252" style:family="text">
      <style:text-properties fo:color="#000000" loext:opacity="100%" style:font-name="Lato 2" fo:font-family="'Lato 2'" style:font-family-generic="roman" style:font-pitch="variable" fo:font-size="15pt" style:text-underline-style="solid" style:text-underline-width="auto" style:text-underline-color="font-color" style:letter-kerning="false" fo:background-color="#ffffff" style:font-name-asian="Times New Roman" style:font-family-asian="'Times New Roman'" style:font-family-generic-asian="system" style:font-pitch-asian="variable" style:font-size-asian="15pt" style:language-asian="pt" style:country-asian="BR" style:font-name-complex="Arial1" style:font-family-complex="Arial" style:font-family-generic-complex="system" style:font-pitch-complex="variable" style:font-size-complex="15pt"/>
    </style:style>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380"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382"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383"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385"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386"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1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1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1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2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2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2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2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2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2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3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4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4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4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4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4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5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5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5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5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5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5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7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7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7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7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5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5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5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5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7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7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8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8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8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0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0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1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1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1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3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3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3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3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3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3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4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4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4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4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4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4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5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5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5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5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5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2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2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2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2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2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2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3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3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3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3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3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4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4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4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4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4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5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5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5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5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5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5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6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6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6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6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6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7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7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7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7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7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8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8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8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8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8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8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9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9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9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9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9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0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0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0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0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0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1027"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1028"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1029"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1030"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1031"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1032"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1033"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1034"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1035"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1073"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1074"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1075"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1076"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1077"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1078"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1079"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1080"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1091"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1093"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1094"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1096"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1097"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1145"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1147"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1148"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1150"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1151"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5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1199"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1201"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1202"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1204"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1205"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1217" loext:num-list-format="%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ListLabel_20_1219" loext:num-list-format="%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ListLabel_20_1220" loext:num-list-format="%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ListLabel_20_1222" loext:num-list-format="%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ListLabel_20_1223" loext:num-list-format="%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2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2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3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3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3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3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3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4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4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4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4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4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4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5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3T10:45:34.992568100</meta:creation-date>
    <dc:date>2026-06-23T10:52:40.984648200</dc:date>
    <meta:editing-duration>PT7M6S</meta:editing-duration>
    <meta:editing-cycles>1</meta:editing-cycles>
    <meta:document-statistic meta:table-count="0" meta:image-count="8" meta:object-count="0" meta:page-count="62" meta:paragraph-count="1625" meta:word-count="11873" meta:character-count="88634" meta:non-whitespace-character-count="73775"/>
    <meta:generator>LibreOffice/26.2.4.2$Windows_X86_64 LibreOffice_project/0229ac93fcf0d7cbc6376066c6f35021cef002dc</meta:generator>
  </office:meta>
</office:document-meta>
</file>